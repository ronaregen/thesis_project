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848in"/>
    </style:style>
    <style:style style:name="co5" style:family="table-column">
      <style:table-column-properties fo:break-before="auto" style:column-width="0.6937in"/>
    </style:style>
    <style:style style:name="co6" style:family="table-column">
      <style:table-column-properties fo:break-before="auto" style:column-width="1.6937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1.072in"/>
    </style:style>
    <style:style style:name="co9" style:family="table-column">
      <style:table-column-properties fo:break-before="auto" style:column-width="1.1575in"/>
    </style:style>
    <style:style style:name="co10" style:family="table-column">
      <style:table-column-properties fo:break-before="auto" style:column-width="0.668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jendela_20_20_20_detik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8ecf1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168">
      <style:table-cell-properties style:rotation-align="none"/>
    </style:style>
    <style:style style:name="ce8" style:family="table-cell" style:parent-style-name="Default" style:data-style-name="N168">
      <style:table-cell-properties fo:background-color="#e0c2cd" style:rotation-align="none"/>
    </style:style>
    <style:style style:name="ce9" style:family="table-cell" style:parent-style-name="Default" style:data-style-name="N168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68"/>
    <style:style style:name="ce10" style:family="table-cell" style:parent-style-name="Default" style:data-style-name="N168">
      <style:table-cell-properties fo:border="0.74pt solid #000000"/>
    </style:style>
    <style:style style:name="ce21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endela 20 detik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3" table:default-cell-style-name="ce2"/>
        <table:table-column table:style-name="co6" table:visibility="collapse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0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ubjek</text:p>
          </table:table-cell>
          <table:table-cell table:style-name="ce1" office:value-type="string" calcext:value-type="string" table:number-columns-spanned="1" table:number-rows-spanned="2">
            <text:p>Window ke</text:p>
          </table:table-cell>
          <table:table-cell table:style-name="ce1" office:value-type="string" calcext:value-type="string" table:number-columns-spanned="1" table:number-rows-spanned="2">
            <text:p>t_start</text:p>
          </table:table-cell>
          <table:table-cell table:style-name="ce1" office:value-type="string" calcext:value-type="string" table:number-columns-spanned="1" table:number-rows-spanned="2">
            <text:p>t_end</text:p>
          </table:table-cell>
          <table:table-cell table:style-name="ce1" office:value-type="string" calcext:value-type="string" table:number-columns-spanned="2" table:number-rows-spanned="1">
            <text:p>ECG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adar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1" table:number-rows-spanned="2">
            <text:p>error</text:p>
          </table:table-cell>
          <table:table-cell table:style-name="ce1" office:value-type="string" calcext:value-type="string" table:number-columns-spanned="1" table:number-rows-spanned="2">
            <text:p>error mutlak</text:p>
          </table:table-cell>
          <table:table-cell table:style-name="ce1" office:value-type="string" calcext:value-type="string" table:number-columns-spanned="1" table:number-rows-spanned="2">
            <text:p>error persen</text:p>
          </table:table-cell>
          <table:table-cell office:value-type="string" calcext:value-type="string">
            <text:p>Stdev</text:p>
          </table:table-cell>
          <table:table-cell table:number-columns-repeated="16371"/>
        </table:table-row>
        <table:table-row table:style-name="ro2" table:visibility="filter">
          <table:covered-table-cell table:number-columns-repeated="4" table:style-name="ce1"/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radar_bpm_sebelum_medfilt</text:p>
          </table:table-cell>
          <table:covered-table-cell table:number-columns-repeated="3" table:style-name="ce1"/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4805" calcext:value-type="float">
            <text:p>1.4805</text:p>
          </table:table-cell>
          <table:table-cell office:value-type="float" office:value="88.83" calcext:value-type="float">
            <text:p>88.83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3]-[.F3]" office:value-type="float" office:value="-1.83" calcext:value-type="float">
            <text:p>-1.83</text:p>
          </table:table-cell>
          <table:table-cell table:formula="of:=ABS([.J3])" office:value-type="float" office:value="1.83" calcext:value-type="float">
            <text:p>1.83</text:p>
          </table:table-cell>
          <table:table-cell table:formula="of:=[.K3]/[.F3]*100" office:value-type="float" office:value="2.06011482607227" calcext:value-type="float">
            <text:p>2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4625" calcext:value-type="float">
            <text:p>1.4625</text:p>
          </table:table-cell>
          <table:table-cell office:value-type="float" office:value="87.75" calcext:value-type="float">
            <text:p>87.75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4]-[.F4]" office:value-type="float" office:value="-0.75" calcext:value-type="float">
            <text:p>-0.75</text:p>
          </table:table-cell>
          <table:table-cell table:formula="of:=ABS([.J4])" office:value-type="float" office:value="0.75" calcext:value-type="float">
            <text:p>0.75</text:p>
          </table:table-cell>
          <table:table-cell table:formula="of:=[.K4]/[.F4]*100" office:value-type="float" office:value="0.854700854700855" calcext:value-type="float">
            <text:p>0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4219" calcext:value-type="float">
            <text:p>1.4219</text:p>
          </table:table-cell>
          <table:table-cell office:value-type="float" office:value="85.32" calcext:value-type="float">
            <text:p>85.32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5]-[.F5]" office:value-type="float" office:value="1.68000000000001" calcext:value-type="float">
            <text:p>1.68000000000001</text:p>
          </table:table-cell>
          <table:table-cell table:formula="of:=ABS([.J5])" office:value-type="float" office:value="1.68000000000001" calcext:value-type="float">
            <text:p>1.68000000000001</text:p>
          </table:table-cell>
          <table:table-cell table:formula="of:=[.K5]/[.F5]*100" office:value-type="float" office:value="1.96905766526021" calcext:value-type="float">
            <text:p>2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4122" calcext:value-type="float">
            <text:p>1.4122</text:p>
          </table:table-cell>
          <table:table-cell office:value-type="float" office:value="84.73" calcext:value-type="float">
            <text:p>84.73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H6]-[.F6]" office:value-type="float" office:value="-0.730000000000004" calcext:value-type="float">
            <text:p>-0.730000000000004</text:p>
          </table:table-cell>
          <table:table-cell table:formula="of:=ABS([.J6])" office:value-type="float" office:value="0.730000000000004" calcext:value-type="float">
            <text:p>0.730000000000004</text:p>
          </table:table-cell>
          <table:table-cell table:formula="of:=[.K6]/[.F6]*100" office:value-type="float" office:value="0.861560250206543" calcext:value-type="float">
            <text:p>0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.3967" calcext:value-type="float">
            <text:p>1.3967</text:p>
          </table:table-cell>
          <table:table-cell office:value-type="float" office:value="83.8" calcext:value-type="float">
            <text:p>83.8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H7]-[.F7]" office:value-type="float" office:value="0.200000000000003" calcext:value-type="float">
            <text:p>0.200000000000003</text:p>
          </table:table-cell>
          <table:table-cell table:formula="of:=ABS([.J7])" office:value-type="float" office:value="0.200000000000003" calcext:value-type="float">
            <text:p>0.200000000000003</text:p>
          </table:table-cell>
          <table:table-cell table:formula="of:=[.K7]/[.F7]*100" office:value-type="float" office:value="0.238663484486877" calcext:value-type="float">
            <text:p>0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4121" calcext:value-type="float">
            <text:p>1.4121</text:p>
          </table:table-cell>
          <table:table-cell office:value-type="float" office:value="84.72" calcext:value-type="float">
            <text:p>84.7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8]-[.F8]" office:value-type="float" office:value="-0.719999999999999" calcext:value-type="float">
            <text:p>-0.719999999999999</text:p>
          </table:table-cell>
          <table:table-cell table:formula="of:=ABS([.J8])" office:value-type="float" office:value="0.719999999999999" calcext:value-type="float">
            <text:p>0.719999999999999</text:p>
          </table:table-cell>
          <table:table-cell table:formula="of:=[.K8]/[.F8]*100" office:value-type="float" office:value="0.849858356940509" calcext:value-type="float">
            <text:p>0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4582" calcext:value-type="float">
            <text:p>1.4582</text:p>
          </table:table-cell>
          <table:table-cell office:value-type="float" office:value="87.49" calcext:value-type="float">
            <text:p>87.49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9]-[.F9]" office:value-type="float" office:value="-0.489999999999995" calcext:value-type="float">
            <text:p>-0.489999999999995</text:p>
          </table:table-cell>
          <table:table-cell table:formula="of:=ABS([.J9])" office:value-type="float" office:value="0.489999999999995" calcext:value-type="float">
            <text:p>0.489999999999995</text:p>
          </table:table-cell>
          <table:table-cell table:formula="of:=[.K9]/[.F9]*100" office:value-type="float" office:value="0.560064007315116" calcext:value-type="float">
            <text:p>0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.4672" calcext:value-type="float">
            <text:p>1.4672</text:p>
          </table:table-cell>
          <table:table-cell office:value-type="float" office:value="88.03" calcext:value-type="float">
            <text:p>88.03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formula="of:=[.H10]-[.F10]" office:value-type="float" office:value="1.97" calcext:value-type="float">
            <text:p>1.97</text:p>
          </table:table-cell>
          <table:table-cell table:formula="of:=ABS([.J10])" office:value-type="float" office:value="1.97" calcext:value-type="float">
            <text:p>1.97</text:p>
          </table:table-cell>
          <table:table-cell table:formula="of:=[.K10]/[.F10]*100" office:value-type="float" office:value="2.23787345223219" calcext:value-type="float">
            <text:p>2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.4907" calcext:value-type="float">
            <text:p>1.4907</text:p>
          </table:table-cell>
          <table:table-cell office:value-type="float" office:value="89.44" calcext:value-type="float">
            <text:p>89.44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formula="of:=[.H11]-[.F11]" office:value-type="float" office:value="0.560000000000002" calcext:value-type="float">
            <text:p>0.560000000000002</text:p>
          </table:table-cell>
          <table:table-cell table:formula="of:=ABS([.J11])" office:value-type="float" office:value="0.560000000000002" calcext:value-type="float">
            <text:p>0.560000000000002</text:p>
          </table:table-cell>
          <table:table-cell table:formula="of:=[.K11]/[.F11]*100" office:value-type="float" office:value="0.626118067978536" calcext:value-type="float">
            <text:p>0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.4947" calcext:value-type="float">
            <text:p>1.4947</text:p>
          </table:table-cell>
          <table:table-cell office:value-type="float" office:value="89.68" calcext:value-type="float">
            <text:p>89.6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12]-[.F12]" office:value-type="float" office:value="0.319999999999993" calcext:value-type="float">
            <text:p>0.319999999999993</text:p>
          </table:table-cell>
          <table:table-cell table:formula="of:=ABS([.J12])" office:value-type="float" office:value="0.319999999999993" calcext:value-type="float">
            <text:p>0.319999999999993</text:p>
          </table:table-cell>
          <table:table-cell table:formula="of:=[.K12]/[.F12]*100" office:value-type="float" office:value="0.356824264049948" calcext:value-type="float">
            <text:p>0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494" calcext:value-type="float">
            <text:p>1.494</text:p>
          </table:table-cell>
          <table:table-cell office:value-type="float" office:value="89.64" calcext:value-type="float">
            <text:p>89.6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13]-[.F13]" office:value-type="float" office:value="0.359999999999999" calcext:value-type="float">
            <text:p>0.359999999999999</text:p>
          </table:table-cell>
          <table:table-cell table:formula="of:=ABS([.J13])" office:value-type="float" office:value="0.359999999999999" calcext:value-type="float">
            <text:p>0.359999999999999</text:p>
          </table:table-cell>
          <table:table-cell table:formula="of:=[.K13]/[.F13]*100" office:value-type="float" office:value="0.401606425702811" calcext:value-type="float">
            <text:p>0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.5097" calcext:value-type="float">
            <text:p>1.5097</text:p>
          </table:table-cell>
          <table:table-cell office:value-type="float" office:value="90.58" calcext:value-type="float">
            <text:p>90.5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14]-[.F14]" office:value-type="float" office:value="-0.579999999999998" calcext:value-type="float">
            <text:p>-0.579999999999998</text:p>
          </table:table-cell>
          <table:table-cell table:formula="of:=ABS([.J14])" office:value-type="float" office:value="0.579999999999998" calcext:value-type="float">
            <text:p>0.579999999999998</text:p>
          </table:table-cell>
          <table:table-cell table:formula="of:=[.K14]/[.F14]*100" office:value-type="float" office:value="0.640317950982555" calcext:value-type="float">
            <text:p>0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5134" calcext:value-type="float">
            <text:p>1.5134</text:p>
          </table:table-cell>
          <table:table-cell office:value-type="float" office:value="90.8" calcext:value-type="float">
            <text:p>90.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15]-[.F15]" office:value-type="float" office:value="-0.799999999999997" calcext:value-type="float">
            <text:p>-0.799999999999997</text:p>
          </table:table-cell>
          <table:table-cell table:formula="of:=ABS([.J15])" office:value-type="float" office:value="0.799999999999997" calcext:value-type="float">
            <text:p>0.799999999999997</text:p>
          </table:table-cell>
          <table:table-cell table:formula="of:=[.K15]/[.F15]*100" office:value-type="float" office:value="0.881057268722464" calcext:value-type="float">
            <text:p>0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.5227" calcext:value-type="float">
            <text:p>1.5227</text:p>
          </table:table-cell>
          <table:table-cell office:value-type="float" office:value="91.36" calcext:value-type="float">
            <text:p>91.36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16]-[.F16]" office:value-type="float" office:value="-1.36" calcext:value-type="float">
            <text:p>-1.36</text:p>
          </table:table-cell>
          <table:table-cell table:formula="of:=ABS([.J16])" office:value-type="float" office:value="1.36" calcext:value-type="float">
            <text:p>1.36</text:p>
          </table:table-cell>
          <table:table-cell table:formula="of:=[.K16]/[.F16]*100" office:value-type="float" office:value="1.48861646234676" calcext:value-type="float">
            <text:p>1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.5167" calcext:value-type="float">
            <text:p>1.5167</text:p>
          </table:table-cell>
          <table:table-cell office:value-type="float" office:value="91" calcext:value-type="float">
            <text:p>9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17]-[.F17]" office:value-type="float" office:value="-1" calcext:value-type="float">
            <text:p>-1</text:p>
          </table:table-cell>
          <table:table-cell table:formula="of:=ABS([.J17])" office:value-type="float" office:value="1" calcext:value-type="float">
            <text:p>1</text:p>
          </table:table-cell>
          <table:table-cell table:formula="of:=[.K17]/[.F17]*100" office:value-type="float" office:value="1.0989010989011" calcext:value-type="float">
            <text:p>1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.5022" calcext:value-type="float">
            <text:p>1.5022</text:p>
          </table:table-cell>
          <table:table-cell office:value-type="float" office:value="90.13" calcext:value-type="float">
            <text:p>90.1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18]-[.F18]" office:value-type="float" office:value="-0.129999999999995" calcext:value-type="float">
            <text:p>-0.129999999999995</text:p>
          </table:table-cell>
          <table:table-cell table:formula="of:=ABS([.J18])" office:value-type="float" office:value="0.129999999999995" calcext:value-type="float">
            <text:p>0.129999999999995</text:p>
          </table:table-cell>
          <table:table-cell table:formula="of:=[.K18]/[.F18]*100" office:value-type="float" office:value="0.144236103406186" calcext:value-type="float">
            <text:p>0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481" calcext:value-type="float">
            <text:p>1.481</text:p>
          </table:table-cell>
          <table:table-cell office:value-type="float" office:value="88.86" calcext:value-type="float">
            <text:p>88.86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19]-[.F19]" office:value-type="float" office:value="1.14" calcext:value-type="float">
            <text:p>1.14</text:p>
          </table:table-cell>
          <table:table-cell table:formula="of:=ABS([.J19])" office:value-type="float" office:value="1.14" calcext:value-type="float">
            <text:p>1.14</text:p>
          </table:table-cell>
          <table:table-cell table:formula="of:=[.K19]/[.F19]*100" office:value-type="float" office:value="1.2829169480081" calcext:value-type="float">
            <text:p>1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.4793" calcext:value-type="float">
            <text:p>1.4793</text:p>
          </table:table-cell>
          <table:table-cell office:value-type="float" office:value="88.76" calcext:value-type="float">
            <text:p>88.76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[.H20]-[.F20]" office:value-type="float" office:value="1.23999999999999" calcext:value-type="float">
            <text:p>1.23999999999999</text:p>
          </table:table-cell>
          <table:table-cell table:formula="of:=ABS([.J20])" office:value-type="float" office:value="1.23999999999999" calcext:value-type="float">
            <text:p>1.23999999999999</text:p>
          </table:table-cell>
          <table:table-cell table:formula="of:=[.K20]/[.F20]*100" office:value-type="float" office:value="1.3970256872465" calcext:value-type="float">
            <text:p>1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.4841" calcext:value-type="float">
            <text:p>1.4841</text:p>
          </table:table-cell>
          <table:table-cell office:value-type="float" office:value="89.04" calcext:value-type="float">
            <text:p>89.04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[.H21]-[.F21]" office:value-type="float" office:value="0.959999999999994" calcext:value-type="float">
            <text:p>0.959999999999994</text:p>
          </table:table-cell>
          <table:table-cell table:formula="of:=ABS([.J21])" office:value-type="float" office:value="0.959999999999994" calcext:value-type="float">
            <text:p>0.959999999999994</text:p>
          </table:table-cell>
          <table:table-cell table:formula="of:=[.K21]/[.F21]*100" office:value-type="float" office:value="1.07816711590296" calcext:value-type="float">
            <text:p>1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.5015" calcext:value-type="float">
            <text:p>1.5015</text:p>
          </table:table-cell>
          <table:table-cell office:value-type="float" office:value="90.09" calcext:value-type="float">
            <text:p>90.0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22]-[.F22]" office:value-type="float" office:value="-0.0900000000000034" calcext:value-type="float">
            <text:p>-0.0900000000000034</text:p>
          </table:table-cell>
          <table:table-cell table:formula="of:=ABS([.J22])" office:value-type="float" office:value="0.0900000000000034" calcext:value-type="float">
            <text:p>0.0900000000000034</text:p>
          </table:table-cell>
          <table:table-cell table:formula="of:=[.K22]/[.F22]*100" office:value-type="float" office:value="0.0999000999001037" calcext:value-type="float">
            <text:p>0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.5163" calcext:value-type="float">
            <text:p>1.5163</text:p>
          </table:table-cell>
          <table:table-cell office:value-type="float" office:value="90.98" calcext:value-type="float">
            <text:p>90.9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formula="of:=[.H23]-[.F23]" office:value-type="float" office:value="-0.980000000000004" calcext:value-type="float">
            <text:p>-0.980000000000004</text:p>
          </table:table-cell>
          <table:table-cell table:formula="of:=ABS([.J23])" office:value-type="float" office:value="0.980000000000004" calcext:value-type="float">
            <text:p>0.980000000000004</text:p>
          </table:table-cell>
          <table:table-cell table:formula="of:=[.K23]/[.F23]*100" office:value-type="float" office:value="1.07715981534404" calcext:value-type="float">
            <text:p>1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.5052" calcext:value-type="float">
            <text:p>1.5052</text:p>
          </table:table-cell>
          <table:table-cell office:value-type="float" office:value="90.31" calcext:value-type="float">
            <text:p>90.3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24]-[.F24]" office:value-type="float" office:value="-0.310000000000002" calcext:value-type="float">
            <text:p>-0.310000000000002</text:p>
          </table:table-cell>
          <table:table-cell table:formula="of:=ABS([.J24])" office:value-type="float" office:value="0.310000000000002" calcext:value-type="float">
            <text:p>0.310000000000002</text:p>
          </table:table-cell>
          <table:table-cell table:formula="of:=[.K24]/[.F24]*100" office:value-type="float" office:value="0.343262097220687" calcext:value-type="float">
            <text:p>0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.5042" calcext:value-type="float">
            <text:p>1.5042</text:p>
          </table:table-cell>
          <table:table-cell office:value-type="float" office:value="90.25" calcext:value-type="float">
            <text:p>90.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25]-[.F25]" office:value-type="float" office:value="-0.25" calcext:value-type="float">
            <text:p>-0.25</text:p>
          </table:table-cell>
          <table:table-cell table:formula="of:=ABS([.J25])" office:value-type="float" office:value="0.25" calcext:value-type="float">
            <text:p>0.25</text:p>
          </table:table-cell>
          <table:table-cell table:formula="of:=[.K25]/[.F25]*100" office:value-type="float" office:value="0.277008310249308" calcext:value-type="float">
            <text:p>0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.5032" calcext:value-type="float">
            <text:p>1.5032</text:p>
          </table:table-cell>
          <table:table-cell office:value-type="float" office:value="90.19" calcext:value-type="float">
            <text:p>90.1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26]-[.F26]" office:value-type="float" office:value="-0.189999999999998" calcext:value-type="float">
            <text:p>-0.189999999999998</text:p>
          </table:table-cell>
          <table:table-cell table:formula="of:=ABS([.J26])" office:value-type="float" office:value="0.189999999999998" calcext:value-type="float">
            <text:p>0.189999999999998</text:p>
          </table:table-cell>
          <table:table-cell table:formula="of:=[.K26]/[.F26]*100" office:value-type="float" office:value="0.210666370994565" calcext:value-type="float">
            <text:p>0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.5182" calcext:value-type="float">
            <text:p>1.5182</text:p>
          </table:table-cell>
          <table:table-cell office:value-type="float" office:value="91.09" calcext:value-type="float">
            <text:p>91.0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27]-[.F27]" office:value-type="float" office:value="-1.09" calcext:value-type="float">
            <text:p>-1.09</text:p>
          </table:table-cell>
          <table:table-cell table:formula="of:=ABS([.J27])" office:value-type="float" office:value="1.09" calcext:value-type="float">
            <text:p>1.09</text:p>
          </table:table-cell>
          <table:table-cell table:formula="of:=[.K27]/[.F27]*100" office:value-type="float" office:value="1.19661872872983" calcext:value-type="float">
            <text:p>1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.5308" calcext:value-type="float">
            <text:p>1.5308</text:p>
          </table:table-cell>
          <table:table-cell office:value-type="float" office:value="91.85" calcext:value-type="float">
            <text:p>91.85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28]-[.F28]" office:value-type="float" office:value="1.15000000000001" calcext:value-type="float">
            <text:p>1.15000000000001</text:p>
          </table:table-cell>
          <table:table-cell table:formula="of:=ABS([.J28])" office:value-type="float" office:value="1.15000000000001" calcext:value-type="float">
            <text:p>1.15000000000001</text:p>
          </table:table-cell>
          <table:table-cell table:formula="of:=[.K28]/[.F28]*100" office:value-type="float" office:value="1.25204137180186" calcext:value-type="float">
            <text:p>1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.5406" calcext:value-type="float">
            <text:p>1.5406</text:p>
          </table:table-cell>
          <table:table-cell office:value-type="float" office:value="92.44" calcext:value-type="float">
            <text:p>92.44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29]-[.F29]" office:value-type="float" office:value="0.560000000000002" calcext:value-type="float">
            <text:p>0.560000000000002</text:p>
          </table:table-cell>
          <table:table-cell table:formula="of:=ABS([.J29])" office:value-type="float" office:value="0.560000000000002" calcext:value-type="float">
            <text:p>0.560000000000002</text:p>
          </table:table-cell>
          <table:table-cell table:formula="of:=[.K29]/[.F29]*100" office:value-type="float" office:value="0.60579835569018" calcext:value-type="float">
            <text:p>0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.5336" calcext:value-type="float">
            <text:p>1.5336</text:p>
          </table:table-cell>
          <table:table-cell office:value-type="float" office:value="92.02" calcext:value-type="float">
            <text:p>92.02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30]-[.F30]" office:value-type="float" office:value="0.980000000000004" calcext:value-type="float">
            <text:p>0.980000000000004</text:p>
          </table:table-cell>
          <table:table-cell table:formula="of:=ABS([.J30])" office:value-type="float" office:value="0.980000000000004" calcext:value-type="float">
            <text:p>0.980000000000004</text:p>
          </table:table-cell>
          <table:table-cell table:formula="of:=[.K30]/[.F30]*100" office:value-type="float" office:value="1.06498587263639" calcext:value-type="float">
            <text:p>1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.5372" calcext:value-type="float">
            <text:p>1.5372</text:p>
          </table:table-cell>
          <table:table-cell office:value-type="float" office:value="92.23" calcext:value-type="float">
            <text:p>92.2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31]-[.F31]" office:value-type="float" office:value="-2.23" calcext:value-type="float">
            <text:p>-2.23</text:p>
          </table:table-cell>
          <table:table-cell table:formula="of:=ABS([.J31])" office:value-type="float" office:value="2.23" calcext:value-type="float">
            <text:p>2.23</text:p>
          </table:table-cell>
          <table:table-cell table:formula="of:=[.K31]/[.F31]*100" office:value-type="float" office:value="2.4178683725469" calcext:value-type="float">
            <text:p>2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.5252" calcext:value-type="float">
            <text:p>1.5252</text:p>
          </table:table-cell>
          <table:table-cell office:value-type="float" office:value="91.51" calcext:value-type="float">
            <text:p>91.51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formula="of:=[.H32]-[.F32]" office:value-type="float" office:value="-19.51" calcext:value-type="float">
            <text:p>-19.51</text:p>
          </table:table-cell>
          <table:table-cell table:formula="of:=ABS([.J32])" office:value-type="float" office:value="19.51" calcext:value-type="float">
            <text:p>19.51</text:p>
          </table:table-cell>
          <table:table-cell table:formula="of:=[.K32]/[.F32]*100" office:value-type="float" office:value="21.3200743088187" calcext:value-type="float">
            <text:p>21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.5253" calcext:value-type="float">
            <text:p>1.5253</text:p>
          </table:table-cell>
          <table:table-cell office:value-type="float" office:value="91.52" calcext:value-type="float">
            <text:p>91.5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33]-[.F33]" office:value-type="float" office:value="-19.52" calcext:value-type="float">
            <text:p>-19.52</text:p>
          </table:table-cell>
          <table:table-cell table:formula="of:=ABS([.J33])" office:value-type="float" office:value="19.52" calcext:value-type="float">
            <text:p>19.52</text:p>
          </table:table-cell>
          <table:table-cell table:formula="of:=[.K33]/[.F33]*100" office:value-type="float" office:value="21.3286713286713" calcext:value-type="float">
            <text:p>21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.5461" calcext:value-type="float">
            <text:p>1.5461</text:p>
          </table:table-cell>
          <table:table-cell office:value-type="float" office:value="92.76" calcext:value-type="float">
            <text:p>92.7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34]-[.F34]" office:value-type="float" office:value="-20.76" calcext:value-type="float">
            <text:p>-20.76</text:p>
          </table:table-cell>
          <table:table-cell table:formula="of:=ABS([.J34])" office:value-type="float" office:value="20.76" calcext:value-type="float">
            <text:p>20.76</text:p>
          </table:table-cell>
          <table:table-cell table:formula="of:=[.K34]/[.F34]*100" office:value-type="float" office:value="22.3803363518758" calcext:value-type="float">
            <text:p>22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.523" calcext:value-type="float">
            <text:p>1.523</text:p>
          </table:table-cell>
          <table:table-cell office:value-type="float" office:value="91.38" calcext:value-type="float">
            <text:p>91.3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formula="of:=[.H35]-[.F35]" office:value-type="float" office:value="-1.38" calcext:value-type="float">
            <text:p>-1.38</text:p>
          </table:table-cell>
          <table:table-cell table:formula="of:=ABS([.J35])" office:value-type="float" office:value="1.38" calcext:value-type="float">
            <text:p>1.38</text:p>
          </table:table-cell>
          <table:table-cell table:formula="of:=[.K35]/[.F35]*100" office:value-type="float" office:value="1.51017728168089" calcext:value-type="float">
            <text:p>1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.5244" calcext:value-type="float">
            <text:p>1.5244</text:p>
          </table:table-cell>
          <table:table-cell office:value-type="float" office:value="91.47" calcext:value-type="float">
            <text:p>91.47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formula="of:=[.H36]-[.F36]" office:value-type="float" office:value="-1.47" calcext:value-type="float">
            <text:p>-1.47</text:p>
          </table:table-cell>
          <table:table-cell table:formula="of:=ABS([.J36])" office:value-type="float" office:value="1.47" calcext:value-type="float">
            <text:p>1.47</text:p>
          </table:table-cell>
          <table:table-cell table:formula="of:=[.K36]/[.F36]*100" office:value-type="float" office:value="1.60708428993112" calcext:value-type="float">
            <text:p>1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.4934" calcext:value-type="float">
            <text:p>1.4934</text:p>
          </table:table-cell>
          <table:table-cell office:value-type="float" office:value="89.6" calcext:value-type="float">
            <text:p>89.6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37]-[.F37]" office:value-type="float" office:value="0.400000000000006" calcext:value-type="float">
            <text:p>0.400000000000006</text:p>
          </table:table-cell>
          <table:table-cell table:formula="of:=ABS([.J37])" office:value-type="float" office:value="0.400000000000006" calcext:value-type="float">
            <text:p>0.400000000000006</text:p>
          </table:table-cell>
          <table:table-cell table:formula="of:=[.K37]/[.F37]*100" office:value-type="float" office:value="0.446428571428578" calcext:value-type="float">
            <text:p>0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.4586" calcext:value-type="float">
            <text:p>1.4586</text:p>
          </table:table-cell>
          <table:table-cell office:value-type="float" office:value="87.51" calcext:value-type="float">
            <text:p>87.51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38]-[.F38]" office:value-type="float" office:value="-0.510000000000005" calcext:value-type="float">
            <text:p>-0.510000000000005</text:p>
          </table:table-cell>
          <table:table-cell table:formula="of:=ABS([.J38])" office:value-type="float" office:value="0.510000000000005" calcext:value-type="float">
            <text:p>0.510000000000005</text:p>
          </table:table-cell>
          <table:table-cell table:formula="of:=[.K38]/[.F38]*100" office:value-type="float" office:value="0.582790538224209" calcext:value-type="float">
            <text:p>0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.4567" calcext:value-type="float">
            <text:p>1.4567</text:p>
          </table:table-cell>
          <table:table-cell office:value-type="float" office:value="87.4" calcext:value-type="float">
            <text:p>87.4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39]-[.F39]" office:value-type="float" office:value="-0.400000000000006" calcext:value-type="float">
            <text:p>-0.400000000000006</text:p>
          </table:table-cell>
          <table:table-cell table:formula="of:=ABS([.J39])" office:value-type="float" office:value="0.400000000000006" calcext:value-type="float">
            <text:p>0.400000000000006</text:p>
          </table:table-cell>
          <table:table-cell table:formula="of:=[.K39]/[.F39]*100" office:value-type="float" office:value="0.457665903890167" calcext:value-type="float">
            <text:p>0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.4613" calcext:value-type="float">
            <text:p>1.4613</text:p>
          </table:table-cell>
          <table:table-cell office:value-type="float" office:value="87.68" calcext:value-type="float">
            <text:p>87.68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40]-[.F40]" office:value-type="float" office:value="-0.680000000000007" calcext:value-type="float">
            <text:p>-0.680000000000007</text:p>
          </table:table-cell>
          <table:table-cell table:formula="of:=ABS([.J40])" office:value-type="float" office:value="0.680000000000007" calcext:value-type="float">
            <text:p>0.680000000000007</text:p>
          </table:table-cell>
          <table:table-cell table:formula="of:=[.K40]/[.F40]*100" office:value-type="float" office:value="0.775547445255482" calcext:value-type="float">
            <text:p>0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.4713" calcext:value-type="float">
            <text:p>1.4713</text:p>
          </table:table-cell>
          <table:table-cell office:value-type="float" office:value="88.28" calcext:value-type="float">
            <text:p>88.28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41]-[.F41]" office:value-type="float" office:value="-1.28" calcext:value-type="float">
            <text:p>-1.28</text:p>
          </table:table-cell>
          <table:table-cell table:formula="of:=ABS([.J41])" office:value-type="float" office:value="1.28" calcext:value-type="float">
            <text:p>1.28</text:p>
          </table:table-cell>
          <table:table-cell table:formula="of:=[.K41]/[.F41]*100" office:value-type="float" office:value="1.44993203443589" calcext:value-type="float">
            <text:p>1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.4768" calcext:value-type="float">
            <text:p>1.4768</text:p>
          </table:table-cell>
          <table:table-cell office:value-type="float" office:value="88.61" calcext:value-type="float">
            <text:p>88.6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42]-[.F42]" office:value-type="float" office:value="1.39" calcext:value-type="float">
            <text:p>1.39</text:p>
          </table:table-cell>
          <table:table-cell table:formula="of:=ABS([.J42])" office:value-type="float" office:value="1.39" calcext:value-type="float">
            <text:p>1.39</text:p>
          </table:table-cell>
          <table:table-cell table:formula="of:=[.K42]/[.F42]*100" office:value-type="float" office:value="1.56867170748223" calcext:value-type="float">
            <text:p>1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1.4887" calcext:value-type="float">
            <text:p>1.4887</text:p>
          </table:table-cell>
          <table:table-cell office:value-type="float" office:value="89.32" calcext:value-type="float">
            <text:p>89.3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43]-[.F43]" office:value-type="float" office:value="0.680000000000007" calcext:value-type="float">
            <text:p>0.680000000000007</text:p>
          </table:table-cell>
          <table:table-cell table:formula="of:=ABS([.J43])" office:value-type="float" office:value="0.680000000000007" calcext:value-type="float">
            <text:p>0.680000000000007</text:p>
          </table:table-cell>
          <table:table-cell table:formula="of:=[.K43]/[.F43]*100" office:value-type="float" office:value="0.76130765785939" calcext:value-type="float">
            <text:p>0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1.483" calcext:value-type="float">
            <text:p>1.483</text:p>
          </table:table-cell>
          <table:table-cell office:value-type="float" office:value="88.98" calcext:value-type="float">
            <text:p>88.9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44]-[.F44]" office:value-type="float" office:value="1.02" calcext:value-type="float">
            <text:p>1.02</text:p>
          </table:table-cell>
          <table:table-cell table:formula="of:=ABS([.J44])" office:value-type="float" office:value="1.02" calcext:value-type="float">
            <text:p>1.02</text:p>
          </table:table-cell>
          <table:table-cell table:formula="of:=[.K44]/[.F44]*100" office:value-type="float" office:value="1.14632501685772" calcext:value-type="float">
            <text:p>1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1.4977" calcext:value-type="float">
            <text:p>1.4977</text:p>
          </table:table-cell>
          <table:table-cell office:value-type="float" office:value="89.86" calcext:value-type="float">
            <text:p>89.86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45]-[.F45]" office:value-type="float" office:value="0.140000000000001" calcext:value-type="float">
            <text:p>0.140000000000001</text:p>
          </table:table-cell>
          <table:table-cell table:formula="of:=ABS([.J45])" office:value-type="float" office:value="0.140000000000001" calcext:value-type="float">
            <text:p>0.140000000000001</text:p>
          </table:table-cell>
          <table:table-cell table:formula="of:=[.K45]/[.F45]*100" office:value-type="float" office:value="0.155797907856667" calcext:value-type="float">
            <text:p>0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.5016" calcext:value-type="float">
            <text:p>1.5016</text:p>
          </table:table-cell>
          <table:table-cell office:value-type="float" office:value="90.1" calcext:value-type="float">
            <text:p>90.1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[.H46]-[.F46]" office:value-type="float" office:value="-0.0999999999999943" calcext:value-type="float">
            <text:p>-0.0999999999999943</text:p>
          </table:table-cell>
          <table:table-cell table:formula="of:=ABS([.J46])" office:value-type="float" office:value="0.0999999999999943" calcext:value-type="float">
            <text:p>0.0999999999999943</text:p>
          </table:table-cell>
          <table:table-cell table:formula="of:=[.K46]/[.F46]*100" office:value-type="float" office:value="0.110987791342946" calcext:value-type="float">
            <text:p>0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1.4987" calcext:value-type="float">
            <text:p>1.4987</text:p>
          </table:table-cell>
          <table:table-cell office:value-type="float" office:value="89.92" calcext:value-type="float">
            <text:p>89.9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47]-[.F47]" office:value-type="float" office:value="0.0799999999999983" calcext:value-type="float">
            <text:p>0.0799999999999983</text:p>
          </table:table-cell>
          <table:table-cell table:formula="of:=ABS([.J47])" office:value-type="float" office:value="0.0799999999999983" calcext:value-type="float">
            <text:p>0.0799999999999983</text:p>
          </table:table-cell>
          <table:table-cell table:formula="of:=[.K47]/[.F47]*100" office:value-type="float" office:value="0.0889679715302472" calcext:value-type="float">
            <text:p>0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.5077" calcext:value-type="float">
            <text:p>1.5077</text:p>
          </table:table-cell>
          <table:table-cell office:value-type="float" office:value="90.46" calcext:value-type="float">
            <text:p>90.46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48]-[.F48]" office:value-type="float" office:value="-0.459999999999994" calcext:value-type="float">
            <text:p>-0.459999999999994</text:p>
          </table:table-cell>
          <table:table-cell table:formula="of:=ABS([.J48])" office:value-type="float" office:value="0.459999999999994" calcext:value-type="float">
            <text:p>0.459999999999994</text:p>
          </table:table-cell>
          <table:table-cell table:formula="of:=[.K48]/[.F48]*100" office:value-type="float" office:value="0.508512049524645" calcext:value-type="float">
            <text:p>0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.5124" calcext:value-type="float">
            <text:p>1.5124</text:p>
          </table:table-cell>
          <table:table-cell office:value-type="float" office:value="90.74" calcext:value-type="float">
            <text:p>90.7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49]-[.F49]" office:value-type="float" office:value="-0.739999999999995" calcext:value-type="float">
            <text:p>-0.739999999999995</text:p>
          </table:table-cell>
          <table:table-cell table:formula="of:=ABS([.J49])" office:value-type="float" office:value="0.739999999999995" calcext:value-type="float">
            <text:p>0.739999999999995</text:p>
          </table:table-cell>
          <table:table-cell table:formula="of:=[.K49]/[.F49]*100" office:value-type="float" office:value="0.815516861362128" calcext:value-type="float">
            <text:p>0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.5263" calcext:value-type="float">
            <text:p>1.5263</text:p>
          </table:table-cell>
          <table:table-cell office:value-type="float" office:value="91.58" calcext:value-type="float">
            <text:p>91.5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table:formula="of:=[.H50]-[.F50]" office:value-type="float" office:value="-1.58" calcext:value-type="float">
            <text:p>-1.58</text:p>
          </table:table-cell>
          <table:table-cell table:formula="of:=ABS([.J50])" office:value-type="float" office:value="1.58" calcext:value-type="float">
            <text:p>1.58</text:p>
          </table:table-cell>
          <table:table-cell table:formula="of:=[.K50]/[.F50]*100" office:value-type="float" office:value="1.72526752566062" calcext:value-type="float">
            <text:p>1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1.5451" calcext:value-type="float">
            <text:p>1.5451</text:p>
          </table:table-cell>
          <table:table-cell office:value-type="float" office:value="92.7" calcext:value-type="float">
            <text:p>92.7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51]-[.F51]" office:value-type="float" office:value="0.299999999999997" calcext:value-type="float">
            <text:p>0.299999999999997</text:p>
          </table:table-cell>
          <table:table-cell table:formula="of:=ABS([.J51])" office:value-type="float" office:value="0.299999999999997" calcext:value-type="float">
            <text:p>0.299999999999997</text:p>
          </table:table-cell>
          <table:table-cell table:formula="of:=[.K51]/[.F51]*100" office:value-type="float" office:value="0.323624595469253" calcext:value-type="float">
            <text:p>0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1.5612" calcext:value-type="float">
            <text:p>1.5612</text:p>
          </table:table-cell>
          <table:table-cell office:value-type="float" office:value="93.67" calcext:value-type="float">
            <text:p>93.67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52]-[.F52]" office:value-type="float" office:value="-0.670000000000002" calcext:value-type="float">
            <text:p>-0.670000000000002</text:p>
          </table:table-cell>
          <table:table-cell table:formula="of:=ABS([.J52])" office:value-type="float" office:value="0.670000000000002" calcext:value-type="float">
            <text:p>0.670000000000002</text:p>
          </table:table-cell>
          <table:table-cell table:formula="of:=[.K52]/[.F52]*100" office:value-type="float" office:value="0.7152770364044" calcext:value-type="float">
            <text:p>0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1.5602" calcext:value-type="float">
            <text:p>1.5602</text:p>
          </table:table-cell>
          <table:table-cell office:value-type="float" office:value="93.61" calcext:value-type="float">
            <text:p>93.61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formula="of:=[.H53]-[.F53]" office:value-type="float" office:value="-0.609999999999999" calcext:value-type="float">
            <text:p>-0.609999999999999</text:p>
          </table:table-cell>
          <table:table-cell table:formula="of:=ABS([.J53])" office:value-type="float" office:value="0.609999999999999" calcext:value-type="float">
            <text:p>0.609999999999999</text:p>
          </table:table-cell>
          <table:table-cell table:formula="of:=[.K53]/[.F53]*100" office:value-type="float" office:value="0.651639782074564" calcext:value-type="float">
            <text:p>0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office:value-type="float" office:value="1.5694" calcext:value-type="float">
            <text:p>1.5694</text:p>
          </table:table-cell>
          <table:table-cell office:value-type="float" office:value="94.16" calcext:value-type="float">
            <text:p>94.16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54]-[.F54]" office:value-type="float" office:value="-1.16" calcext:value-type="float">
            <text:p>-1.16</text:p>
          </table:table-cell>
          <table:table-cell table:formula="of:=ABS([.J54])" office:value-type="float" office:value="1.16" calcext:value-type="float">
            <text:p>1.16</text:p>
          </table:table-cell>
          <table:table-cell table:formula="of:=[.K54]/[.F54]*100" office:value-type="float" office:value="1.23194562446899" calcext:value-type="float">
            <text:p>1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1.5739" calcext:value-type="float">
            <text:p>1.5739</text:p>
          </table:table-cell>
          <table:table-cell office:value-type="float" office:value="94.43" calcext:value-type="float">
            <text:p>94.43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55]-[.F55]" office:value-type="float" office:value="-1.43000000000001" calcext:value-type="float">
            <text:p>-1.43000000000001</text:p>
          </table:table-cell>
          <table:table-cell table:formula="of:=ABS([.J55])" office:value-type="float" office:value="1.43000000000001" calcext:value-type="float">
            <text:p>1.43000000000001</text:p>
          </table:table-cell>
          <table:table-cell table:formula="of:=[.K55]/[.F55]*100" office:value-type="float" office:value="1.51434925341524" calcext:value-type="float">
            <text:p>1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1.5592" calcext:value-type="float">
            <text:p>1.5592</text:p>
          </table:table-cell>
          <table:table-cell office:value-type="float" office:value="93.55" calcext:value-type="float">
            <text:p>93.55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table:formula="of:=[.H56]-[.F56]" office:value-type="float" office:value="-0.549999999999997" calcext:value-type="float">
            <text:p>-0.549999999999997</text:p>
          </table:table-cell>
          <table:table-cell table:formula="of:=ABS([.J56])" office:value-type="float" office:value="0.549999999999997" calcext:value-type="float">
            <text:p>0.549999999999997</text:p>
          </table:table-cell>
          <table:table-cell table:formula="of:=[.K56]/[.F56]*100" office:value-type="float" office:value="0.58792089791555" calcext:value-type="float">
            <text:p>0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1.5823" calcext:value-type="float">
            <text:p>1.5823</text:p>
          </table:table-cell>
          <table:table-cell office:value-type="float" office:value="94.94" calcext:value-type="float">
            <text:p>94.94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57]-[.F57]" office:value-type="float" office:value="-1.94" calcext:value-type="float">
            <text:p>-1.94</text:p>
          </table:table-cell>
          <table:table-cell table:formula="of:=ABS([.J57])" office:value-type="float" office:value="1.94" calcext:value-type="float">
            <text:p>1.94</text:p>
          </table:table-cell>
          <table:table-cell table:formula="of:=[.K57]/[.F57]*100" office:value-type="float" office:value="2.04339582894459" calcext:value-type="float">
            <text:p>2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1.5791" calcext:value-type="float">
            <text:p>1.5791</text:p>
          </table:table-cell>
          <table:table-cell office:value-type="float" office:value="94.74" calcext:value-type="float">
            <text:p>94.74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58]-[.F58]" office:value-type="float" office:value="-1.73999999999999" calcext:value-type="float">
            <text:p>-1.73999999999999</text:p>
          </table:table-cell>
          <table:table-cell table:formula="of:=ABS([.J58])" office:value-type="float" office:value="1.73999999999999" calcext:value-type="float">
            <text:p>1.73999999999999</text:p>
          </table:table-cell>
          <table:table-cell table:formula="of:=[.K58]/[.F58]*100" office:value-type="float" office:value="1.83660544648511" calcext:value-type="float">
            <text:p>1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57" calcext:value-type="float">
            <text:p>57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1.562" calcext:value-type="float">
            <text:p>1.562</text:p>
          </table:table-cell>
          <table:table-cell office:value-type="float" office:value="93.72" calcext:value-type="float">
            <text:p>93.72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formula="of:=[.H59]-[.F59]" office:value-type="float" office:value="-0.719999999999999" calcext:value-type="float">
            <text:p>-0.719999999999999</text:p>
          </table:table-cell>
          <table:table-cell table:formula="of:=ABS([.J59])" office:value-type="float" office:value="0.719999999999999" calcext:value-type="float">
            <text:p>0.719999999999999</text:p>
          </table:table-cell>
          <table:table-cell table:formula="of:=[.K59]/[.F59]*100" office:value-type="float" office:value="0.768245838668373" calcext:value-type="float">
            <text:p>0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58" calcext:value-type="float">
            <text:p>58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1.557" calcext:value-type="float">
            <text:p>1.557</text:p>
          </table:table-cell>
          <table:table-cell office:value-type="float" office:value="93.42" calcext:value-type="float">
            <text:p>93.42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60]-[.F60]" office:value-type="float" office:value="-0.420000000000002" calcext:value-type="float">
            <text:p>-0.420000000000002</text:p>
          </table:table-cell>
          <table:table-cell table:formula="of:=ABS([.J60])" office:value-type="float" office:value="0.420000000000002" calcext:value-type="float">
            <text:p>0.420000000000002</text:p>
          </table:table-cell>
          <table:table-cell table:formula="of:=[.K60]/[.F60]*100" office:value-type="float" office:value="0.449582530507388" calcext:value-type="float">
            <text:p>0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59" calcext:value-type="float">
            <text:p>59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1.5348" calcext:value-type="float">
            <text:p>1.5348</text:p>
          </table:table-cell>
          <table:table-cell office:value-type="float" office:value="92.09" calcext:value-type="float">
            <text:p>92.09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61]-[.F61]" office:value-type="float" office:value="0.909999999999997" calcext:value-type="float">
            <text:p>0.909999999999997</text:p>
          </table:table-cell>
          <table:table-cell table:formula="of:=ABS([.J61])" office:value-type="float" office:value="0.909999999999997" calcext:value-type="float">
            <text:p>0.909999999999997</text:p>
          </table:table-cell>
          <table:table-cell table:formula="of:=[.K61]/[.F61]*100" office:value-type="float" office:value="0.988163752850469" calcext:value-type="float">
            <text:p>1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.5133" calcext:value-type="float">
            <text:p>1.5133</text:p>
          </table:table-cell>
          <table:table-cell office:value-type="float" office:value="90.8" calcext:value-type="float">
            <text:p>90.8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62]-[.F62]" office:value-type="float" office:value="2.2" calcext:value-type="float">
            <text:p>2.2</text:p>
          </table:table-cell>
          <table:table-cell table:formula="of:=ABS([.J62])" office:value-type="float" office:value="2.2" calcext:value-type="float">
            <text:p>2.2</text:p>
          </table:table-cell>
          <table:table-cell table:formula="of:=[.K62]/[.F62]*100" office:value-type="float" office:value="2.42290748898679" calcext:value-type="float">
            <text:p>2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1.4875" calcext:value-type="float">
            <text:p>1.4875</text:p>
          </table:table-cell>
          <table:table-cell office:value-type="float" office:value="89.25" calcext:value-type="float">
            <text:p>89.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63]-[.F63]" office:value-type="float" office:value="0.75" calcext:value-type="float">
            <text:p>0.75</text:p>
          </table:table-cell>
          <table:table-cell table:formula="of:=ABS([.J63])" office:value-type="float" office:value="0.75" calcext:value-type="float">
            <text:p>0.75</text:p>
          </table:table-cell>
          <table:table-cell table:formula="of:=[.K63]/[.F63]*100" office:value-type="float" office:value="0.840336134453782" calcext:value-type="float">
            <text:p>0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62" calcext:value-type="float">
            <text:p>62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1.4788" calcext:value-type="float">
            <text:p>1.4788</text:p>
          </table:table-cell>
          <table:table-cell office:value-type="float" office:value="88.73" calcext:value-type="float">
            <text:p>88.73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64]-[.F64]" office:value-type="float" office:value="-1.73" calcext:value-type="float">
            <text:p>-1.73</text:p>
          </table:table-cell>
          <table:table-cell table:formula="of:=ABS([.J64])" office:value-type="float" office:value="1.73" calcext:value-type="float">
            <text:p>1.73</text:p>
          </table:table-cell>
          <table:table-cell table:formula="of:=[.K64]/[.F64]*100" office:value-type="float" office:value="1.94973515158346" calcext:value-type="float">
            <text:p>1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.4723" calcext:value-type="float">
            <text:p>1.4723</text:p>
          </table:table-cell>
          <table:table-cell office:value-type="float" office:value="88.34" calcext:value-type="float">
            <text:p>88.34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65]-[.F65]" office:value-type="float" office:value="-1.34" calcext:value-type="float">
            <text:p>-1.34</text:p>
          </table:table-cell>
          <table:table-cell table:formula="of:=ABS([.J65])" office:value-type="float" office:value="1.34" calcext:value-type="float">
            <text:p>1.34</text:p>
          </table:table-cell>
          <table:table-cell table:formula="of:=[.K65]/[.F65]*100" office:value-type="float" office:value="1.51686665157347" calcext:value-type="float">
            <text:p>1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.4644" calcext:value-type="float">
            <text:p>1.4644</text:p>
          </table:table-cell>
          <table:table-cell office:value-type="float" office:value="87.86" calcext:value-type="float">
            <text:p>87.86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66]-[.F66]" office:value-type="float" office:value="-0.859999999999999" calcext:value-type="float">
            <text:p>-0.859999999999999</text:p>
          </table:table-cell>
          <table:table-cell table:formula="of:=ABS([.J66])" office:value-type="float" office:value="0.859999999999999" calcext:value-type="float">
            <text:p>0.859999999999999</text:p>
          </table:table-cell>
          <table:table-cell table:formula="of:=[.K66]/[.F66]*100" office:value-type="float" office:value="0.978829956749373" calcext:value-type="float">
            <text:p>1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.4804" calcext:value-type="float">
            <text:p>1.4804</text:p>
          </table:table-cell>
          <table:table-cell office:value-type="float" office:value="88.82" calcext:value-type="float">
            <text:p>88.82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H67]-[.F67]" office:value-type="float" office:value="-1.81999999999999" calcext:value-type="float">
            <text:p>-1.81999999999999</text:p>
          </table:table-cell>
          <table:table-cell table:formula="of:=ABS([.J67])" office:value-type="float" office:value="1.81999999999999" calcext:value-type="float">
            <text:p>1.81999999999999</text:p>
          </table:table-cell>
          <table:table-cell table:formula="of:=[.K67]/[.F67]*100" office:value-type="float" office:value="2.0490880432335" calcext:value-type="float">
            <text:p>2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66" calcext:value-type="float">
            <text:p>66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1.462" calcext:value-type="float">
            <text:p>1.462</text:p>
          </table:table-cell>
          <table:table-cell office:value-type="float" office:value="87.72" calcext:value-type="float">
            <text:p>87.72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H68]-[.F68]" office:value-type="float" office:value="-0.719999999999999" calcext:value-type="float">
            <text:p>-0.719999999999999</text:p>
          </table:table-cell>
          <table:table-cell table:formula="of:=ABS([.J68])" office:value-type="float" office:value="0.719999999999999" calcext:value-type="float">
            <text:p>0.719999999999999</text:p>
          </table:table-cell>
          <table:table-cell table:formula="of:=[.K68]/[.F68]*100" office:value-type="float" office:value="0.82079343365253" calcext:value-type="float">
            <text:p>0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1.4521" calcext:value-type="float">
            <text:p>1.4521</text:p>
          </table:table-cell>
          <table:table-cell office:value-type="float" office:value="87.12" calcext:value-type="float">
            <text:p>87.12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69]-[.F69]" office:value-type="float" office:value="-0.120000000000005" calcext:value-type="float">
            <text:p>-0.120000000000005</text:p>
          </table:table-cell>
          <table:table-cell table:formula="of:=ABS([.J69])" office:value-type="float" office:value="0.120000000000005" calcext:value-type="float">
            <text:p>0.120000000000005</text:p>
          </table:table-cell>
          <table:table-cell table:formula="of:=[.K69]/[.F69]*100" office:value-type="float" office:value="0.137741046831961" calcext:value-type="float">
            <text:p>0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68" calcext:value-type="float">
            <text:p>68</text:p>
          </table:table-cell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office:value-type="float" office:value="1.4378" calcext:value-type="float">
            <text:p>1.4378</text:p>
          </table:table-cell>
          <table:table-cell office:value-type="float" office:value="86.27" calcext:value-type="float">
            <text:p>86.27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formula="of:=[.H70]-[.F70]" office:value-type="float" office:value="0.730000000000004" calcext:value-type="float">
            <text:p>0.730000000000004</text:p>
          </table:table-cell>
          <table:table-cell table:formula="of:=ABS([.J70])" office:value-type="float" office:value="0.730000000000004" calcext:value-type="float">
            <text:p>0.730000000000004</text:p>
          </table:table-cell>
          <table:table-cell table:formula="of:=[.K70]/[.F70]*100" office:value-type="float" office:value="0.846180595803876" calcext:value-type="float">
            <text:p>0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1.4247" calcext:value-type="float">
            <text:p>1.4247</text:p>
          </table:table-cell>
          <table:table-cell office:value-type="float" office:value="85.48" calcext:value-type="float">
            <text:p>85.48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formula="of:=[.H71]-[.F71]" office:value-type="float" office:value="-1.48" calcext:value-type="float">
            <text:p>-1.48</text:p>
          </table:table-cell>
          <table:table-cell table:formula="of:=ABS([.J71])" office:value-type="float" office:value="1.48" calcext:value-type="float">
            <text:p>1.48</text:p>
          </table:table-cell>
          <table:table-cell table:formula="of:=[.K71]/[.F71]*100" office:value-type="float" office:value="1.73139915769771" calcext:value-type="float">
            <text:p>1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1.4104" calcext:value-type="float">
            <text:p>1.4104</text:p>
          </table:table-cell>
          <table:table-cell office:value-type="float" office:value="84.63" calcext:value-type="float">
            <text:p>84.63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formula="of:=[.H72]-[.F72]" office:value-type="float" office:value="-18.63" calcext:value-type="float">
            <text:p>-18.63</text:p>
          </table:table-cell>
          <table:table-cell table:formula="of:=ABS([.J72])" office:value-type="float" office:value="18.63" calcext:value-type="float">
            <text:p>18.63</text:p>
          </table:table-cell>
          <table:table-cell table:formula="of:=[.K72]/[.F72]*100" office:value-type="float" office:value="22.0134704005672" calcext:value-type="float">
            <text:p>22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1.3906" calcext:value-type="float">
            <text:p>1.3906</text:p>
          </table:table-cell>
          <table:table-cell office:value-type="float" office:value="83.44" calcext:value-type="float">
            <text:p>83.44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formula="of:=[.H73]-[.F73]" office:value-type="float" office:value="0.560000000000002" calcext:value-type="float">
            <text:p>0.560000000000002</text:p>
          </table:table-cell>
          <table:table-cell table:formula="of:=ABS([.J73])" office:value-type="float" office:value="0.560000000000002" calcext:value-type="float">
            <text:p>0.560000000000002</text:p>
          </table:table-cell>
          <table:table-cell table:formula="of:=[.K73]/[.F73]*100" office:value-type="float" office:value="0.671140939597318" calcext:value-type="float">
            <text:p>0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1.3999" calcext:value-type="float">
            <text:p>1.3999</text:p>
          </table:table-cell>
          <table:table-cell office:value-type="float" office:value="83.99" calcext:value-type="float">
            <text:p>83.99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formula="of:=[.H74]-[.F74]" office:value-type="float" office:value="0.0100000000000051" calcext:value-type="float">
            <text:p>0.0100000000000051</text:p>
          </table:table-cell>
          <table:table-cell table:formula="of:=ABS([.J74])" office:value-type="float" office:value="0.0100000000000051" calcext:value-type="float">
            <text:p>0.0100000000000051</text:p>
          </table:table-cell>
          <table:table-cell table:formula="of:=[.K74]/[.F74]*100" office:value-type="float" office:value="0.0119061793070665" calcext:value-type="float">
            <text:p>0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1.3906" calcext:value-type="float">
            <text:p>1.3906</text:p>
          </table:table-cell>
          <table:table-cell office:value-type="float" office:value="83.43" calcext:value-type="float">
            <text:p>83.43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5]-[.F75]" office:value-type="float" office:value="0.569999999999993" calcext:value-type="float">
            <text:p>0.569999999999993</text:p>
          </table:table-cell>
          <table:table-cell table:formula="of:=ABS([.J75])" office:value-type="float" office:value="0.569999999999993" calcext:value-type="float">
            <text:p>0.569999999999993</text:p>
          </table:table-cell>
          <table:table-cell table:formula="of:=[.K75]/[.F75]*100" office:value-type="float" office:value="0.683207479323976" calcext:value-type="float">
            <text:p>0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1.3943" calcext:value-type="float">
            <text:p>1.3943</text:p>
          </table:table-cell>
          <table:table-cell office:value-type="float" office:value="83.66" calcext:value-type="float">
            <text:p>83.6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6]-[.F76]" office:value-type="float" office:value="0.340000000000003" calcext:value-type="float">
            <text:p>0.340000000000003</text:p>
          </table:table-cell>
          <table:table-cell table:formula="of:=ABS([.J76])" office:value-type="float" office:value="0.340000000000003" calcext:value-type="float">
            <text:p>0.340000000000003</text:p>
          </table:table-cell>
          <table:table-cell table:formula="of:=[.K76]/[.F76]*100" office:value-type="float" office:value="0.406406885010762" calcext:value-type="float">
            <text:p>0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.4011" calcext:value-type="float">
            <text:p>1.4011</text:p>
          </table:table-cell>
          <table:table-cell office:value-type="float" office:value="84.07" calcext:value-type="float">
            <text:p>84.0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7]-[.F77]" office:value-type="float" office:value="-0.0699999999999932" calcext:value-type="float">
            <text:p>-0.0699999999999932</text:p>
          </table:table-cell>
          <table:table-cell table:formula="of:=ABS([.J77])" office:value-type="float" office:value="0.0699999999999932" calcext:value-type="float">
            <text:p>0.0699999999999932</text:p>
          </table:table-cell>
          <table:table-cell table:formula="of:=[.K77]/[.F77]*100" office:value-type="float" office:value="0.083263946711066" calcext:value-type="float">
            <text:p>0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76" calcext:value-type="float">
            <text:p>76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1.3917" calcext:value-type="float">
            <text:p>1.3917</text:p>
          </table:table-cell>
          <table:table-cell office:value-type="float" office:value="83.5" calcext:value-type="float">
            <text:p>83.5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8]-[.F78]" office:value-type="float" office:value="0.5" calcext:value-type="float">
            <text:p>0.5</text:p>
          </table:table-cell>
          <table:table-cell table:formula="of:=ABS([.J78])" office:value-type="float" office:value="0.5" calcext:value-type="float">
            <text:p>0.5</text:p>
          </table:table-cell>
          <table:table-cell table:formula="of:=[.K78]/[.F78]*100" office:value-type="float" office:value="0.598802395209581" calcext:value-type="float">
            <text:p>0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77" calcext:value-type="float">
            <text:p>7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1.4213" calcext:value-type="float">
            <text:p>1.4213</text:p>
          </table:table-cell>
          <table:table-cell office:value-type="float" office:value="85.28" calcext:value-type="float">
            <text:p>85.2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9]-[.F79]" office:value-type="float" office:value="-1.28" calcext:value-type="float">
            <text:p>-1.28</text:p>
          </table:table-cell>
          <table:table-cell table:formula="of:=ABS([.J79])" office:value-type="float" office:value="1.28" calcext:value-type="float">
            <text:p>1.28</text:p>
          </table:table-cell>
          <table:table-cell table:formula="of:=[.K79]/[.F79]*100" office:value-type="float" office:value="1.50093808630394" calcext:value-type="float">
            <text:p>1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1.454" calcext:value-type="float">
            <text:p>1.454</text:p>
          </table:table-cell>
          <table:table-cell office:value-type="float" office:value="87.24" calcext:value-type="float">
            <text:p>87.24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table:formula="of:=[.H80]-[.F80]" office:value-type="float" office:value="-3.24" calcext:value-type="float">
            <text:p>-3.24</text:p>
          </table:table-cell>
          <table:table-cell table:formula="of:=ABS([.J80])" office:value-type="float" office:value="3.24" calcext:value-type="float">
            <text:p>3.24</text:p>
          </table:table-cell>
          <table:table-cell table:formula="of:=[.K80]/[.F80]*100" office:value-type="float" office:value="3.71389270976616" calcext:value-type="float">
            <text:p>3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79" calcext:value-type="float">
            <text:p>79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1.4675" calcext:value-type="float">
            <text:p>1.4675</text:p>
          </table:table-cell>
          <table:table-cell office:value-type="float" office:value="88.05" calcext:value-type="float">
            <text:p>88.0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81]-[.F81]" office:value-type="float" office:value="-13.05" calcext:value-type="float">
            <text:p>-13.05</text:p>
          </table:table-cell>
          <table:table-cell table:formula="of:=ABS([.J81])" office:value-type="float" office:value="13.05" calcext:value-type="float">
            <text:p>13.05</text:p>
          </table:table-cell>
          <table:table-cell table:formula="of:=[.K81]/[.F81]*100" office:value-type="float" office:value="14.8211243611584" calcext:value-type="float">
            <text:p>14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415" calcext:value-type="float">
            <text:p>415</text:p>
          </table:table-cell>
          <table:table-cell office:value-type="float" office:value="1.4896" calcext:value-type="float">
            <text:p>1.4896</text:p>
          </table:table-cell>
          <table:table-cell office:value-type="float" office:value="89.37" calcext:value-type="float">
            <text:p>89.37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H82]-[.F82]" office:value-type="float" office:value="-23.37" calcext:value-type="float">
            <text:p>-23.37</text:p>
          </table:table-cell>
          <table:table-cell table:formula="of:=ABS([.J82])" office:value-type="float" office:value="23.37" calcext:value-type="float">
            <text:p>23.37</text:p>
          </table:table-cell>
          <table:table-cell table:formula="of:=[.K82]/[.F82]*100" office:value-type="float" office:value="26.1497146693521" calcext:value-type="float">
            <text:p>26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1.483" calcext:value-type="float">
            <text:p>1.483</text:p>
          </table:table-cell>
          <table:table-cell office:value-type="float" office:value="88.98" calcext:value-type="float">
            <text:p>88.98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83]-[.F83]" office:value-type="float" office:value="-25.98" calcext:value-type="float">
            <text:p>-25.98</text:p>
          </table:table-cell>
          <table:table-cell table:formula="of:=ABS([.J83])" office:value-type="float" office:value="25.98" calcext:value-type="float">
            <text:p>25.98</text:p>
          </table:table-cell>
          <table:table-cell table:formula="of:=[.K83]/[.F83]*100" office:value-type="float" office:value="29.1975724881996" calcext:value-type="float">
            <text:p>29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1</text:p>
          </table:table-cell>
          <table:table-cell office:value-type="float" office:value="82" calcext:value-type="float">
            <text:p>82</text:p>
          </table:table-cell>
          <table:table-cell office:value-type="float" office:value="405" calcext:value-type="float">
            <text:p>405</text:p>
          </table:table-cell>
          <table:table-cell office:value-type="float" office:value="425" calcext:value-type="float">
            <text:p>425</text:p>
          </table:table-cell>
          <table:table-cell office:value-type="float" office:value="1.4767" calcext:value-type="float">
            <text:p>1.4767</text:p>
          </table:table-cell>
          <table:table-cell office:value-type="float" office:value="88.6" calcext:value-type="float">
            <text:p>88.6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formula="of:=[.H84]-[.F84]" office:value-type="float" office:value="-25.6" calcext:value-type="float">
            <text:p>-25.6</text:p>
          </table:table-cell>
          <table:table-cell table:formula="of:=ABS([.J84])" office:value-type="float" office:value="25.6" calcext:value-type="float">
            <text:p>25.6</text:p>
          </table:table-cell>
          <table:table-cell table:formula="of:=[.K84]/[.F84]*100" office:value-type="float" office:value="28.8939051918736" calcext:value-type="float">
            <text:p>28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3567" calcext:value-type="float">
            <text:p>1.3567</text:p>
          </table:table-cell>
          <table:table-cell office:value-type="float" office:value="81.4" calcext:value-type="float">
            <text:p>81.4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table:formula="of:=[.H85]-[.F85]" office:value-type="float" office:value="-6.40000000000001" calcext:value-type="float">
            <text:p>-6.40000000000001</text:p>
          </table:table-cell>
          <table:table-cell table:formula="of:=ABS([.J85])" office:value-type="float" office:value="6.40000000000001" calcext:value-type="float">
            <text:p>6.40000000000001</text:p>
          </table:table-cell>
          <table:table-cell table:formula="of:=[.K85]/[.F85]*100" office:value-type="float" office:value="7.86240786240787" calcext:value-type="float">
            <text:p>7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2876" calcext:value-type="float">
            <text:p>1.2876</text:p>
          </table:table-cell>
          <table:table-cell office:value-type="float" office:value="77.25" calcext:value-type="float">
            <text:p>77.2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86]-[.F86]" office:value-type="float" office:value="-2.25" calcext:value-type="float">
            <text:p>-2.25</text:p>
          </table:table-cell>
          <table:table-cell table:formula="of:=ABS([.J86])" office:value-type="float" office:value="2.25" calcext:value-type="float">
            <text:p>2.25</text:p>
          </table:table-cell>
          <table:table-cell table:formula="of:=[.K86]/[.F86]*100" office:value-type="float" office:value="2.9126213592233" calcext:value-type="float">
            <text:p>2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2489" calcext:value-type="float">
            <text:p>1.2489</text:p>
          </table:table-cell>
          <table:table-cell office:value-type="float" office:value="74.94" calcext:value-type="float">
            <text:p>74.94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table:formula="of:=[.H87]-[.F87]" office:value-type="float" office:value="0.0600000000000023" calcext:value-type="float">
            <text:p>0.0600000000000023</text:p>
          </table:table-cell>
          <table:table-cell table:formula="of:=ABS([.J87])" office:value-type="float" office:value="0.0600000000000023" calcext:value-type="float">
            <text:p>0.0600000000000023</text:p>
          </table:table-cell>
          <table:table-cell table:formula="of:=[.K87]/[.F87]*100" office:value-type="float" office:value="0.0800640512409958" calcext:value-type="float">
            <text:p>0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2365" calcext:value-type="float">
            <text:p>1.2365</text:p>
          </table:table-cell>
          <table:table-cell office:value-type="float" office:value="74.19" calcext:value-type="float">
            <text:p>74.1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88]-[.F88]" office:value-type="float" office:value="-2.19" calcext:value-type="float">
            <text:p>-2.19</text:p>
          </table:table-cell>
          <table:table-cell table:formula="of:=ABS([.J88])" office:value-type="float" office:value="2.19" calcext:value-type="float">
            <text:p>2.19</text:p>
          </table:table-cell>
          <table:table-cell table:formula="of:=[.K88]/[.F88]*100" office:value-type="float" office:value="2.95188030731904" calcext:value-type="float">
            <text:p>3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.198" calcext:value-type="float">
            <text:p>1.198</text:p>
          </table:table-cell>
          <table:table-cell office:value-type="float" office:value="71.88" calcext:value-type="float">
            <text:p>71.8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89]-[.F89]" office:value-type="float" office:value="0.120000000000005" calcext:value-type="float">
            <text:p>0.120000000000005</text:p>
          </table:table-cell>
          <table:table-cell table:formula="of:=ABS([.J89])" office:value-type="float" office:value="0.120000000000005" calcext:value-type="float">
            <text:p>0.120000000000005</text:p>
          </table:table-cell>
          <table:table-cell table:formula="of:=[.K89]/[.F89]*100" office:value-type="float" office:value="0.166944908180307" calcext:value-type="float">
            <text:p>0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1879" calcext:value-type="float">
            <text:p>1.1879</text:p>
          </table:table-cell>
          <table:table-cell office:value-type="float" office:value="71.28" calcext:value-type="float">
            <text:p>71.2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90]-[.F90]" office:value-type="float" office:value="0.719999999999999" calcext:value-type="float">
            <text:p>0.719999999999999</text:p>
          </table:table-cell>
          <table:table-cell table:formula="of:=ABS([.J90])" office:value-type="float" office:value="0.719999999999999" calcext:value-type="float">
            <text:p>0.719999999999999</text:p>
          </table:table-cell>
          <table:table-cell table:formula="of:=[.K90]/[.F90]*100" office:value-type="float" office:value="1.01010101010101" calcext:value-type="float">
            <text:p>1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1738" calcext:value-type="float">
            <text:p>1.1738</text:p>
          </table:table-cell>
          <table:table-cell office:value-type="float" office:value="70.43" calcext:value-type="float">
            <text:p>70.43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91]-[.F91]" office:value-type="float" office:value="-1.43000000000001" calcext:value-type="float">
            <text:p>-1.43000000000001</text:p>
          </table:table-cell>
          <table:table-cell table:formula="of:=ABS([.J91])" office:value-type="float" office:value="1.43000000000001" calcext:value-type="float">
            <text:p>1.43000000000001</text:p>
          </table:table-cell>
          <table:table-cell table:formula="of:=[.K91]/[.F91]*100" office:value-type="float" office:value="2.03038477921341" calcext:value-type="float">
            <text:p>2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.1734" calcext:value-type="float">
            <text:p>1.1734</text:p>
          </table:table-cell>
          <table:table-cell office:value-type="float" office:value="70.4" calcext:value-type="float">
            <text:p>70.4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92]-[.F92]" office:value-type="float" office:value="-1.40000000000001" calcext:value-type="float">
            <text:p>-1.40000000000001</text:p>
          </table:table-cell>
          <table:table-cell table:formula="of:=ABS([.J92])" office:value-type="float" office:value="1.40000000000001" calcext:value-type="float">
            <text:p>1.40000000000001</text:p>
          </table:table-cell>
          <table:table-cell table:formula="of:=[.K92]/[.F92]*100" office:value-type="float" office:value="1.98863636363637" calcext:value-type="float">
            <text:p>2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.183" calcext:value-type="float">
            <text:p>1.183</text:p>
          </table:table-cell>
          <table:table-cell office:value-type="float" office:value="70.98" calcext:value-type="float">
            <text:p>70.98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93]-[.F93]" office:value-type="float" office:value="-1.98" calcext:value-type="float">
            <text:p>-1.98</text:p>
          </table:table-cell>
          <table:table-cell table:formula="of:=ABS([.J93])" office:value-type="float" office:value="1.98" calcext:value-type="float">
            <text:p>1.98</text:p>
          </table:table-cell>
          <table:table-cell table:formula="of:=[.K93]/[.F93]*100" office:value-type="float" office:value="2.78951817413356" calcext:value-type="float">
            <text:p>2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.1864" calcext:value-type="float">
            <text:p>1.1864</text:p>
          </table:table-cell>
          <table:table-cell office:value-type="float" office:value="71.18" calcext:value-type="float">
            <text:p>71.18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formula="of:=[.H94]-[.F94]" office:value-type="float" office:value="0.819999999999993" calcext:value-type="float">
            <text:p>0.819999999999993</text:p>
          </table:table-cell>
          <table:table-cell table:formula="of:=ABS([.J94])" office:value-type="float" office:value="0.819999999999993" calcext:value-type="float">
            <text:p>0.819999999999993</text:p>
          </table:table-cell>
          <table:table-cell table:formula="of:=[.K94]/[.F94]*100" office:value-type="float" office:value="1.15200899128968" calcext:value-type="float">
            <text:p>1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1935" calcext:value-type="float">
            <text:p>1.1935</text:p>
          </table:table-cell>
          <table:table-cell office:value-type="float" office:value="71.61" calcext:value-type="float">
            <text:p>71.6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95]-[.F95]" office:value-type="float" office:value="0.390000000000001" calcext:value-type="float">
            <text:p>0.390000000000001</text:p>
          </table:table-cell>
          <table:table-cell table:formula="of:=ABS([.J95])" office:value-type="float" office:value="0.390000000000001" calcext:value-type="float">
            <text:p>0.390000000000001</text:p>
          </table:table-cell>
          <table:table-cell table:formula="of:=[.K95]/[.F95]*100" office:value-type="float" office:value="0.544616673648933" calcext:value-type="float">
            <text:p>0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.1958" calcext:value-type="float">
            <text:p>1.1958</text:p>
          </table:table-cell>
          <table:table-cell office:value-type="float" office:value="71.75" calcext:value-type="float">
            <text:p>71.7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96]-[.F96]" office:value-type="float" office:value="0.25" calcext:value-type="float">
            <text:p>0.25</text:p>
          </table:table-cell>
          <table:table-cell table:formula="of:=ABS([.J96])" office:value-type="float" office:value="0.25" calcext:value-type="float">
            <text:p>0.25</text:p>
          </table:table-cell>
          <table:table-cell table:formula="of:=[.K96]/[.F96]*100" office:value-type="float" office:value="0.348432055749129" calcext:value-type="float">
            <text:p>0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2031" calcext:value-type="float">
            <text:p>1.2031</text:p>
          </table:table-cell>
          <table:table-cell office:value-type="float" office:value="72.19" calcext:value-type="float">
            <text:p>72.1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97]-[.F97]" office:value-type="float" office:value="-0.189999999999998" calcext:value-type="float">
            <text:p>-0.189999999999998</text:p>
          </table:table-cell>
          <table:table-cell table:formula="of:=ABS([.J97])" office:value-type="float" office:value="0.189999999999998" calcext:value-type="float">
            <text:p>0.189999999999998</text:p>
          </table:table-cell>
          <table:table-cell table:formula="of:=[.K97]/[.F97]*100" office:value-type="float" office:value="0.263194348247677" calcext:value-type="float">
            <text:p>0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.2297" calcext:value-type="float">
            <text:p>1.2297</text:p>
          </table:table-cell>
          <table:table-cell office:value-type="float" office:value="73.78" calcext:value-type="float">
            <text:p>73.7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98]-[.F98]" office:value-type="float" office:value="-1.78" calcext:value-type="float">
            <text:p>-1.78</text:p>
          </table:table-cell>
          <table:table-cell table:formula="of:=ABS([.J98])" office:value-type="float" office:value="1.78" calcext:value-type="float">
            <text:p>1.78</text:p>
          </table:table-cell>
          <table:table-cell table:formula="of:=[.K98]/[.F98]*100" office:value-type="float" office:value="2.41257793439957" calcext:value-type="float">
            <text:p>2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.241" calcext:value-type="float">
            <text:p>1.241</text:p>
          </table:table-cell>
          <table:table-cell office:value-type="float" office:value="74.46" calcext:value-type="float">
            <text:p>74.46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99]-[.F99]" office:value-type="float" office:value="0.540000000000006" calcext:value-type="float">
            <text:p>0.540000000000006</text:p>
          </table:table-cell>
          <table:table-cell table:formula="of:=ABS([.J99])" office:value-type="float" office:value="0.540000000000006" calcext:value-type="float">
            <text:p>0.540000000000006</text:p>
          </table:table-cell>
          <table:table-cell table:formula="of:=[.K99]/[.F99]*100" office:value-type="float" office:value="0.725221595487519" calcext:value-type="float">
            <text:p>0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.2563" calcext:value-type="float">
            <text:p>1.2563</text:p>
          </table:table-cell>
          <table:table-cell office:value-type="float" office:value="75.38" calcext:value-type="float">
            <text:p>75.3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100]-[.F100]" office:value-type="float" office:value="-0.379999999999995" calcext:value-type="float">
            <text:p>-0.379999999999995</text:p>
          </table:table-cell>
          <table:table-cell table:formula="of:=ABS([.J100])" office:value-type="float" office:value="0.379999999999995" calcext:value-type="float">
            <text:p>0.379999999999995</text:p>
          </table:table-cell>
          <table:table-cell table:formula="of:=[.K100]/[.F100]*100" office:value-type="float" office:value="0.504112496683464" calcext:value-type="float">
            <text:p>0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2612" calcext:value-type="float">
            <text:p>1.2612</text:p>
          </table:table-cell>
          <table:table-cell office:value-type="float" office:value="75.67" calcext:value-type="float">
            <text:p>75.67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101]-[.F101]" office:value-type="float" office:value="-0.670000000000002" calcext:value-type="float">
            <text:p>-0.670000000000002</text:p>
          </table:table-cell>
          <table:table-cell table:formula="of:=ABS([.J101])" office:value-type="float" office:value="0.670000000000002" calcext:value-type="float">
            <text:p>0.670000000000002</text:p>
          </table:table-cell>
          <table:table-cell table:formula="of:=[.K101]/[.F101]*100" office:value-type="float" office:value="0.885423549623367" calcext:value-type="float">
            <text:p>0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.248" calcext:value-type="float">
            <text:p>1.248</text:p>
          </table:table-cell>
          <table:table-cell office:value-type="float" office:value="74.88" calcext:value-type="float">
            <text:p>74.8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102]-[.F102]" office:value-type="float" office:value="0.120000000000005" calcext:value-type="float">
            <text:p>0.120000000000005</text:p>
          </table:table-cell>
          <table:table-cell table:formula="of:=ABS([.J102])" office:value-type="float" office:value="0.120000000000005" calcext:value-type="float">
            <text:p>0.120000000000005</text:p>
          </table:table-cell>
          <table:table-cell table:formula="of:=[.K102]/[.F102]*100" office:value-type="float" office:value="0.160256410256416" calcext:value-type="float">
            <text:p>0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.2551" calcext:value-type="float">
            <text:p>1.2551</text:p>
          </table:table-cell>
          <table:table-cell office:value-type="float" office:value="75.31" calcext:value-type="float">
            <text:p>75.31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[.H103]-[.F103]" office:value-type="float" office:value="-0.310000000000002" calcext:value-type="float">
            <text:p>-0.310000000000002</text:p>
          </table:table-cell>
          <table:table-cell table:formula="of:=ABS([.J103])" office:value-type="float" office:value="0.310000000000002" calcext:value-type="float">
            <text:p>0.310000000000002</text:p>
          </table:table-cell>
          <table:table-cell table:formula="of:=[.K103]/[.F103]*100" office:value-type="float" office:value="0.411631921391584" calcext:value-type="float">
            <text:p>0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.3115" calcext:value-type="float">
            <text:p>1.3115</text:p>
          </table:table-cell>
          <table:table-cell office:value-type="float" office:value="78.69" calcext:value-type="float">
            <text:p>78.69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[.H104]-[.F104]" office:value-type="float" office:value="-6.69" calcext:value-type="float">
            <text:p>-6.69</text:p>
          </table:table-cell>
          <table:table-cell table:formula="of:=ABS([.J104])" office:value-type="float" office:value="6.69" calcext:value-type="float">
            <text:p>6.69</text:p>
          </table:table-cell>
          <table:table-cell table:formula="of:=[.K104]/[.F104]*100" office:value-type="float" office:value="8.50171559283263" calcext:value-type="float">
            <text:p>8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.3256" calcext:value-type="float">
            <text:p>1.3256</text:p>
          </table:table-cell>
          <table:table-cell office:value-type="float" office:value="79.53" calcext:value-type="float">
            <text:p>79.53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formula="of:=[.H105]-[.F105]" office:value-type="float" office:value="-7.53" calcext:value-type="float">
            <text:p>-7.53</text:p>
          </table:table-cell>
          <table:table-cell table:formula="of:=ABS([.J105])" office:value-type="float" office:value="7.53" calcext:value-type="float">
            <text:p>7.53</text:p>
          </table:table-cell>
          <table:table-cell table:formula="of:=[.K105]/[.F105]*100" office:value-type="float" office:value="9.46812523576009" calcext:value-type="float">
            <text:p>9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.3258" calcext:value-type="float">
            <text:p>1.3258</text:p>
          </table:table-cell>
          <table:table-cell office:value-type="float" office:value="79.55" calcext:value-type="float">
            <text:p>79.55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formula="of:=[.H106]-[.F106]" office:value-type="float" office:value="-4.55" calcext:value-type="float">
            <text:p>-4.55</text:p>
          </table:table-cell>
          <table:table-cell table:formula="of:=ABS([.J106])" office:value-type="float" office:value="4.55" calcext:value-type="float">
            <text:p>4.55</text:p>
          </table:table-cell>
          <table:table-cell table:formula="of:=[.K106]/[.F106]*100" office:value-type="float" office:value="5.71967316153362" calcext:value-type="float">
            <text:p>5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.334" calcext:value-type="float">
            <text:p>1.334</text:p>
          </table:table-cell>
          <table:table-cell office:value-type="float" office:value="80.04" calcext:value-type="float">
            <text:p>80.0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107]-[.F107]" office:value-type="float" office:value="-5.04000000000001" calcext:value-type="float">
            <text:p>-5.04000000000001</text:p>
          </table:table-cell>
          <table:table-cell table:formula="of:=ABS([.J107])" office:value-type="float" office:value="5.04000000000001" calcext:value-type="float">
            <text:p>5.04000000000001</text:p>
          </table:table-cell>
          <table:table-cell table:formula="of:=[.K107]/[.F107]*100" office:value-type="float" office:value="6.2968515742129" calcext:value-type="float">
            <text:p>6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.2697" calcext:value-type="float">
            <text:p>1.2697</text:p>
          </table:table-cell>
          <table:table-cell office:value-type="float" office:value="76.18" calcext:value-type="float">
            <text:p>76.1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108]-[.F108]" office:value-type="float" office:value="-1.18000000000001" calcext:value-type="float">
            <text:p>-1.18000000000001</text:p>
          </table:table-cell>
          <table:table-cell table:formula="of:=ABS([.J108])" office:value-type="float" office:value="1.18000000000001" calcext:value-type="float">
            <text:p>1.18000000000001</text:p>
          </table:table-cell>
          <table:table-cell table:formula="of:=[.K108]/[.F108]*100" office:value-type="float" office:value="1.54896298241009" calcext:value-type="float">
            <text:p>1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.2585" calcext:value-type="float">
            <text:p>1.2585</text:p>
          </table:table-cell>
          <table:table-cell office:value-type="float" office:value="75.51" calcext:value-type="float">
            <text:p>75.5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109]-[.F109]" office:value-type="float" office:value="-0.510000000000005" calcext:value-type="float">
            <text:p>-0.510000000000005</text:p>
          </table:table-cell>
          <table:table-cell table:formula="of:=ABS([.J109])" office:value-type="float" office:value="0.510000000000005" calcext:value-type="float">
            <text:p>0.510000000000005</text:p>
          </table:table-cell>
          <table:table-cell table:formula="of:=[.K109]/[.F109]*100" office:value-type="float" office:value="0.67540723083036" calcext:value-type="float">
            <text:p>0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.258" calcext:value-type="float">
            <text:p>1.258</text:p>
          </table:table-cell>
          <table:table-cell office:value-type="float" office:value="75.48" calcext:value-type="float">
            <text:p>75.4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110]-[.F110]" office:value-type="float" office:value="-0.480000000000004" calcext:value-type="float">
            <text:p>-0.480000000000004</text:p>
          </table:table-cell>
          <table:table-cell table:formula="of:=ABS([.J110])" office:value-type="float" office:value="0.480000000000004" calcext:value-type="float">
            <text:p>0.480000000000004</text:p>
          </table:table-cell>
          <table:table-cell table:formula="of:=[.K110]/[.F110]*100" office:value-type="float" office:value="0.635930047694759" calcext:value-type="float">
            <text:p>0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.2357" calcext:value-type="float">
            <text:p>1.2357</text:p>
          </table:table-cell>
          <table:table-cell office:value-type="float" office:value="74.14" calcext:value-type="float">
            <text:p>74.14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[.H111]-[.F111]" office:value-type="float" office:value="0.859999999999999" calcext:value-type="float">
            <text:p>0.859999999999999</text:p>
          </table:table-cell>
          <table:table-cell table:formula="of:=ABS([.J111])" office:value-type="float" office:value="0.859999999999999" calcext:value-type="float">
            <text:p>0.859999999999999</text:p>
          </table:table-cell>
          <table:table-cell table:formula="of:=[.K111]/[.F111]*100" office:value-type="float" office:value="1.15996762881036" calcext:value-type="float">
            <text:p>1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.238" calcext:value-type="float">
            <text:p>1.238</text:p>
          </table:table-cell>
          <table:table-cell office:value-type="float" office:value="74.28" calcext:value-type="float">
            <text:p>74.28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formula="of:=[.H112]-[.F112]" office:value-type="float" office:value="-17.28" calcext:value-type="float">
            <text:p>-17.28</text:p>
          </table:table-cell>
          <table:table-cell table:formula="of:=ABS([.J112])" office:value-type="float" office:value="17.28" calcext:value-type="float">
            <text:p>17.28</text:p>
          </table:table-cell>
          <table:table-cell table:formula="of:=[.K112]/[.F112]*100" office:value-type="float" office:value="23.2633279483037" calcext:value-type="float">
            <text:p>23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.2261" calcext:value-type="float">
            <text:p>1.2261</text:p>
          </table:table-cell>
          <table:table-cell office:value-type="float" office:value="73.56" calcext:value-type="float">
            <text:p>73.56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formula="of:=[.H113]-[.F113]" office:value-type="float" office:value="-16.56" calcext:value-type="float">
            <text:p>-16.56</text:p>
          </table:table-cell>
          <table:table-cell table:formula="of:=ABS([.J113])" office:value-type="float" office:value="16.56" calcext:value-type="float">
            <text:p>16.56</text:p>
          </table:table-cell>
          <table:table-cell table:formula="of:=[.K113]/[.F113]*100" office:value-type="float" office:value="22.5122349102773" calcext:value-type="float">
            <text:p>22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.2294" calcext:value-type="float">
            <text:p>1.2294</text:p>
          </table:table-cell>
          <table:table-cell office:value-type="float" office:value="73.76" calcext:value-type="float">
            <text:p>73.76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[.H114]-[.F114]" office:value-type="float" office:value="-19.76" calcext:value-type="float">
            <text:p>-19.76</text:p>
          </table:table-cell>
          <table:table-cell table:formula="of:=ABS([.J114])" office:value-type="float" office:value="19.76" calcext:value-type="float">
            <text:p>19.76</text:p>
          </table:table-cell>
          <table:table-cell table:formula="of:=[.K114]/[.F114]*100" office:value-type="float" office:value="26.7895878524946" calcext:value-type="float">
            <text:p>26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.241" calcext:value-type="float">
            <text:p>1.241</text:p>
          </table:table-cell>
          <table:table-cell office:value-type="float" office:value="74.46" calcext:value-type="float">
            <text:p>74.4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115]-[.F115]" office:value-type="float" office:value="-17.46" calcext:value-type="float">
            <text:p>-17.46</text:p>
          </table:table-cell>
          <table:table-cell table:formula="of:=ABS([.J115])" office:value-type="float" office:value="17.46" calcext:value-type="float">
            <text:p>17.46</text:p>
          </table:table-cell>
          <table:table-cell table:formula="of:=[.K115]/[.F115]*100" office:value-type="float" office:value="23.4488315874295" calcext:value-type="float">
            <text:p>23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.2356" calcext:value-type="float">
            <text:p>1.2356</text:p>
          </table:table-cell>
          <table:table-cell office:value-type="float" office:value="74.14" calcext:value-type="float">
            <text:p>74.14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formula="of:=[.H116]-[.F116]" office:value-type="float" office:value="-17.14" calcext:value-type="float">
            <text:p>-17.14</text:p>
          </table:table-cell>
          <table:table-cell table:formula="of:=ABS([.J116])" office:value-type="float" office:value="17.14" calcext:value-type="float">
            <text:p>17.14</text:p>
          </table:table-cell>
          <table:table-cell table:formula="of:=[.K116]/[.F116]*100" office:value-type="float" office:value="23.1184246021041" calcext:value-type="float">
            <text:p>23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.258" calcext:value-type="float">
            <text:p>1.258</text:p>
          </table:table-cell>
          <table:table-cell office:value-type="float" office:value="75.48" calcext:value-type="float">
            <text:p>75.4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117]-[.F117]" office:value-type="float" office:value="-18.48" calcext:value-type="float">
            <text:p>-18.48</text:p>
          </table:table-cell>
          <table:table-cell table:formula="of:=ABS([.J117])" office:value-type="float" office:value="18.48" calcext:value-type="float">
            <text:p>18.48</text:p>
          </table:table-cell>
          <table:table-cell table:formula="of:=[.K117]/[.F117]*100" office:value-type="float" office:value="24.483306836248" calcext:value-type="float">
            <text:p>24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.2534" calcext:value-type="float">
            <text:p>1.2534</text:p>
          </table:table-cell>
          <table:table-cell office:value-type="float" office:value="75.21" calcext:value-type="float">
            <text:p>75.2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formula="of:=[.H118]-[.F118]" office:value-type="float" office:value="-15.21" calcext:value-type="float">
            <text:p>-15.21</text:p>
          </table:table-cell>
          <table:table-cell table:formula="of:=ABS([.J118])" office:value-type="float" office:value="15.21" calcext:value-type="float">
            <text:p>15.21</text:p>
          </table:table-cell>
          <table:table-cell table:formula="of:=[.K118]/[.F118]*100" office:value-type="float" office:value="20.2233745512565" calcext:value-type="float">
            <text:p>20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.2604" calcext:value-type="float">
            <text:p>1.2604</text:p>
          </table:table-cell>
          <table:table-cell office:value-type="float" office:value="75.62" calcext:value-type="float">
            <text:p>75.6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formula="of:=[.H119]-[.F119]" office:value-type="float" office:value="-15.62" calcext:value-type="float">
            <text:p>-15.62</text:p>
          </table:table-cell>
          <table:table-cell table:formula="of:=ABS([.J119])" office:value-type="float" office:value="15.62" calcext:value-type="float">
            <text:p>15.62</text:p>
          </table:table-cell>
          <table:table-cell table:formula="of:=[.K119]/[.F119]*100" office:value-type="float" office:value="20.6559111346205" calcext:value-type="float">
            <text:p>20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.2727" calcext:value-type="float">
            <text:p>1.2727</text:p>
          </table:table-cell>
          <table:table-cell office:value-type="float" office:value="76.36" calcext:value-type="float">
            <text:p>76.36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H120]-[.F120]" office:value-type="float" office:value="-13.36" calcext:value-type="float">
            <text:p>-13.36</text:p>
          </table:table-cell>
          <table:table-cell table:formula="of:=ABS([.J120])" office:value-type="float" office:value="13.36" calcext:value-type="float">
            <text:p>13.36</text:p>
          </table:table-cell>
          <table:table-cell table:formula="of:=[.K120]/[.F120]*100" office:value-type="float" office:value="17.4960712414877" calcext:value-type="float">
            <text:p>17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.2602" calcext:value-type="float">
            <text:p>1.2602</text:p>
          </table:table-cell>
          <table:table-cell office:value-type="float" office:value="75.61" calcext:value-type="float">
            <text:p>75.61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H121]-[.F121]" office:value-type="float" office:value="-12.61" calcext:value-type="float">
            <text:p>-12.61</text:p>
          </table:table-cell>
          <table:table-cell table:formula="of:=ABS([.J121])" office:value-type="float" office:value="12.61" calcext:value-type="float">
            <text:p>12.61</text:p>
          </table:table-cell>
          <table:table-cell table:formula="of:=[.K121]/[.F121]*100" office:value-type="float" office:value="16.6776881364899" calcext:value-type="float">
            <text:p>16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.2626" calcext:value-type="float">
            <text:p>1.2626</text:p>
          </table:table-cell>
          <table:table-cell office:value-type="float" office:value="75.76" calcext:value-type="float">
            <text:p>75.76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122]-[.F122]" office:value-type="float" office:value="-12.76" calcext:value-type="float">
            <text:p>-12.76</text:p>
          </table:table-cell>
          <table:table-cell table:formula="of:=ABS([.J122])" office:value-type="float" office:value="12.76" calcext:value-type="float">
            <text:p>12.76</text:p>
          </table:table-cell>
          <table:table-cell table:formula="of:=[.K122]/[.F122]*100" office:value-type="float" office:value="16.8426610348469" calcext:value-type="float">
            <text:p>16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.259" calcext:value-type="float">
            <text:p>1.259</text:p>
          </table:table-cell>
          <table:table-cell office:value-type="float" office:value="75.54" calcext:value-type="float">
            <text:p>75.5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123]-[.F123]" office:value-type="float" office:value="-3.54000000000001" calcext:value-type="float">
            <text:p>-3.54000000000001</text:p>
          </table:table-cell>
          <table:table-cell table:formula="of:=ABS([.J123])" office:value-type="float" office:value="3.54000000000001" calcext:value-type="float">
            <text:p>3.54000000000001</text:p>
          </table:table-cell>
          <table:table-cell table:formula="of:=[.K123]/[.F123]*100" office:value-type="float" office:value="4.68625893566323" calcext:value-type="float">
            <text:p>4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.2677" calcext:value-type="float">
            <text:p>1.2677</text:p>
          </table:table-cell>
          <table:table-cell office:value-type="float" office:value="76.06" calcext:value-type="float">
            <text:p>76.06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124]-[.F124]" office:value-type="float" office:value="-1.06" calcext:value-type="float">
            <text:p>-1.06</text:p>
          </table:table-cell>
          <table:table-cell table:formula="of:=ABS([.J124])" office:value-type="float" office:value="1.06" calcext:value-type="float">
            <text:p>1.06</text:p>
          </table:table-cell>
          <table:table-cell table:formula="of:=[.K124]/[.F124]*100" office:value-type="float" office:value="1.3936366026821" calcext:value-type="float">
            <text:p>1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1.2842" calcext:value-type="float">
            <text:p>1.2842</text:p>
          </table:table-cell>
          <table:table-cell office:value-type="float" office:value="77.05" calcext:value-type="float">
            <text:p>77.05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125]-[.F125]" office:value-type="float" office:value="3.95" calcext:value-type="float">
            <text:p>3.95</text:p>
          </table:table-cell>
          <table:table-cell table:formula="of:=ABS([.J125])" office:value-type="float" office:value="3.95" calcext:value-type="float">
            <text:p>3.95</text:p>
          </table:table-cell>
          <table:table-cell table:formula="of:=[.K125]/[.F125]*100" office:value-type="float" office:value="5.12654120700844" calcext:value-type="float">
            <text:p>5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1.2966" calcext:value-type="float">
            <text:p>1.2966</text:p>
          </table:table-cell>
          <table:table-cell office:value-type="float" office:value="77.8" calcext:value-type="float">
            <text:p>77.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126]-[.F126]" office:value-type="float" office:value="3.2" calcext:value-type="float">
            <text:p>3.2</text:p>
          </table:table-cell>
          <table:table-cell table:formula="of:=ABS([.J126])" office:value-type="float" office:value="3.2" calcext:value-type="float">
            <text:p>3.2</text:p>
          </table:table-cell>
          <table:table-cell table:formula="of:=[.K126]/[.F126]*100" office:value-type="float" office:value="4.11311053984576" calcext:value-type="float">
            <text:p>4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1.3051" calcext:value-type="float">
            <text:p>1.3051</text:p>
          </table:table-cell>
          <table:table-cell office:value-type="float" office:value="78.31" calcext:value-type="float">
            <text:p>78.31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127]-[.F127]" office:value-type="float" office:value="2.69" calcext:value-type="float">
            <text:p>2.69</text:p>
          </table:table-cell>
          <table:table-cell table:formula="of:=ABS([.J127])" office:value-type="float" office:value="2.69" calcext:value-type="float">
            <text:p>2.69</text:p>
          </table:table-cell>
          <table:table-cell table:formula="of:=[.K127]/[.F127]*100" office:value-type="float" office:value="3.43506576427021" calcext:value-type="float">
            <text:p>3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.3039" calcext:value-type="float">
            <text:p>1.3039</text:p>
          </table:table-cell>
          <table:table-cell office:value-type="float" office:value="78.24" calcext:value-type="float">
            <text:p>78.24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formula="of:=[.H128]-[.F128]" office:value-type="float" office:value="2.76000000000001" calcext:value-type="float">
            <text:p>2.76000000000001</text:p>
          </table:table-cell>
          <table:table-cell table:formula="of:=ABS([.J128])" office:value-type="float" office:value="2.76000000000001" calcext:value-type="float">
            <text:p>2.76000000000001</text:p>
          </table:table-cell>
          <table:table-cell table:formula="of:=[.K128]/[.F128]*100" office:value-type="float" office:value="3.5276073619632" calcext:value-type="float">
            <text:p>3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1.2937" calcext:value-type="float">
            <text:p>1.2937</text:p>
          </table:table-cell>
          <table:table-cell office:value-type="float" office:value="77.62" calcext:value-type="float">
            <text:p>77.62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formula="of:=[.H129]-[.F129]" office:value-type="float" office:value="3.38" calcext:value-type="float">
            <text:p>3.38</text:p>
          </table:table-cell>
          <table:table-cell table:formula="of:=ABS([.J129])" office:value-type="float" office:value="3.38" calcext:value-type="float">
            <text:p>3.38</text:p>
          </table:table-cell>
          <table:table-cell table:formula="of:=[.K129]/[.F129]*100" office:value-type="float" office:value="4.35454779695954" calcext:value-type="float">
            <text:p>4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.2947" calcext:value-type="float">
            <text:p>1.2947</text:p>
          </table:table-cell>
          <table:table-cell office:value-type="float" office:value="77.68" calcext:value-type="float">
            <text:p>77.68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[.H130]-[.F130]" office:value-type="float" office:value="6.31999999999999" calcext:value-type="float">
            <text:p>6.31999999999999</text:p>
          </table:table-cell>
          <table:table-cell table:formula="of:=ABS([.J130])" office:value-type="float" office:value="6.31999999999999" calcext:value-type="float">
            <text:p>6.31999999999999</text:p>
          </table:table-cell>
          <table:table-cell table:formula="of:=[.K130]/[.F130]*100" office:value-type="float" office:value="8.13594232749742" calcext:value-type="float">
            <text:p>8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.2895" calcext:value-type="float">
            <text:p>1.2895</text:p>
          </table:table-cell>
          <table:table-cell office:value-type="float" office:value="77.37" calcext:value-type="float">
            <text:p>77.37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H131]-[.F131]" office:value-type="float" office:value="6.63" calcext:value-type="float">
            <text:p>6.63</text:p>
          </table:table-cell>
          <table:table-cell table:formula="of:=ABS([.J131])" office:value-type="float" office:value="6.63" calcext:value-type="float">
            <text:p>6.63</text:p>
          </table:table-cell>
          <table:table-cell table:formula="of:=[.K131]/[.F131]*100" office:value-type="float" office:value="8.56921287320666" calcext:value-type="float">
            <text:p>8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.2881" calcext:value-type="float">
            <text:p>1.2881</text:p>
          </table:table-cell>
          <table:table-cell office:value-type="float" office:value="77.29" calcext:value-type="float">
            <text:p>77.29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[.H132]-[.F132]" office:value-type="float" office:value="3.70999999999999" calcext:value-type="float">
            <text:p>3.70999999999999</text:p>
          </table:table-cell>
          <table:table-cell table:formula="of:=ABS([.J132])" office:value-type="float" office:value="3.70999999999999" calcext:value-type="float">
            <text:p>3.70999999999999</text:p>
          </table:table-cell>
          <table:table-cell table:formula="of:=[.K132]/[.F132]*100" office:value-type="float" office:value="4.80010350627506" calcext:value-type="float">
            <text:p>4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1.305" calcext:value-type="float">
            <text:p>1.305</text:p>
          </table:table-cell>
          <table:table-cell office:value-type="float" office:value="78.3" calcext:value-type="float">
            <text:p>78.3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formula="of:=[.H133]-[.F133]" office:value-type="float" office:value="-15.3" calcext:value-type="float">
            <text:p>-15.3</text:p>
          </table:table-cell>
          <table:table-cell table:formula="of:=ABS([.J133])" office:value-type="float" office:value="15.3" calcext:value-type="float">
            <text:p>15.3</text:p>
          </table:table-cell>
          <table:table-cell table:formula="of:=[.K133]/[.F133]*100" office:value-type="float" office:value="19.5402298850575" calcext:value-type="float">
            <text:p>19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1.3204" calcext:value-type="float">
            <text:p>1.3204</text:p>
          </table:table-cell>
          <table:table-cell office:value-type="float" office:value="79.22" calcext:value-type="float">
            <text:p>79.22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H134]-[.F134]" office:value-type="float" office:value="-16.22" calcext:value-type="float">
            <text:p>-16.22</text:p>
          </table:table-cell>
          <table:table-cell table:formula="of:=ABS([.J134])" office:value-type="float" office:value="16.22" calcext:value-type="float">
            <text:p>16.22</text:p>
          </table:table-cell>
          <table:table-cell table:formula="of:=[.K134]/[.F134]*100" office:value-type="float" office:value="20.4746276192881" calcext:value-type="float">
            <text:p>20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1.3319" calcext:value-type="float">
            <text:p>1.3319</text:p>
          </table:table-cell>
          <table:table-cell office:value-type="float" office:value="79.92" calcext:value-type="float">
            <text:p>79.9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135]-[.F135]" office:value-type="float" office:value="-16.92" calcext:value-type="float">
            <text:p>-16.92</text:p>
          </table:table-cell>
          <table:table-cell table:formula="of:=ABS([.J135])" office:value-type="float" office:value="16.92" calcext:value-type="float">
            <text:p>16.92</text:p>
          </table:table-cell>
          <table:table-cell table:formula="of:=[.K135]/[.F135]*100" office:value-type="float" office:value="21.1711711711712" calcext:value-type="float">
            <text:p>21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office:value-type="float" office:value="1.3302" calcext:value-type="float">
            <text:p>1.3302</text:p>
          </table:table-cell>
          <table:table-cell office:value-type="float" office:value="79.81" calcext:value-type="float">
            <text:p>79.81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[.H136]-[.F136]" office:value-type="float" office:value="1.19" calcext:value-type="float">
            <text:p>1.19</text:p>
          </table:table-cell>
          <table:table-cell table:formula="of:=ABS([.J136])" office:value-type="float" office:value="1.19" calcext:value-type="float">
            <text:p>1.19</text:p>
          </table:table-cell>
          <table:table-cell table:formula="of:=[.K136]/[.F136]*100" office:value-type="float" office:value="1.4910412229044" calcext:value-type="float">
            <text:p>1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1.3278" calcext:value-type="float">
            <text:p>1.3278</text:p>
          </table:table-cell>
          <table:table-cell office:value-type="float" office:value="79.67" calcext:value-type="float">
            <text:p>79.67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[.H137]-[.F137]" office:value-type="float" office:value="1.33" calcext:value-type="float">
            <text:p>1.33</text:p>
          </table:table-cell>
          <table:table-cell table:formula="of:=ABS([.J137])" office:value-type="float" office:value="1.33" calcext:value-type="float">
            <text:p>1.33</text:p>
          </table:table-cell>
          <table:table-cell table:formula="of:=[.K137]/[.F137]*100" office:value-type="float" office:value="1.66938621814987" calcext:value-type="float">
            <text:p>1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1.3222" calcext:value-type="float">
            <text:p>1.3222</text:p>
          </table:table-cell>
          <table:table-cell office:value-type="float" office:value="79.33" calcext:value-type="float">
            <text:p>79.3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138]-[.F138]" office:value-type="float" office:value="1.67" calcext:value-type="float">
            <text:p>1.67</text:p>
          </table:table-cell>
          <table:table-cell table:formula="of:=ABS([.J138])" office:value-type="float" office:value="1.67" calcext:value-type="float">
            <text:p>1.67</text:p>
          </table:table-cell>
          <table:table-cell table:formula="of:=[.K138]/[.F138]*100" office:value-type="float" office:value="2.10513046766671" calcext:value-type="float">
            <text:p>2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1.3307" calcext:value-type="float">
            <text:p>1.3307</text:p>
          </table:table-cell>
          <table:table-cell office:value-type="float" office:value="79.84" calcext:value-type="float">
            <text:p>79.84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139]-[.F139]" office:value-type="float" office:value="1.16" calcext:value-type="float">
            <text:p>1.16</text:p>
          </table:table-cell>
          <table:table-cell table:formula="of:=ABS([.J139])" office:value-type="float" office:value="1.16" calcext:value-type="float">
            <text:p>1.16</text:p>
          </table:table-cell>
          <table:table-cell table:formula="of:=[.K139]/[.F139]*100" office:value-type="float" office:value="1.45290581162324" calcext:value-type="float">
            <text:p>1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1.3455" calcext:value-type="float">
            <text:p>1.3455</text:p>
          </table:table-cell>
          <table:table-cell office:value-type="float" office:value="80.73" calcext:value-type="float">
            <text:p>80.7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140]-[.F140]" office:value-type="float" office:value="0.269999999999996" calcext:value-type="float">
            <text:p>0.269999999999996</text:p>
          </table:table-cell>
          <table:table-cell table:formula="of:=ABS([.J140])" office:value-type="float" office:value="0.269999999999996" calcext:value-type="float">
            <text:p>0.269999999999996</text:p>
          </table:table-cell>
          <table:table-cell table:formula="of:=[.K140]/[.F140]*100" office:value-type="float" office:value="0.334448160535112" calcext:value-type="float">
            <text:p>0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57" calcext:value-type="float">
            <text:p>57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1.3487" calcext:value-type="float">
            <text:p>1.3487</text:p>
          </table:table-cell>
          <table:table-cell office:value-type="float" office:value="80.92" calcext:value-type="float">
            <text:p>80.92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141]-[.F141]" office:value-type="float" office:value="0.0799999999999983" calcext:value-type="float">
            <text:p>0.0799999999999983</text:p>
          </table:table-cell>
          <table:table-cell table:formula="of:=ABS([.J141])" office:value-type="float" office:value="0.0799999999999983" calcext:value-type="float">
            <text:p>0.0799999999999983</text:p>
          </table:table-cell>
          <table:table-cell table:formula="of:=[.K141]/[.F141]*100" office:value-type="float" office:value="0.0988630746416192" calcext:value-type="float">
            <text:p>0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58" calcext:value-type="float">
            <text:p>58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1.3526" calcext:value-type="float">
            <text:p>1.3526</text:p>
          </table:table-cell>
          <table:table-cell office:value-type="float" office:value="81.15" calcext:value-type="float">
            <text:p>81.15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formula="of:=[.H142]-[.F142]" office:value-type="float" office:value="-0.150000000000006" calcext:value-type="float">
            <text:p>-0.150000000000006</text:p>
          </table:table-cell>
          <table:table-cell table:formula="of:=ABS([.J142])" office:value-type="float" office:value="0.150000000000006" calcext:value-type="float">
            <text:p>0.150000000000006</text:p>
          </table:table-cell>
          <table:table-cell table:formula="of:=[.K142]/[.F142]*100" office:value-type="float" office:value="0.18484288354899" calcext:value-type="float">
            <text:p>0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59" calcext:value-type="float">
            <text:p>59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formula="of:=[.H143]-[.F143]" office:value-type="float" office:value="0" calcext:value-type="float">
            <text:p>0</text:p>
          </table:table-cell>
          <table:table-cell table:formula="of:=ABS([.J143])" office:value-type="float" office:value="0" calcext:value-type="float">
            <text:p>0</text:p>
          </table:table-cell>
          <table:table-cell table:formula="of:=[.K143]/[.F143]*100" office:value-type="float" office:value="0" calcext:value-type="float">
            <text:p>0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.3496" calcext:value-type="float">
            <text:p>1.3496</text:p>
          </table:table-cell>
          <table:table-cell office:value-type="float" office:value="80.98" calcext:value-type="float">
            <text:p>80.98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table:formula="of:=[.H144]-[.F144]" office:value-type="float" office:value="-23.98" calcext:value-type="float">
            <text:p>-23.98</text:p>
          </table:table-cell>
          <table:table-cell table:formula="of:=ABS([.J144])" office:value-type="float" office:value="23.98" calcext:value-type="float">
            <text:p>23.98</text:p>
          </table:table-cell>
          <table:table-cell table:formula="of:=[.K144]/[.F144]*100" office:value-type="float" office:value="29.6122499382564" calcext:value-type="float">
            <text:p>29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1.3387" calcext:value-type="float">
            <text:p>1.3387</text:p>
          </table:table-cell>
          <table:table-cell office:value-type="float" office:value="80.32" calcext:value-type="float">
            <text:p>80.3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table:formula="of:=[.H145]-[.F145]" office:value-type="float" office:value="-20.32" calcext:value-type="float">
            <text:p>-20.32</text:p>
          </table:table-cell>
          <table:table-cell table:formula="of:=ABS([.J145])" office:value-type="float" office:value="20.32" calcext:value-type="float">
            <text:p>20.32</text:p>
          </table:table-cell>
          <table:table-cell table:formula="of:=[.K145]/[.F145]*100" office:value-type="float" office:value="25.2988047808765" calcext:value-type="float">
            <text:p>25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62" calcext:value-type="float">
            <text:p>62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1.3305" calcext:value-type="float">
            <text:p>1.3305</text:p>
          </table:table-cell>
          <table:table-cell office:value-type="float" office:value="79.83" calcext:value-type="float">
            <text:p>79.83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formula="of:=[.H146]-[.F146]" office:value-type="float" office:value="-1.83" calcext:value-type="float">
            <text:p>-1.83</text:p>
          </table:table-cell>
          <table:table-cell table:formula="of:=ABS([.J146])" office:value-type="float" office:value="1.83" calcext:value-type="float">
            <text:p>1.83</text:p>
          </table:table-cell>
          <table:table-cell table:formula="of:=[.K146]/[.F146]*100" office:value-type="float" office:value="2.2923712889891" calcext:value-type="float">
            <text:p>2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.3298" calcext:value-type="float">
            <text:p>1.3298</text:p>
          </table:table-cell>
          <table:table-cell office:value-type="float" office:value="79.79" calcext:value-type="float">
            <text:p>79.79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formula="of:=[.H147]-[.F147]" office:value-type="float" office:value="-1.79000000000001" calcext:value-type="float">
            <text:p>-1.79000000000001</text:p>
          </table:table-cell>
          <table:table-cell table:formula="of:=ABS([.J147])" office:value-type="float" office:value="1.79000000000001" calcext:value-type="float">
            <text:p>1.79000000000001</text:p>
          </table:table-cell>
          <table:table-cell table:formula="of:=[.K147]/[.F147]*100" office:value-type="float" office:value="2.24338889585162" calcext:value-type="float">
            <text:p>2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.3236" calcext:value-type="float">
            <text:p>1.3236</text:p>
          </table:table-cell>
          <table:table-cell office:value-type="float" office:value="79.41" calcext:value-type="float">
            <text:p>79.4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148]-[.F148]" office:value-type="float" office:value="-1.41" calcext:value-type="float">
            <text:p>-1.41</text:p>
          </table:table-cell>
          <table:table-cell table:formula="of:=ABS([.J148])" office:value-type="float" office:value="1.41" calcext:value-type="float">
            <text:p>1.41</text:p>
          </table:table-cell>
          <table:table-cell table:formula="of:=[.K148]/[.F148]*100" office:value-type="float" office:value="1.77559501322251" calcext:value-type="float">
            <text:p>1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.3237" calcext:value-type="float">
            <text:p>1.3237</text:p>
          </table:table-cell>
          <table:table-cell office:value-type="float" office:value="79.42" calcext:value-type="float">
            <text:p>79.42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[.H149]-[.F149]" office:value-type="float" office:value="-1.42" calcext:value-type="float">
            <text:p>-1.42</text:p>
          </table:table-cell>
          <table:table-cell table:formula="of:=ABS([.J149])" office:value-type="float" office:value="1.42" calcext:value-type="float">
            <text:p>1.42</text:p>
          </table:table-cell>
          <table:table-cell table:formula="of:=[.K149]/[.F149]*100" office:value-type="float" office:value="1.78796272979099" calcext:value-type="float">
            <text:p>1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66" calcext:value-type="float">
            <text:p>66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1.3176" calcext:value-type="float">
            <text:p>1.3176</text:p>
          </table:table-cell>
          <table:table-cell office:value-type="float" office:value="79.05" calcext:value-type="float">
            <text:p>79.0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150]-[.F150]" office:value-type="float" office:value="-1.05" calcext:value-type="float">
            <text:p>-1.05</text:p>
          </table:table-cell>
          <table:table-cell table:formula="of:=ABS([.J150])" office:value-type="float" office:value="1.05" calcext:value-type="float">
            <text:p>1.05</text:p>
          </table:table-cell>
          <table:table-cell table:formula="of:=[.K150]/[.F150]*100" office:value-type="float" office:value="1.32827324478178" calcext:value-type="float">
            <text:p>1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1.3109" calcext:value-type="float">
            <text:p>1.3109</text:p>
          </table:table-cell>
          <table:table-cell office:value-type="float" office:value="78.66" calcext:value-type="float">
            <text:p>78.66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151]-[.F151]" office:value-type="float" office:value="-0.659999999999997" calcext:value-type="float">
            <text:p>-0.659999999999997</text:p>
          </table:table-cell>
          <table:table-cell table:formula="of:=ABS([.J151])" office:value-type="float" office:value="0.659999999999997" calcext:value-type="float">
            <text:p>0.659999999999997</text:p>
          </table:table-cell>
          <table:table-cell table:formula="of:=[.K151]/[.F151]*100" office:value-type="float" office:value="0.839054157131956" calcext:value-type="float">
            <text:p>0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68" calcext:value-type="float">
            <text:p>68</text:p>
          </table:table-cell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office:value-type="float" office:value="1.2982" calcext:value-type="float">
            <text:p>1.2982</text:p>
          </table:table-cell>
          <table:table-cell office:value-type="float" office:value="77.89" calcext:value-type="float">
            <text:p>77.89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152]-[.F152]" office:value-type="float" office:value="0.109999999999999" calcext:value-type="float">
            <text:p>0.109999999999999</text:p>
          </table:table-cell>
          <table:table-cell table:formula="of:=ABS([.J152])" office:value-type="float" office:value="0.109999999999999" calcext:value-type="float">
            <text:p>0.109999999999999</text:p>
          </table:table-cell>
          <table:table-cell table:formula="of:=[.K152]/[.F152]*100" office:value-type="float" office:value="0.141224804211066" calcext:value-type="float">
            <text:p>0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1.3036" calcext:value-type="float">
            <text:p>1.3036</text:p>
          </table:table-cell>
          <table:table-cell office:value-type="float" office:value="78.22" calcext:value-type="float">
            <text:p>78.2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153]-[.F153]" office:value-type="float" office:value="-0.219999999999999" calcext:value-type="float">
            <text:p>-0.219999999999999</text:p>
          </table:table-cell>
          <table:table-cell table:formula="of:=ABS([.J153])" office:value-type="float" office:value="0.219999999999999" calcext:value-type="float">
            <text:p>0.219999999999999</text:p>
          </table:table-cell>
          <table:table-cell table:formula="of:=[.K153]/[.F153]*100" office:value-type="float" office:value="0.281257990283813" calcext:value-type="float">
            <text:p>0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1.3162" calcext:value-type="float">
            <text:p>1.3162</text:p>
          </table:table-cell>
          <table:table-cell office:value-type="float" office:value="78.97" calcext:value-type="float">
            <text:p>78.97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154]-[.F154]" office:value-type="float" office:value="-0.969999999999999" calcext:value-type="float">
            <text:p>-0.969999999999999</text:p>
          </table:table-cell>
          <table:table-cell table:formula="of:=ABS([.J154])" office:value-type="float" office:value="0.969999999999999" calcext:value-type="float">
            <text:p>0.969999999999999</text:p>
          </table:table-cell>
          <table:table-cell table:formula="of:=[.K154]/[.F154]*100" office:value-type="float" office:value="1.22831454982905" calcext:value-type="float">
            <text:p>1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1.3302" calcext:value-type="float">
            <text:p>1.3302</text:p>
          </table:table-cell>
          <table:table-cell office:value-type="float" office:value="79.81" calcext:value-type="float">
            <text:p>79.81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formula="of:=[.H155]-[.F155]" office:value-type="float" office:value="-1.81" calcext:value-type="float">
            <text:p>-1.81</text:p>
          </table:table-cell>
          <table:table-cell table:formula="of:=ABS([.J155])" office:value-type="float" office:value="1.81" calcext:value-type="float">
            <text:p>1.81</text:p>
          </table:table-cell>
          <table:table-cell table:formula="of:=[.K155]/[.F155]*100" office:value-type="float" office:value="2.26788622979577" calcext:value-type="float">
            <text:p>2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1.337" calcext:value-type="float">
            <text:p>1.337</text:p>
          </table:table-cell>
          <table:table-cell office:value-type="float" office:value="80.22" calcext:value-type="float">
            <text:p>80.22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formula="of:=[.H156]-[.F156]" office:value-type="float" office:value="-2.22" calcext:value-type="float">
            <text:p>-2.22</text:p>
          </table:table-cell>
          <table:table-cell table:formula="of:=ABS([.J156])" office:value-type="float" office:value="2.22" calcext:value-type="float">
            <text:p>2.22</text:p>
          </table:table-cell>
          <table:table-cell table:formula="of:=[.K156]/[.F156]*100" office:value-type="float" office:value="2.76738967838444" calcext:value-type="float">
            <text:p>2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1.3438" calcext:value-type="float">
            <text:p>1.3438</text:p>
          </table:table-cell>
          <table:table-cell office:value-type="float" office:value="80.63" calcext:value-type="float">
            <text:p>80.63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157]-[.F157]" office:value-type="float" office:value="-2.63" calcext:value-type="float">
            <text:p>-2.63</text:p>
          </table:table-cell>
          <table:table-cell table:formula="of:=ABS([.J157])" office:value-type="float" office:value="2.63" calcext:value-type="float">
            <text:p>2.63</text:p>
          </table:table-cell>
          <table:table-cell table:formula="of:=[.K157]/[.F157]*100" office:value-type="float" office:value="3.26181322088552" calcext:value-type="float">
            <text:p>3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1.3302" calcext:value-type="float">
            <text:p>1.3302</text:p>
          </table:table-cell>
          <table:table-cell office:value-type="float" office:value="79.81" calcext:value-type="float">
            <text:p>79.81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[.H158]-[.F158]" office:value-type="float" office:value="-1.81" calcext:value-type="float">
            <text:p>-1.81</text:p>
          </table:table-cell>
          <table:table-cell table:formula="of:=ABS([.J158])" office:value-type="float" office:value="1.81" calcext:value-type="float">
            <text:p>1.81</text:p>
          </table:table-cell>
          <table:table-cell table:formula="of:=[.K158]/[.F158]*100" office:value-type="float" office:value="2.26788622979577" calcext:value-type="float">
            <text:p>2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.3141" calcext:value-type="float">
            <text:p>1.3141</text:p>
          </table:table-cell>
          <table:table-cell office:value-type="float" office:value="78.84" calcext:value-type="float">
            <text:p>78.84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formula="of:=[.H159]-[.F159]" office:value-type="float" office:value="-0.840000000000003" calcext:value-type="float">
            <text:p>-0.840000000000003</text:p>
          </table:table-cell>
          <table:table-cell table:formula="of:=ABS([.J159])" office:value-type="float" office:value="0.840000000000003" calcext:value-type="float">
            <text:p>0.840000000000003</text:p>
          </table:table-cell>
          <table:table-cell table:formula="of:=[.K159]/[.F159]*100" office:value-type="float" office:value="1.06544901065449" calcext:value-type="float">
            <text:p>1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76" calcext:value-type="float">
            <text:p>76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1.3255" calcext:value-type="float">
            <text:p>1.3255</text:p>
          </table:table-cell>
          <table:table-cell office:value-type="float" office:value="79.53" calcext:value-type="float">
            <text:p>79.53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160]-[.F160]" office:value-type="float" office:value="-1.53" calcext:value-type="float">
            <text:p>-1.53</text:p>
          </table:table-cell>
          <table:table-cell table:formula="of:=ABS([.J160])" office:value-type="float" office:value="1.53" calcext:value-type="float">
            <text:p>1.53</text:p>
          </table:table-cell>
          <table:table-cell table:formula="of:=[.K160]/[.F160]*100" office:value-type="float" office:value="1.9238023387401" calcext:value-type="float">
            <text:p>1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77" calcext:value-type="float">
            <text:p>7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1.3363" calcext:value-type="float">
            <text:p>1.3363</text:p>
          </table:table-cell>
          <table:table-cell office:value-type="float" office:value="80.18" calcext:value-type="float">
            <text:p>80.18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table:formula="of:=[.H161]-[.F161]" office:value-type="float" office:value="-23.18" calcext:value-type="float">
            <text:p>-23.18</text:p>
          </table:table-cell>
          <table:table-cell table:formula="of:=ABS([.J161])" office:value-type="float" office:value="23.18" calcext:value-type="float">
            <text:p>23.18</text:p>
          </table:table-cell>
          <table:table-cell table:formula="of:=[.K161]/[.F161]*100" office:value-type="float" office:value="28.9099526066351" calcext:value-type="float">
            <text:p>28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1.3547" calcext:value-type="float">
            <text:p>1.3547</text:p>
          </table:table-cell>
          <table:table-cell office:value-type="float" office:value="81.28" calcext:value-type="float">
            <text:p>81.2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162]-[.F162]" office:value-type="float" office:value="-24.28" calcext:value-type="float">
            <text:p>-24.28</text:p>
          </table:table-cell>
          <table:table-cell table:formula="of:=ABS([.J162])" office:value-type="float" office:value="24.28" calcext:value-type="float">
            <text:p>24.28</text:p>
          </table:table-cell>
          <table:table-cell table:formula="of:=[.K162]/[.F162]*100" office:value-type="float" office:value="29.8720472440945" calcext:value-type="float">
            <text:p>29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79" calcext:value-type="float">
            <text:p>79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1.379" calcext:value-type="float">
            <text:p>1.379</text:p>
          </table:table-cell>
          <table:table-cell office:value-type="float" office:value="82.74" calcext:value-type="float">
            <text:p>82.7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163]-[.F163]" office:value-type="float" office:value="-25.74" calcext:value-type="float">
            <text:p>-25.74</text:p>
          </table:table-cell>
          <table:table-cell table:formula="of:=ABS([.J163])" office:value-type="float" office:value="25.74" calcext:value-type="float">
            <text:p>25.74</text:p>
          </table:table-cell>
          <table:table-cell table:formula="of:=[.K163]/[.F163]*100" office:value-type="float" office:value="31.1094996374184" calcext:value-type="float">
            <text:p>31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415" calcext:value-type="float">
            <text:p>415</text:p>
          </table:table-cell>
          <table:table-cell office:value-type="float" office:value="1.3897" calcext:value-type="float">
            <text:p>1.3897</text:p>
          </table:table-cell>
          <table:table-cell office:value-type="float" office:value="83.38" calcext:value-type="float">
            <text:p>83.38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formula="of:=[.H164]-[.F164]" office:value-type="float" office:value="-26.38" calcext:value-type="float">
            <text:p>-26.38</text:p>
          </table:table-cell>
          <table:table-cell table:formula="of:=ABS([.J164])" office:value-type="float" office:value="26.38" calcext:value-type="float">
            <text:p>26.38</text:p>
          </table:table-cell>
          <table:table-cell table:formula="of:=[.K164]/[.F164]*100" office:value-type="float" office:value="31.6382825617654" calcext:value-type="float">
            <text:p>31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1.3904" calcext:value-type="float">
            <text:p>1.3904</text:p>
          </table:table-cell>
          <table:table-cell office:value-type="float" office:value="83.42" calcext:value-type="float">
            <text:p>83.4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165]-[.F165]" office:value-type="float" office:value="-29.42" calcext:value-type="float">
            <text:p>-29.42</text:p>
          </table:table-cell>
          <table:table-cell table:formula="of:=ABS([.J165])" office:value-type="float" office:value="29.42" calcext:value-type="float">
            <text:p>29.42</text:p>
          </table:table-cell>
          <table:table-cell table:formula="of:=[.K165]/[.F165]*100" office:value-type="float" office:value="35.2673219851355" calcext:value-type="float">
            <text:p>35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2</text:p>
          </table:table-cell>
          <table:table-cell office:value-type="float" office:value="82" calcext:value-type="float">
            <text:p>82</text:p>
          </table:table-cell>
          <table:table-cell office:value-type="float" office:value="405" calcext:value-type="float">
            <text:p>405</text:p>
          </table:table-cell>
          <table:table-cell office:value-type="float" office:value="425" calcext:value-type="float">
            <text:p>425</text:p>
          </table:table-cell>
          <table:table-cell office:value-type="float" office:value="1.3934" calcext:value-type="float">
            <text:p>1.3934</text:p>
          </table:table-cell>
          <table:table-cell office:value-type="float" office:value="83.61" calcext:value-type="float">
            <text:p>83.61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table:formula="of:=[.H166]-[.F166]" office:value-type="float" office:value="-29.61" calcext:value-type="float">
            <text:p>-29.61</text:p>
          </table:table-cell>
          <table:table-cell table:formula="of:=ABS([.J166])" office:value-type="float" office:value="29.61" calcext:value-type="float">
            <text:p>29.61</text:p>
          </table:table-cell>
          <table:table-cell table:formula="of:=[.K166]/[.F166]*100" office:value-type="float" office:value="35.4144241119483" calcext:value-type="float">
            <text:p>35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3241" calcext:value-type="float">
            <text:p>1.3241</text:p>
          </table:table-cell>
          <table:table-cell office:value-type="float" office:value="79.45" calcext:value-type="float">
            <text:p>79.45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table:formula="of:=[.H167]-[.F167]" office:value-type="float" office:value="-1.45" calcext:value-type="float">
            <text:p>-1.45</text:p>
          </table:table-cell>
          <table:table-cell table:formula="of:=ABS([.J167])" office:value-type="float" office:value="1.45" calcext:value-type="float">
            <text:p>1.45</text:p>
          </table:table-cell>
          <table:table-cell table:formula="of:=[.K167]/[.F167]*100" office:value-type="float" office:value="1.82504719949654" calcext:value-type="float">
            <text:p>1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3133" calcext:value-type="float">
            <text:p>1.3133</text:p>
          </table:table-cell>
          <table:table-cell office:value-type="float" office:value="78.8" calcext:value-type="float">
            <text:p>78.8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formula="of:=[.H168]-[.F168]" office:value-type="float" office:value="-0.799999999999997" calcext:value-type="float">
            <text:p>-0.799999999999997</text:p>
          </table:table-cell>
          <table:table-cell table:formula="of:=ABS([.J168])" office:value-type="float" office:value="0.799999999999997" calcext:value-type="float">
            <text:p>0.799999999999997</text:p>
          </table:table-cell>
          <table:table-cell table:formula="of:=[.K168]/[.F168]*100" office:value-type="float" office:value="1.01522842639594" calcext:value-type="float">
            <text:p>1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302" calcext:value-type="float">
            <text:p>1.302</text:p>
          </table:table-cell>
          <table:table-cell office:value-type="float" office:value="78.12" calcext:value-type="float">
            <text:p>78.1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169]-[.F169]" office:value-type="float" office:value="-0.120000000000005" calcext:value-type="float">
            <text:p>-0.120000000000005</text:p>
          </table:table-cell>
          <table:table-cell table:formula="of:=ABS([.J169])" office:value-type="float" office:value="0.120000000000005" calcext:value-type="float">
            <text:p>0.120000000000005</text:p>
          </table:table-cell>
          <table:table-cell table:formula="of:=[.K169]/[.F169]*100" office:value-type="float" office:value="0.153609831029192" calcext:value-type="float">
            <text:p>0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2963" calcext:value-type="float">
            <text:p>1.2963</text:p>
          </table:table-cell>
          <table:table-cell office:value-type="float" office:value="77.78" calcext:value-type="float">
            <text:p>77.7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170]-[.F170]" office:value-type="float" office:value="-2.78" calcext:value-type="float">
            <text:p>-2.78</text:p>
          </table:table-cell>
          <table:table-cell table:formula="of:=ABS([.J170])" office:value-type="float" office:value="2.78" calcext:value-type="float">
            <text:p>2.78</text:p>
          </table:table-cell>
          <table:table-cell table:formula="of:=[.K170]/[.F170]*100" office:value-type="float" office:value="3.57418359475444" calcext:value-type="float">
            <text:p>3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.2965" calcext:value-type="float">
            <text:p>1.2965</text:p>
          </table:table-cell>
          <table:table-cell office:value-type="float" office:value="77.79" calcext:value-type="float">
            <text:p>77.79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171]-[.F171]" office:value-type="float" office:value="-8.79000000000001" calcext:value-type="float">
            <text:p>-8.79000000000001</text:p>
          </table:table-cell>
          <table:table-cell table:formula="of:=ABS([.J171])" office:value-type="float" office:value="8.79000000000001" calcext:value-type="float">
            <text:p>8.79000000000001</text:p>
          </table:table-cell>
          <table:table-cell table:formula="of:=[.K171]/[.F171]*100" office:value-type="float" office:value="11.2996529116853" calcext:value-type="float">
            <text:p>11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2902" calcext:value-type="float">
            <text:p>1.2902</text:p>
          </table:table-cell>
          <table:table-cell office:value-type="float" office:value="77.41" calcext:value-type="float">
            <text:p>77.41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formula="of:=[.H172]-[.F172]" office:value-type="float" office:value="-8.41" calcext:value-type="float">
            <text:p>-8.41</text:p>
          </table:table-cell>
          <table:table-cell table:formula="of:=ABS([.J172])" office:value-type="float" office:value="8.41" calcext:value-type="float">
            <text:p>8.41</text:p>
          </table:table-cell>
          <table:table-cell table:formula="of:=[.K172]/[.F172]*100" office:value-type="float" office:value="10.8642294277225" calcext:value-type="float">
            <text:p>10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2866" calcext:value-type="float">
            <text:p>1.2866</text:p>
          </table:table-cell>
          <table:table-cell office:value-type="float" office:value="77.2" calcext:value-type="float">
            <text:p>77.2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formula="of:=[.H173]-[.F173]" office:value-type="float" office:value="-8.2" calcext:value-type="float">
            <text:p>-8.2</text:p>
          </table:table-cell>
          <table:table-cell table:formula="of:=ABS([.J173])" office:value-type="float" office:value="8.2" calcext:value-type="float">
            <text:p>8.2</text:p>
          </table:table-cell>
          <table:table-cell table:formula="of:=[.K173]/[.F173]*100" office:value-type="float" office:value="10.6217616580311" calcext:value-type="float">
            <text:p>10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.2855" calcext:value-type="float">
            <text:p>1.2855</text:p>
          </table:table-cell>
          <table:table-cell office:value-type="float" office:value="77.13" calcext:value-type="float">
            <text:p>77.13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formula="of:=[.H174]-[.F174]" office:value-type="float" office:value="-20.13" calcext:value-type="float">
            <text:p>-20.13</text:p>
          </table:table-cell>
          <table:table-cell table:formula="of:=ABS([.J174])" office:value-type="float" office:value="20.13" calcext:value-type="float">
            <text:p>20.13</text:p>
          </table:table-cell>
          <table:table-cell table:formula="of:=[.K174]/[.F174]*100" office:value-type="float" office:value="26.098794243485" calcext:value-type="float">
            <text:p>26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.2816" calcext:value-type="float">
            <text:p>1.2816</text:p>
          </table:table-cell>
          <table:table-cell office:value-type="float" office:value="76.9" calcext:value-type="float">
            <text:p>76.9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formula="of:=[.H175]-[.F175]" office:value-type="float" office:value="-10.9" calcext:value-type="float">
            <text:p>-10.9</text:p>
          </table:table-cell>
          <table:table-cell table:formula="of:=ABS([.J175])" office:value-type="float" office:value="10.9" calcext:value-type="float">
            <text:p>10.9</text:p>
          </table:table-cell>
          <table:table-cell table:formula="of:=[.K175]/[.F175]*100" office:value-type="float" office:value="14.1742522756827" calcext:value-type="float">
            <text:p>14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.2816" calcext:value-type="float">
            <text:p>1.2816</text:p>
          </table:table-cell>
          <table:table-cell office:value-type="float" office:value="76.9" calcext:value-type="float">
            <text:p>76.9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[.H176]-[.F176]" office:value-type="float" office:value="-10.9" calcext:value-type="float">
            <text:p>-10.9</text:p>
          </table:table-cell>
          <table:table-cell table:formula="of:=ABS([.J176])" office:value-type="float" office:value="10.9" calcext:value-type="float">
            <text:p>10.9</text:p>
          </table:table-cell>
          <table:table-cell table:formula="of:=[.K176]/[.F176]*100" office:value-type="float" office:value="14.1742522756827" calcext:value-type="float">
            <text:p>14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2869" calcext:value-type="float">
            <text:p>1.2869</text:p>
          </table:table-cell>
          <table:table-cell office:value-type="float" office:value="77.22" calcext:value-type="float">
            <text:p>77.22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formula="of:=[.H177]-[.F177]" office:value-type="float" office:value="-14.22" calcext:value-type="float">
            <text:p>-14.22</text:p>
          </table:table-cell>
          <table:table-cell table:formula="of:=ABS([.J177])" office:value-type="float" office:value="14.22" calcext:value-type="float">
            <text:p>14.22</text:p>
          </table:table-cell>
          <table:table-cell table:formula="of:=[.K177]/[.F177]*100" office:value-type="float" office:value="18.4149184149184" calcext:value-type="float">
            <text:p>18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.2941" calcext:value-type="float">
            <text:p>1.2941</text:p>
          </table:table-cell>
          <table:table-cell office:value-type="float" office:value="77.64" calcext:value-type="float">
            <text:p>77.64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178]-[.F178]" office:value-type="float" office:value="-14.64" calcext:value-type="float">
            <text:p>-14.64</text:p>
          </table:table-cell>
          <table:table-cell table:formula="of:=ABS([.J178])" office:value-type="float" office:value="14.64" calcext:value-type="float">
            <text:p>14.64</text:p>
          </table:table-cell>
          <table:table-cell table:formula="of:=[.K178]/[.F178]*100" office:value-type="float" office:value="18.8562596599691" calcext:value-type="float">
            <text:p>18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3016" calcext:value-type="float">
            <text:p>1.3016</text:p>
          </table:table-cell>
          <table:table-cell office:value-type="float" office:value="78.1" calcext:value-type="float">
            <text:p>78.1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H179]-[.F179]" office:value-type="float" office:value="-12.1" calcext:value-type="float">
            <text:p>-12.1</text:p>
          </table:table-cell>
          <table:table-cell table:formula="of:=ABS([.J179])" office:value-type="float" office:value="12.1" calcext:value-type="float">
            <text:p>12.1</text:p>
          </table:table-cell>
          <table:table-cell table:formula="of:=[.K179]/[.F179]*100" office:value-type="float" office:value="15.4929577464789" calcext:value-type="float">
            <text:p>15.5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.3183" calcext:value-type="float">
            <text:p>1.3183</text:p>
          </table:table-cell>
          <table:table-cell office:value-type="float" office:value="79.1" calcext:value-type="float">
            <text:p>79.1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formula="of:=[.H180]-[.F180]" office:value-type="float" office:value="-16.1" calcext:value-type="float">
            <text:p>-16.1</text:p>
          </table:table-cell>
          <table:table-cell table:formula="of:=ABS([.J180])" office:value-type="float" office:value="16.1" calcext:value-type="float">
            <text:p>16.1</text:p>
          </table:table-cell>
          <table:table-cell table:formula="of:=[.K180]/[.F180]*100" office:value-type="float" office:value="20.353982300885" calcext:value-type="float">
            <text:p>20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.3264" calcext:value-type="float">
            <text:p>1.3264</text:p>
          </table:table-cell>
          <table:table-cell office:value-type="float" office:value="79.58" calcext:value-type="float">
            <text:p>79.58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formula="of:=[.H181]-[.F181]" office:value-type="float" office:value="-16.58" calcext:value-type="float">
            <text:p>-16.58</text:p>
          </table:table-cell>
          <table:table-cell table:formula="of:=ABS([.J181])" office:value-type="float" office:value="16.58" calcext:value-type="float">
            <text:p>16.58</text:p>
          </table:table-cell>
          <table:table-cell table:formula="of:=[.K181]/[.F181]*100" office:value-type="float" office:value="20.8343804976125" calcext:value-type="float">
            <text:p>20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.3258" calcext:value-type="float">
            <text:p>1.3258</text:p>
          </table:table-cell>
          <table:table-cell office:value-type="float" office:value="79.55" calcext:value-type="float">
            <text:p>79.55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182]-[.F182]" office:value-type="float" office:value="-16.55" calcext:value-type="float">
            <text:p>-16.55</text:p>
          </table:table-cell>
          <table:table-cell table:formula="of:=ABS([.J182])" office:value-type="float" office:value="16.55" calcext:value-type="float">
            <text:p>16.55</text:p>
          </table:table-cell>
          <table:table-cell table:formula="of:=[.K182]/[.F182]*100" office:value-type="float" office:value="20.8045254556882" calcext:value-type="float">
            <text:p>20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3183" calcext:value-type="float">
            <text:p>1.3183</text:p>
          </table:table-cell>
          <table:table-cell office:value-type="float" office:value="79.1" calcext:value-type="float">
            <text:p>7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183]-[.F183]" office:value-type="float" office:value="-19.1" calcext:value-type="float">
            <text:p>-19.1</text:p>
          </table:table-cell>
          <table:table-cell table:formula="of:=ABS([.J183])" office:value-type="float" office:value="19.1" calcext:value-type="float">
            <text:p>19.1</text:p>
          </table:table-cell>
          <table:table-cell table:formula="of:=[.K183]/[.F183]*100" office:value-type="float" office:value="24.1466498103666" calcext:value-type="float">
            <text:p>24.1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.296" calcext:value-type="float">
            <text:p>1.296</text:p>
          </table:table-cell>
          <table:table-cell office:value-type="float" office:value="77.76" calcext:value-type="float">
            <text:p>77.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184]-[.F184]" office:value-type="float" office:value="-17.76" calcext:value-type="float">
            <text:p>-17.76</text:p>
          </table:table-cell>
          <table:table-cell table:formula="of:=ABS([.J184])" office:value-type="float" office:value="17.76" calcext:value-type="float">
            <text:p>17.76</text:p>
          </table:table-cell>
          <table:table-cell table:formula="of:=[.K184]/[.F184]*100" office:value-type="float" office:value="22.8395061728395" calcext:value-type="float">
            <text:p>22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.2906" calcext:value-type="float">
            <text:p>1.2906</text:p>
          </table:table-cell>
          <table:table-cell office:value-type="float" office:value="77.44" calcext:value-type="float">
            <text:p>77.4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185]-[.F185]" office:value-type="float" office:value="-20.44" calcext:value-type="float">
            <text:p>-20.44</text:p>
          </table:table-cell>
          <table:table-cell table:formula="of:=ABS([.J185])" office:value-type="float" office:value="20.44" calcext:value-type="float">
            <text:p>20.44</text:p>
          </table:table-cell>
          <table:table-cell table:formula="of:=[.K185]/[.F185]*100" office:value-type="float" office:value="26.3946280991736" calcext:value-type="float">
            <text:p>26.4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.307" calcext:value-type="float">
            <text:p>1.307</text:p>
          </table:table-cell>
          <table:table-cell office:value-type="float" office:value="78.42" calcext:value-type="float">
            <text:p>78.42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186]-[.F186]" office:value-type="float" office:value="-21.42" calcext:value-type="float">
            <text:p>-21.42</text:p>
          </table:table-cell>
          <table:table-cell table:formula="of:=ABS([.J186])" office:value-type="float" office:value="21.42" calcext:value-type="float">
            <text:p>21.42</text:p>
          </table:table-cell>
          <table:table-cell table:formula="of:=[.K186]/[.F186]*100" office:value-type="float" office:value="27.3144605967865" calcext:value-type="float">
            <text:p>27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.3186" calcext:value-type="float">
            <text:p>1.3186</text:p>
          </table:table-cell>
          <table:table-cell office:value-type="float" office:value="79.11" calcext:value-type="float">
            <text:p>79.11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187]-[.F187]" office:value-type="float" office:value="-22.11" calcext:value-type="float">
            <text:p>-22.11</text:p>
          </table:table-cell>
          <table:table-cell table:formula="of:=ABS([.J187])" office:value-type="float" office:value="22.11" calcext:value-type="float">
            <text:p>22.11</text:p>
          </table:table-cell>
          <table:table-cell table:formula="of:=[.K187]/[.F187]*100" office:value-type="float" office:value="27.9484262419416" calcext:value-type="float">
            <text:p>27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.3288" calcext:value-type="float">
            <text:p>1.3288</text:p>
          </table:table-cell>
          <table:table-cell office:value-type="float" office:value="79.73" calcext:value-type="float">
            <text:p>79.7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188]-[.F188]" office:value-type="float" office:value="1.27" calcext:value-type="float">
            <text:p>1.27</text:p>
          </table:table-cell>
          <table:table-cell table:formula="of:=ABS([.J188])" office:value-type="float" office:value="1.27" calcext:value-type="float">
            <text:p>1.27</text:p>
          </table:table-cell>
          <table:table-cell table:formula="of:=[.K188]/[.F188]*100" office:value-type="float" office:value="1.59287595635269" calcext:value-type="float">
            <text:p>1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.3248" calcext:value-type="float">
            <text:p>1.3248</text:p>
          </table:table-cell>
          <table:table-cell office:value-type="float" office:value="79.49" calcext:value-type="float">
            <text:p>79.49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189]-[.F189]" office:value-type="float" office:value="1.51000000000001" calcext:value-type="float">
            <text:p>1.51000000000001</text:p>
          </table:table-cell>
          <table:table-cell table:formula="of:=ABS([.J189])" office:value-type="float" office:value="1.51000000000001" calcext:value-type="float">
            <text:p>1.51000000000001</text:p>
          </table:table-cell>
          <table:table-cell table:formula="of:=[.K189]/[.F189]*100" office:value-type="float" office:value="1.89961001383823" calcext:value-type="float">
            <text:p>1.9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[.H190]-[.F190]" office:value-type="float" office:value="3" calcext:value-type="float">
            <text:p>3</text:p>
          </table:table-cell>
          <table:table-cell table:formula="of:=ABS([.J190])" office:value-type="float" office:value="3" calcext:value-type="float">
            <text:p>3</text:p>
          </table:table-cell>
          <table:table-cell table:formula="of:=[.K190]/[.F190]*100" office:value-type="float" office:value="3.84615384615385" calcext:value-type="float">
            <text:p>3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.2944" calcext:value-type="float">
            <text:p>1.2944</text:p>
          </table:table-cell>
          <table:table-cell office:value-type="float" office:value="77.67" calcext:value-type="float">
            <text:p>77.67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table:formula="of:=[.H191]-[.F191]" office:value-type="float" office:value="3.33" calcext:value-type="float">
            <text:p>3.33</text:p>
          </table:table-cell>
          <table:table-cell table:formula="of:=ABS([.J191])" office:value-type="float" office:value="3.33" calcext:value-type="float">
            <text:p>3.33</text:p>
          </table:table-cell>
          <table:table-cell table:formula="of:=[.K191]/[.F191]*100" office:value-type="float" office:value="4.28736964078795" calcext:value-type="float">
            <text:p>4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.2983" calcext:value-type="float">
            <text:p>1.2983</text:p>
          </table:table-cell>
          <table:table-cell office:value-type="float" office:value="77.9" calcext:value-type="float">
            <text:p>77.9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table:formula="of:=[.H192]-[.F192]" office:value-type="float" office:value="3.09999999999999" calcext:value-type="float">
            <text:p>3.09999999999999</text:p>
          </table:table-cell>
          <table:table-cell table:formula="of:=ABS([.J192])" office:value-type="float" office:value="3.09999999999999" calcext:value-type="float">
            <text:p>3.09999999999999</text:p>
          </table:table-cell>
          <table:table-cell table:formula="of:=[.K192]/[.F192]*100" office:value-type="float" office:value="3.97946084724004" calcext:value-type="float">
            <text:p>4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.3004" calcext:value-type="float">
            <text:p>1.3004</text:p>
          </table:table-cell>
          <table:table-cell office:value-type="float" office:value="78.02" calcext:value-type="float">
            <text:p>78.02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193]-[.F193]" office:value-type="float" office:value="2.98" calcext:value-type="float">
            <text:p>2.98</text:p>
          </table:table-cell>
          <table:table-cell table:formula="of:=ABS([.J193])" office:value-type="float" office:value="2.98" calcext:value-type="float">
            <text:p>2.98</text:p>
          </table:table-cell>
          <table:table-cell table:formula="of:=[.K193]/[.F193]*100" office:value-type="float" office:value="3.81953345296078" calcext:value-type="float">
            <text:p>3.8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.3108" calcext:value-type="float">
            <text:p>1.3108</text:p>
          </table:table-cell>
          <table:table-cell office:value-type="float" office:value="78.65" calcext:value-type="float">
            <text:p>78.65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194]-[.F194]" office:value-type="float" office:value="2.34999999999999" calcext:value-type="float">
            <text:p>2.34999999999999</text:p>
          </table:table-cell>
          <table:table-cell table:formula="of:=ABS([.J194])" office:value-type="float" office:value="2.34999999999999" calcext:value-type="float">
            <text:p>2.34999999999999</text:p>
          </table:table-cell>
          <table:table-cell table:formula="of:=[.K194]/[.F194]*100" office:value-type="float" office:value="2.98792116973934" calcext:value-type="float">
            <text:p>3.0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.3149" calcext:value-type="float">
            <text:p>1.3149</text:p>
          </table:table-cell>
          <table:table-cell office:value-type="float" office:value="78.9" calcext:value-type="float">
            <text:p>78.9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195]-[.F195]" office:value-type="float" office:value="2.09999999999999" calcext:value-type="float">
            <text:p>2.09999999999999</text:p>
          </table:table-cell>
          <table:table-cell table:formula="of:=ABS([.J195])" office:value-type="float" office:value="2.09999999999999" calcext:value-type="float">
            <text:p>2.09999999999999</text:p>
          </table:table-cell>
          <table:table-cell table:formula="of:=[.K195]/[.F195]*100" office:value-type="float" office:value="2.6615969581749" calcext:value-type="float">
            <text:p>2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.315" calcext:value-type="float">
            <text:p>1.315</text:p>
          </table:table-cell>
          <table:table-cell office:value-type="float" office:value="78.9" calcext:value-type="float">
            <text:p>78.9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formula="of:=[.H196]-[.F196]" office:value-type="float" office:value="2.09999999999999" calcext:value-type="float">
            <text:p>2.09999999999999</text:p>
          </table:table-cell>
          <table:table-cell table:formula="of:=ABS([.J196])" office:value-type="float" office:value="2.09999999999999" calcext:value-type="float">
            <text:p>2.09999999999999</text:p>
          </table:table-cell>
          <table:table-cell table:formula="of:=[.K196]/[.F196]*100" office:value-type="float" office:value="2.6615969581749" calcext:value-type="float">
            <text:p>2.7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.3227" calcext:value-type="float">
            <text:p>1.3227</text:p>
          </table:table-cell>
          <table:table-cell office:value-type="float" office:value="79.36" calcext:value-type="float">
            <text:p>79.36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197]-[.F197]" office:value-type="float" office:value="7.64" calcext:value-type="float">
            <text:p>7.64</text:p>
          </table:table-cell>
          <table:table-cell table:formula="of:=ABS([.J197])" office:value-type="float" office:value="7.64" calcext:value-type="float">
            <text:p>7.64</text:p>
          </table:table-cell>
          <table:table-cell table:formula="of:=[.K197]/[.F197]*100" office:value-type="float" office:value="9.62701612903226" calcext:value-type="float">
            <text:p>9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.3266" calcext:value-type="float">
            <text:p>1.3266</text:p>
          </table:table-cell>
          <table:table-cell office:value-type="float" office:value="79.6" calcext:value-type="float">
            <text:p>79.6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table:formula="of:=[.H198]-[.F198]" office:value-type="float" office:value="7.40000000000001" calcext:value-type="float">
            <text:p>7.40000000000001</text:p>
          </table:table-cell>
          <table:table-cell table:formula="of:=ABS([.J198])" office:value-type="float" office:value="7.40000000000001" calcext:value-type="float">
            <text:p>7.40000000000001</text:p>
          </table:table-cell>
          <table:table-cell table:formula="of:=[.K198]/[.F198]*100" office:value-type="float" office:value="9.29648241206031" calcext:value-type="float">
            <text:p>9.3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.3274" calcext:value-type="float">
            <text:p>1.3274</text:p>
          </table:table-cell>
          <table:table-cell office:value-type="float" office:value="79.65" calcext:value-type="float">
            <text:p>79.65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formula="of:=[.H199]-[.F199]" office:value-type="float" office:value="7.34999999999999" calcext:value-type="float">
            <text:p>7.34999999999999</text:p>
          </table:table-cell>
          <table:table-cell table:formula="of:=ABS([.J199])" office:value-type="float" office:value="7.34999999999999" calcext:value-type="float">
            <text:p>7.34999999999999</text:p>
          </table:table-cell>
          <table:table-cell table:formula="of:=[.K199]/[.F199]*100" office:value-type="float" office:value="9.22787193973634" calcext:value-type="float">
            <text:p>9.2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.3287" calcext:value-type="float">
            <text:p>1.3287</text:p>
          </table:table-cell>
          <table:table-cell office:value-type="float" office:value="79.72" calcext:value-type="float">
            <text:p>79.72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formula="of:=[.H200]-[.F200]" office:value-type="float" office:value="1.28" calcext:value-type="float">
            <text:p>1.28</text:p>
          </table:table-cell>
          <table:table-cell table:formula="of:=ABS([.J200])" office:value-type="float" office:value="1.28" calcext:value-type="float">
            <text:p>1.28</text:p>
          </table:table-cell>
          <table:table-cell table:formula="of:=[.K200]/[.F200]*100" office:value-type="float" office:value="1.60561966884094" calcext:value-type="float">
            <text:p>1.6</text:p>
          </table:table-cell>
          <table:table-cell table:number-columns-repeated="16372"/>
        </table:table-row>
        <table:table-row table:style-name="ro3" table:visibility="filter">
          <table:table-cell office:value-type="string" calcext:value-type="string">
            <text:p>subject03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.3255" calcext:value-type="float">
            <text:p>1.3255</text:p>
          </table:table-cell>
          <table:table-cell office:value-type="float" office:value="79.53" calcext:value-type="float">
            <text:p>79.53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formula="of:=[.H201]-[.F201]" office:value-type="float" office:value="1.47" calcext:value-type="float">
            <text:p>1.47</text:p>
          </table:table-cell>
          <table:table-cell table:formula="of:=ABS([.J201])" office:value-type="float" office:value="1.47" calcext:value-type="float">
            <text:p>1.47</text:p>
          </table:table-cell>
          <table:table-cell table:formula="of:=[.K201]/[.F201]*100" office:value-type="float" office:value="1.8483591097699" calcext:value-type="float">
            <text:p>1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.3213" calcext:value-type="float">
            <text:p>1.3213</text:p>
          </table:table-cell>
          <table:table-cell office:value-type="float" office:value="79.28" calcext:value-type="float">
            <text:p>79.2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202]-[.F202]" office:value-type="float" office:value="1.72" calcext:value-type="float">
            <text:p>1.72</text:p>
          </table:table-cell>
          <table:table-cell table:formula="of:=ABS([.J202])" office:value-type="float" office:value="1.72" calcext:value-type="float">
            <text:p>1.72</text:p>
          </table:table-cell>
          <table:table-cell table:formula="of:=[.K202]/[.F202]*100" office:value-type="float" office:value="2.16952573158426" calcext:value-type="float">
            <text:p>2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.3114" calcext:value-type="float">
            <text:p>1.3114</text:p>
          </table:table-cell>
          <table:table-cell office:value-type="float" office:value="78.68" calcext:value-type="float">
            <text:p>78.68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formula="of:=[.H203]-[.F203]" office:value-type="float" office:value="-6.68000000000001" calcext:value-type="float">
            <text:p>-6.68000000000001</text:p>
          </table:table-cell>
          <table:table-cell table:formula="of:=ABS([.J203])" office:value-type="float" office:value="6.68000000000001" calcext:value-type="float">
            <text:p>6.68000000000001</text:p>
          </table:table-cell>
          <table:table-cell table:formula="of:=[.K203]/[.F203]*100" office:value-type="float" office:value="8.49008642602949" calcext:value-type="float">
            <text:p>8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.3055" calcext:value-type="float">
            <text:p>1.3055</text:p>
          </table:table-cell>
          <table:table-cell office:value-type="float" office:value="78.33" calcext:value-type="float">
            <text:p>78.33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table:formula="of:=[.H204]-[.F204]" office:value-type="float" office:value="2.67" calcext:value-type="float">
            <text:p>2.67</text:p>
          </table:table-cell>
          <table:table-cell table:formula="of:=ABS([.J204])" office:value-type="float" office:value="2.67" calcext:value-type="float">
            <text:p>2.67</text:p>
          </table:table-cell>
          <table:table-cell table:formula="of:=[.K204]/[.F204]*100" office:value-type="float" office:value="3.40865568747607" calcext:value-type="float">
            <text:p>3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.2997" calcext:value-type="float">
            <text:p>1.2997</text:p>
          </table:table-cell>
          <table:table-cell office:value-type="float" office:value="77.98" calcext:value-type="float">
            <text:p>77.98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formula="of:=[.H205]-[.F205]" office:value-type="float" office:value="-11.98" calcext:value-type="float">
            <text:p>-11.98</text:p>
          </table:table-cell>
          <table:table-cell table:formula="of:=ABS([.J205])" office:value-type="float" office:value="11.98" calcext:value-type="float">
            <text:p>11.98</text:p>
          </table:table-cell>
          <table:table-cell table:formula="of:=[.K205]/[.F205]*100" office:value-type="float" office:value="15.3629135675814" calcext:value-type="float">
            <text:p>15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.2938" calcext:value-type="float">
            <text:p>1.2938</text:p>
          </table:table-cell>
          <table:table-cell office:value-type="float" office:value="77.63" calcext:value-type="float">
            <text:p>77.63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formula="of:=[.H206]-[.F206]" office:value-type="float" office:value="-11.63" calcext:value-type="float">
            <text:p>-11.63</text:p>
          </table:table-cell>
          <table:table-cell table:formula="of:=ABS([.J206])" office:value-type="float" office:value="11.63" calcext:value-type="float">
            <text:p>11.63</text:p>
          </table:table-cell>
          <table:table-cell table:formula="of:=[.K206]/[.F206]*100" office:value-type="float" office:value="14.9813216539997" calcext:value-type="float">
            <text:p>15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1.297" calcext:value-type="float">
            <text:p>1.297</text:p>
          </table:table-cell>
          <table:table-cell office:value-type="float" office:value="77.82" calcext:value-type="float">
            <text:p>77.82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table:formula="of:=[.H207]-[.F207]" office:value-type="float" office:value="9.18000000000001" calcext:value-type="float">
            <text:p>9.18000000000001</text:p>
          </table:table-cell>
          <table:table-cell table:formula="of:=ABS([.J207])" office:value-type="float" office:value="9.18000000000001" calcext:value-type="float">
            <text:p>9.18000000000001</text:p>
          </table:table-cell>
          <table:table-cell table:formula="of:=[.K207]/[.F207]*100" office:value-type="float" office:value="11.7964533538936" calcext:value-type="float">
            <text:p>11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1.2965" calcext:value-type="float">
            <text:p>1.2965</text:p>
          </table:table-cell>
          <table:table-cell office:value-type="float" office:value="77.79" calcext:value-type="float">
            <text:p>77.79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[.H208]-[.F208]" office:value-type="float" office:value="12.21" calcext:value-type="float">
            <text:p>12.21</text:p>
          </table:table-cell>
          <table:table-cell table:formula="of:=ABS([.J208])" office:value-type="float" office:value="12.21" calcext:value-type="float">
            <text:p>12.21</text:p>
          </table:table-cell>
          <table:table-cell table:formula="of:=[.K208]/[.F208]*100" office:value-type="float" office:value="15.6961048978018" calcext:value-type="float">
            <text:p>15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1.2937" calcext:value-type="float">
            <text:p>1.2937</text:p>
          </table:table-cell>
          <table:table-cell office:value-type="float" office:value="77.62" calcext:value-type="float">
            <text:p>77.62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H209]-[.F209]" office:value-type="float" office:value="9.38" calcext:value-type="float">
            <text:p>9.38</text:p>
          </table:table-cell>
          <table:table-cell table:formula="of:=ABS([.J209])" office:value-type="float" office:value="9.38" calcext:value-type="float">
            <text:p>9.38</text:p>
          </table:table-cell>
          <table:table-cell table:formula="of:=[.K209]/[.F209]*100" office:value-type="float" office:value="12.084514300438" calcext:value-type="float">
            <text:p>12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.2875" calcext:value-type="float">
            <text:p>1.2875</text:p>
          </table:table-cell>
          <table:table-cell office:value-type="float" office:value="77.25" calcext:value-type="float">
            <text:p>77.25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H210]-[.F210]" office:value-type="float" office:value="9.75" calcext:value-type="float">
            <text:p>9.75</text:p>
          </table:table-cell>
          <table:table-cell table:formula="of:=ABS([.J210])" office:value-type="float" office:value="9.75" calcext:value-type="float">
            <text:p>9.75</text:p>
          </table:table-cell>
          <table:table-cell table:formula="of:=[.K210]/[.F210]*100" office:value-type="float" office:value="12.621359223301" calcext:value-type="float">
            <text:p>12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1.2905" calcext:value-type="float">
            <text:p>1.2905</text:p>
          </table:table-cell>
          <table:table-cell office:value-type="float" office:value="77.43" calcext:value-type="float">
            <text:p>77.43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formula="of:=[.H211]-[.F211]" office:value-type="float" office:value="6.56999999999999" calcext:value-type="float">
            <text:p>6.56999999999999</text:p>
          </table:table-cell>
          <table:table-cell table:formula="of:=ABS([.J211])" office:value-type="float" office:value="6.56999999999999" calcext:value-type="float">
            <text:p>6.56999999999999</text:p>
          </table:table-cell>
          <table:table-cell table:formula="of:=[.K211]/[.F211]*100" office:value-type="float" office:value="8.4850833010461" calcext:value-type="float">
            <text:p>8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.2974" calcext:value-type="float">
            <text:p>1.2974</text:p>
          </table:table-cell>
          <table:table-cell office:value-type="float" office:value="77.85" calcext:value-type="float">
            <text:p>77.85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212]-[.F212]" office:value-type="float" office:value="-20.85" calcext:value-type="float">
            <text:p>-20.85</text:p>
          </table:table-cell>
          <table:table-cell table:formula="of:=ABS([.J212])" office:value-type="float" office:value="20.85" calcext:value-type="float">
            <text:p>20.85</text:p>
          </table:table-cell>
          <table:table-cell table:formula="of:=[.K212]/[.F212]*100" office:value-type="float" office:value="26.7822736030828" calcext:value-type="float">
            <text:p>26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.3146" calcext:value-type="float">
            <text:p>1.3146</text:p>
          </table:table-cell>
          <table:table-cell office:value-type="float" office:value="78.87" calcext:value-type="float">
            <text:p>78.87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table:formula="of:=[.H213]-[.F213]" office:value-type="float" office:value="-21.87" calcext:value-type="float">
            <text:p>-21.87</text:p>
          </table:table-cell>
          <table:table-cell table:formula="of:=ABS([.J213])" office:value-type="float" office:value="21.87" calcext:value-type="float">
            <text:p>21.87</text:p>
          </table:table-cell>
          <table:table-cell table:formula="of:=[.K213]/[.F213]*100" office:value-type="float" office:value="27.7291745910993" calcext:value-type="float">
            <text:p>27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.3262" calcext:value-type="float">
            <text:p>1.3262</text:p>
          </table:table-cell>
          <table:table-cell office:value-type="float" office:value="79.57" calcext:value-type="float">
            <text:p>79.5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214]-[.F214]" office:value-type="float" office:value="-22.57" calcext:value-type="float">
            <text:p>-22.57</text:p>
          </table:table-cell>
          <table:table-cell table:formula="of:=ABS([.J214])" office:value-type="float" office:value="22.57" calcext:value-type="float">
            <text:p>22.57</text:p>
          </table:table-cell>
          <table:table-cell table:formula="of:=[.K214]/[.F214]*100" office:value-type="float" office:value="28.3649616689707" calcext:value-type="float">
            <text:p>28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1.3282" calcext:value-type="float">
            <text:p>1.3282</text:p>
          </table:table-cell>
          <table:table-cell office:value-type="float" office:value="79.69" calcext:value-type="float">
            <text:p>79.69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formula="of:=[.H215]-[.F215]" office:value-type="float" office:value="4.31" calcext:value-type="float">
            <text:p>4.31</text:p>
          </table:table-cell>
          <table:table-cell table:formula="of:=ABS([.J215])" office:value-type="float" office:value="4.31" calcext:value-type="float">
            <text:p>4.31</text:p>
          </table:table-cell>
          <table:table-cell table:formula="of:=[.K215]/[.F215]*100" office:value-type="float" office:value="5.40845777387376" calcext:value-type="float">
            <text:p>5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1.3314" calcext:value-type="float">
            <text:p>1.3314</text:p>
          </table:table-cell>
          <table:table-cell office:value-type="float" office:value="79.88" calcext:value-type="float">
            <text:p>79.88</text:p>
          </table:table-cell>
          <table:table-cell office:value-type="float" office:value="1.65" calcext:value-type="float">
            <text:p>1.65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formula="of:=[.H216]-[.F216]" office:value-type="float" office:value="19.12" calcext:value-type="float">
            <text:p>19.12</text:p>
          </table:table-cell>
          <table:table-cell table:formula="of:=ABS([.J216])" office:value-type="float" office:value="19.12" calcext:value-type="float">
            <text:p>19.12</text:p>
          </table:table-cell>
          <table:table-cell table:formula="of:=[.K216]/[.F216]*100" office:value-type="float" office:value="23.9359038557837" calcext:value-type="float">
            <text:p>23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1.3272" calcext:value-type="float">
            <text:p>1.3272</text:p>
          </table:table-cell>
          <table:table-cell office:value-type="float" office:value="79.63" calcext:value-type="float">
            <text:p>79.63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[.H217]-[.F217]" office:value-type="float" office:value="19.37" calcext:value-type="float">
            <text:p>19.37</text:p>
          </table:table-cell>
          <table:table-cell table:formula="of:=ABS([.J217])" office:value-type="float" office:value="19.37" calcext:value-type="float">
            <text:p>19.37</text:p>
          </table:table-cell>
          <table:table-cell table:formula="of:=[.K217]/[.F217]*100" office:value-type="float" office:value="24.3250031395203" calcext:value-type="float">
            <text:p>24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office:value-type="float" office:value="1.3346" calcext:value-type="float">
            <text:p>1.3346</text:p>
          </table:table-cell>
          <table:table-cell office:value-type="float" office:value="80.08" calcext:value-type="float">
            <text:p>80.08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[.H218]-[.F218]" office:value-type="float" office:value="18.92" calcext:value-type="float">
            <text:p>18.92</text:p>
          </table:table-cell>
          <table:table-cell table:formula="of:=ABS([.J218])" office:value-type="float" office:value="18.92" calcext:value-type="float">
            <text:p>18.92</text:p>
          </table:table-cell>
          <table:table-cell table:formula="of:=[.K218]/[.F218]*100" office:value-type="float" office:value="23.6263736263736" calcext:value-type="float">
            <text:p>23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1.3361" calcext:value-type="float">
            <text:p>1.3361</text:p>
          </table:table-cell>
          <table:table-cell office:value-type="float" office:value="80.16" calcext:value-type="float">
            <text:p>80.16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219]-[.F219]" office:value-type="float" office:value="-17.16" calcext:value-type="float">
            <text:p>-17.16</text:p>
          </table:table-cell>
          <table:table-cell table:formula="of:=ABS([.J219])" office:value-type="float" office:value="17.16" calcext:value-type="float">
            <text:p>17.16</text:p>
          </table:table-cell>
          <table:table-cell table:formula="of:=[.K219]/[.F219]*100" office:value-type="float" office:value="21.4071856287425" calcext:value-type="float">
            <text:p>2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1.3267" calcext:value-type="float">
            <text:p>1.3267</text:p>
          </table:table-cell>
          <table:table-cell office:value-type="float" office:value="79.6" calcext:value-type="float">
            <text:p>79.6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220]-[.F220]" office:value-type="float" office:value="-16.6" calcext:value-type="float">
            <text:p>-16.6</text:p>
          </table:table-cell>
          <table:table-cell table:formula="of:=ABS([.J220])" office:value-type="float" office:value="16.6" calcext:value-type="float">
            <text:p>16.6</text:p>
          </table:table-cell>
          <table:table-cell table:formula="of:=[.K220]/[.F220]*100" office:value-type="float" office:value="20.8542713567839" calcext:value-type="float">
            <text:p>20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1.3237" calcext:value-type="float">
            <text:p>1.3237</text:p>
          </table:table-cell>
          <table:table-cell office:value-type="float" office:value="79.42" calcext:value-type="float">
            <text:p>79.4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221]-[.F221]" office:value-type="float" office:value="-16.42" calcext:value-type="float">
            <text:p>-16.42</text:p>
          </table:table-cell>
          <table:table-cell table:formula="of:=ABS([.J221])" office:value-type="float" office:value="16.42" calcext:value-type="float">
            <text:p>16.42</text:p>
          </table:table-cell>
          <table:table-cell table:formula="of:=[.K221]/[.F221]*100" office:value-type="float" office:value="20.674892974062" calcext:value-type="float">
            <text:p>2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1.3194" calcext:value-type="float">
            <text:p>1.3194</text:p>
          </table:table-cell>
          <table:table-cell office:value-type="float" office:value="79.16" calcext:value-type="float">
            <text:p>79.16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formula="of:=[.H222]-[.F222]" office:value-type="float" office:value="-1.16" calcext:value-type="float">
            <text:p>-1.16</text:p>
          </table:table-cell>
          <table:table-cell table:formula="of:=ABS([.J222])" office:value-type="float" office:value="1.16" calcext:value-type="float">
            <text:p>1.16</text:p>
          </table:table-cell>
          <table:table-cell table:formula="of:=[.K222]/[.F222]*100" office:value-type="float" office:value="1.46538655886811" calcext:value-type="float">
            <text:p>1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57" calcext:value-type="float">
            <text:p>57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1.3167" calcext:value-type="float">
            <text:p>1.3167</text:p>
          </table:table-cell>
          <table:table-cell office:value-type="float" office:value="79" calcext:value-type="float">
            <text:p>79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223]-[.F223]" office:value-type="float" office:value="-1" calcext:value-type="float">
            <text:p>-1</text:p>
          </table:table-cell>
          <table:table-cell table:formula="of:=ABS([.J223])" office:value-type="float" office:value="1" calcext:value-type="float">
            <text:p>1</text:p>
          </table:table-cell>
          <table:table-cell table:formula="of:=[.K223]/[.F223]*100" office:value-type="float" office:value="1.26582278481013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58" calcext:value-type="float">
            <text:p>58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1.3231" calcext:value-type="float">
            <text:p>1.3231</text:p>
          </table:table-cell>
          <table:table-cell office:value-type="float" office:value="79.39" calcext:value-type="float">
            <text:p>79.39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224]-[.F224]" office:value-type="float" office:value="-1.39" calcext:value-type="float">
            <text:p>-1.39</text:p>
          </table:table-cell>
          <table:table-cell table:formula="of:=ABS([.J224])" office:value-type="float" office:value="1.39" calcext:value-type="float">
            <text:p>1.39</text:p>
          </table:table-cell>
          <table:table-cell table:formula="of:=[.K224]/[.F224]*100" office:value-type="float" office:value="1.75085023302683" calcext:value-type="float">
            <text:p>1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59" calcext:value-type="float">
            <text:p>59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1.3184" calcext:value-type="float">
            <text:p>1.3184</text:p>
          </table:table-cell>
          <table:table-cell office:value-type="float" office:value="79.1" calcext:value-type="float">
            <text:p>79.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225]-[.F225]" office:value-type="float" office:value="-1.09999999999999" calcext:value-type="float">
            <text:p>-1.09999999999999</text:p>
          </table:table-cell>
          <table:table-cell table:formula="of:=ABS([.J225])" office:value-type="float" office:value="1.09999999999999" calcext:value-type="float">
            <text:p>1.09999999999999</text:p>
          </table:table-cell>
          <table:table-cell table:formula="of:=[.K225]/[.F225]*100" office:value-type="float" office:value="1.3906447534766" calcext:value-type="float">
            <text:p>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.3119" calcext:value-type="float">
            <text:p>1.3119</text:p>
          </table:table-cell>
          <table:table-cell office:value-type="float" office:value="78.71" calcext:value-type="float">
            <text:p>78.71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formula="of:=[.H226]-[.F226]" office:value-type="float" office:value="-0.709999999999994" calcext:value-type="float">
            <text:p>-0.709999999999994</text:p>
          </table:table-cell>
          <table:table-cell table:formula="of:=ABS([.J226])" office:value-type="float" office:value="0.709999999999994" calcext:value-type="float">
            <text:p>0.709999999999994</text:p>
          </table:table-cell>
          <table:table-cell table:formula="of:=[.K226]/[.F226]*100" office:value-type="float" office:value="0.902045483420142" calcext:value-type="float">
            <text:p>0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1.3064" calcext:value-type="float">
            <text:p>1.3064</text:p>
          </table:table-cell>
          <table:table-cell office:value-type="float" office:value="78.38" calcext:value-type="float">
            <text:p>78.3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227]-[.F227]" office:value-type="float" office:value="5.62" calcext:value-type="float">
            <text:p>5.62</text:p>
          </table:table-cell>
          <table:table-cell table:formula="of:=ABS([.J227])" office:value-type="float" office:value="5.62" calcext:value-type="float">
            <text:p>5.62</text:p>
          </table:table-cell>
          <table:table-cell table:formula="of:=[.K227]/[.F227]*100" office:value-type="float" office:value="7.17019647869355" calcext:value-type="float">
            <text:p>7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62" calcext:value-type="float">
            <text:p>62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1.3023" calcext:value-type="float">
            <text:p>1.3023</text:p>
          </table:table-cell>
          <table:table-cell office:value-type="float" office:value="78.14" calcext:value-type="float">
            <text:p>78.14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228]-[.F228]" office:value-type="float" office:value="8.86" calcext:value-type="float">
            <text:p>8.86</text:p>
          </table:table-cell>
          <table:table-cell table:formula="of:=ABS([.J228])" office:value-type="float" office:value="8.86" calcext:value-type="float">
            <text:p>8.86</text:p>
          </table:table-cell>
          <table:table-cell table:formula="of:=[.K228]/[.F228]*100" office:value-type="float" office:value="11.338622984387" calcext:value-type="float">
            <text:p>1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.2998" calcext:value-type="float">
            <text:p>1.2998</text:p>
          </table:table-cell>
          <table:table-cell office:value-type="float" office:value="77.99" calcext:value-type="float">
            <text:p>77.9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229]-[.F229]" office:value-type="float" office:value="12.01" calcext:value-type="float">
            <text:p>12.01</text:p>
          </table:table-cell>
          <table:table-cell table:formula="of:=ABS([.J229])" office:value-type="float" office:value="12.01" calcext:value-type="float">
            <text:p>12.01</text:p>
          </table:table-cell>
          <table:table-cell table:formula="of:=[.K229]/[.F229]*100" office:value-type="float" office:value="15.3994101807924" calcext:value-type="float">
            <text:p>15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.2967" calcext:value-type="float">
            <text:p>1.2967</text:p>
          </table:table-cell>
          <table:table-cell office:value-type="float" office:value="77.8" calcext:value-type="float">
            <text:p>77.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230]-[.F230]" office:value-type="float" office:value="12.2" calcext:value-type="float">
            <text:p>12.2</text:p>
          </table:table-cell>
          <table:table-cell table:formula="of:=ABS([.J230])" office:value-type="float" office:value="12.2" calcext:value-type="float">
            <text:p>12.2</text:p>
          </table:table-cell>
          <table:table-cell table:formula="of:=[.K230]/[.F230]*100" office:value-type="float" office:value="15.681233933162" calcext:value-type="float">
            <text:p>15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.2933" calcext:value-type="float">
            <text:p>1.2933</text:p>
          </table:table-cell>
          <table:table-cell office:value-type="float" office:value="77.6" calcext:value-type="float">
            <text:p>77.6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[.H231]-[.F231]" office:value-type="float" office:value="21.4" calcext:value-type="float">
            <text:p>21.4</text:p>
          </table:table-cell>
          <table:table-cell table:formula="of:=ABS([.J231])" office:value-type="float" office:value="21.4" calcext:value-type="float">
            <text:p>21.4</text:p>
          </table:table-cell>
          <table:table-cell table:formula="of:=[.K231]/[.F231]*100" office:value-type="float" office:value="27.5773195876289" calcext:value-type="float">
            <text:p>27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66" calcext:value-type="float">
            <text:p>66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1.2914" calcext:value-type="float">
            <text:p>1.2914</text:p>
          </table:table-cell>
          <table:table-cell office:value-type="float" office:value="77.48" calcext:value-type="float">
            <text:p>77.48</text:p>
          </table:table-cell>
          <table:table-cell office:value-type="float" office:value="1.65" calcext:value-type="float">
            <text:p>1.65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232]-[.F232]" office:value-type="float" office:value="21.52" calcext:value-type="float">
            <text:p>21.52</text:p>
          </table:table-cell>
          <table:table-cell table:formula="of:=ABS([.J232])" office:value-type="float" office:value="21.52" calcext:value-type="float">
            <text:p>21.52</text:p>
          </table:table-cell>
          <table:table-cell table:formula="of:=[.K232]/[.F232]*100" office:value-type="float" office:value="27.7749096541043" calcext:value-type="float">
            <text:p>27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1.2906" calcext:value-type="float">
            <text:p>1.2906</text:p>
          </table:table-cell>
          <table:table-cell office:value-type="float" office:value="77.44" calcext:value-type="float">
            <text:p>77.44</text:p>
          </table:table-cell>
          <table:table-cell office:value-type="float" office:value="1.65" calcext:value-type="float">
            <text:p>1.65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233]-[.F233]" office:value-type="float" office:value="21.56" calcext:value-type="float">
            <text:p>21.56</text:p>
          </table:table-cell>
          <table:table-cell table:formula="of:=ABS([.J233])" office:value-type="float" office:value="21.56" calcext:value-type="float">
            <text:p>21.56</text:p>
          </table:table-cell>
          <table:table-cell table:formula="of:=[.K233]/[.F233]*100" office:value-type="float" office:value="27.8409090909091" calcext:value-type="float">
            <text:p>27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68" calcext:value-type="float">
            <text:p>68</text:p>
          </table:table-cell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office:value-type="float" office:value="1.2998" calcext:value-type="float">
            <text:p>1.2998</text:p>
          </table:table-cell>
          <table:table-cell office:value-type="float" office:value="77.99" calcext:value-type="float">
            <text:p>77.99</text:p>
          </table:table-cell>
          <table:table-cell office:value-type="float" office:value="1.6" calcext:value-type="float">
            <text:p>1.6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formula="of:=[.H234]-[.F234]" office:value-type="float" office:value="18.01" calcext:value-type="float">
            <text:p>18.01</text:p>
          </table:table-cell>
          <table:table-cell table:formula="of:=ABS([.J234])" office:value-type="float" office:value="18.01" calcext:value-type="float">
            <text:p>18.01</text:p>
          </table:table-cell>
          <table:table-cell table:formula="of:=[.K234]/[.F234]*100" office:value-type="float" office:value="23.0927041928452" calcext:value-type="float">
            <text:p>23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1.3088" calcext:value-type="float">
            <text:p>1.3088</text:p>
          </table:table-cell>
          <table:table-cell office:value-type="float" office:value="78.53" calcext:value-type="float">
            <text:p>78.53</text:p>
          </table:table-cell>
          <table:table-cell office:value-type="float" office:value="1.6" calcext:value-type="float">
            <text:p>1.6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formula="of:=[.H235]-[.F235]" office:value-type="float" office:value="17.47" calcext:value-type="float">
            <text:p>17.47</text:p>
          </table:table-cell>
          <table:table-cell table:formula="of:=ABS([.J235])" office:value-type="float" office:value="17.47" calcext:value-type="float">
            <text:p>17.47</text:p>
          </table:table-cell>
          <table:table-cell table:formula="of:=[.K235]/[.F235]*100" office:value-type="float" office:value="22.2462753087992" calcext:value-type="float">
            <text:p>22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1.3104" calcext:value-type="float">
            <text:p>1.3104</text:p>
          </table:table-cell>
          <table:table-cell office:value-type="float" office:value="78.62" calcext:value-type="float">
            <text:p>78.62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formula="of:=[.H236]-[.F236]" office:value-type="float" office:value="14.38" calcext:value-type="float">
            <text:p>14.38</text:p>
          </table:table-cell>
          <table:table-cell table:formula="of:=ABS([.J236])" office:value-type="float" office:value="14.38" calcext:value-type="float">
            <text:p>14.38</text:p>
          </table:table-cell>
          <table:table-cell table:formula="of:=[.K236]/[.F236]*100" office:value-type="float" office:value="18.2905113202747" calcext:value-type="float">
            <text:p>18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1.3247" calcext:value-type="float">
            <text:p>1.3247</text:p>
          </table:table-cell>
          <table:table-cell office:value-type="float" office:value="79.48" calcext:value-type="float">
            <text:p>79.48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formula="of:=[.H237]-[.F237]" office:value-type="float" office:value="13.52" calcext:value-type="float">
            <text:p>13.52</text:p>
          </table:table-cell>
          <table:table-cell table:formula="of:=ABS([.J237])" office:value-type="float" office:value="13.52" calcext:value-type="float">
            <text:p>13.52</text:p>
          </table:table-cell>
          <table:table-cell table:formula="of:=[.K237]/[.F237]*100" office:value-type="float" office:value="17.0105686965274" calcext:value-type="float">
            <text:p>17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1.3265" calcext:value-type="float">
            <text:p>1.3265</text:p>
          </table:table-cell>
          <table:table-cell office:value-type="float" office:value="79.59" calcext:value-type="float">
            <text:p>79.5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238]-[.F238]" office:value-type="float" office:value="-7.59" calcext:value-type="float">
            <text:p>-7.59</text:p>
          </table:table-cell>
          <table:table-cell table:formula="of:=ABS([.J238])" office:value-type="float" office:value="7.59" calcext:value-type="float">
            <text:p>7.59</text:p>
          </table:table-cell>
          <table:table-cell table:formula="of:=[.K238]/[.F238]*100" office:value-type="float" office:value="9.53637391632115" calcext:value-type="float">
            <text:p>9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1.331" calcext:value-type="float">
            <text:p>1.331</text:p>
          </table:table-cell>
          <table:table-cell office:value-type="float" office:value="79.86" calcext:value-type="float">
            <text:p>79.86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formula="of:=[.H239]-[.F239]" office:value-type="float" office:value="-16.86" calcext:value-type="float">
            <text:p>-16.86</text:p>
          </table:table-cell>
          <table:table-cell table:formula="of:=ABS([.J239])" office:value-type="float" office:value="16.86" calcext:value-type="float">
            <text:p>16.86</text:p>
          </table:table-cell>
          <table:table-cell table:formula="of:=[.K239]/[.F239]*100" office:value-type="float" office:value="21.1119459053343" calcext:value-type="float">
            <text:p>2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1.3352" calcext:value-type="float">
            <text:p>1.3352</text:p>
          </table:table-cell>
          <table:table-cell office:value-type="float" office:value="80.11" calcext:value-type="float">
            <text:p>80.1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240]-[.F240]" office:value-type="float" office:value="-17.11" calcext:value-type="float">
            <text:p>-17.11</text:p>
          </table:table-cell>
          <table:table-cell table:formula="of:=ABS([.J240])" office:value-type="float" office:value="17.11" calcext:value-type="float">
            <text:p>17.11</text:p>
          </table:table-cell>
          <table:table-cell table:formula="of:=[.K240]/[.F240]*100" office:value-type="float" office:value="21.3581325677194" calcext:value-type="float">
            <text:p>2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.3193" calcext:value-type="float">
            <text:p>1.3193</text:p>
          </table:table-cell>
          <table:table-cell office:value-type="float" office:value="79.16" calcext:value-type="float">
            <text:p>79.16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241]-[.F241]" office:value-type="float" office:value="-16.16" calcext:value-type="float">
            <text:p>-16.16</text:p>
          </table:table-cell>
          <table:table-cell table:formula="of:=ABS([.J241])" office:value-type="float" office:value="16.16" calcext:value-type="float">
            <text:p>16.16</text:p>
          </table:table-cell>
          <table:table-cell table:formula="of:=[.K241]/[.F241]*100" office:value-type="float" office:value="20.4143506821627" calcext:value-type="float">
            <text:p>2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76" calcext:value-type="float">
            <text:p>76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1.3044" calcext:value-type="float">
            <text:p>1.3044</text:p>
          </table:table-cell>
          <table:table-cell office:value-type="float" office:value="78.26" calcext:value-type="float">
            <text:p>78.26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242]-[.F242]" office:value-type="float" office:value="-15.26" calcext:value-type="float">
            <text:p>-15.26</text:p>
          </table:table-cell>
          <table:table-cell table:formula="of:=ABS([.J242])" office:value-type="float" office:value="15.26" calcext:value-type="float">
            <text:p>15.26</text:p>
          </table:table-cell>
          <table:table-cell table:formula="of:=[.K242]/[.F242]*100" office:value-type="float" office:value="19.4991055456172" calcext:value-type="float">
            <text:p>19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77" calcext:value-type="float">
            <text:p>7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1.2864" calcext:value-type="float">
            <text:p>1.2864</text:p>
          </table:table-cell>
          <table:table-cell office:value-type="float" office:value="77.18" calcext:value-type="float">
            <text:p>77.18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[.H243]-[.F243]" office:value-type="float" office:value="-2.18000000000001" calcext:value-type="float">
            <text:p>-2.18000000000001</text:p>
          </table:table-cell>
          <table:table-cell table:formula="of:=ABS([.J243])" office:value-type="float" office:value="2.18000000000001" calcext:value-type="float">
            <text:p>2.18000000000001</text:p>
          </table:table-cell>
          <table:table-cell table:formula="of:=[.K243]/[.F243]*100" office:value-type="float" office:value="2.82456594972792" calcext:value-type="float">
            <text:p>2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1.2824" calcext:value-type="float">
            <text:p>1.2824</text:p>
          </table:table-cell>
          <table:table-cell office:value-type="float" office:value="76.95" calcext:value-type="float">
            <text:p>76.95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formula="of:=[.H244]-[.F244]" office:value-type="float" office:value="1.05" calcext:value-type="float">
            <text:p>1.05</text:p>
          </table:table-cell>
          <table:table-cell table:formula="of:=ABS([.J244])" office:value-type="float" office:value="1.05" calcext:value-type="float">
            <text:p>1.05</text:p>
          </table:table-cell>
          <table:table-cell table:formula="of:=[.K244]/[.F244]*100" office:value-type="float" office:value="1.36452241715399" calcext:value-type="float">
            <text:p>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79" calcext:value-type="float">
            <text:p>79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1.286" calcext:value-type="float">
            <text:p>1.286</text:p>
          </table:table-cell>
          <table:table-cell office:value-type="float" office:value="77.16" calcext:value-type="float">
            <text:p>77.16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245]-[.F245]" office:value-type="float" office:value="0.840000000000003" calcext:value-type="float">
            <text:p>0.840000000000003</text:p>
          </table:table-cell>
          <table:table-cell table:formula="of:=ABS([.J245])" office:value-type="float" office:value="0.840000000000003" calcext:value-type="float">
            <text:p>0.840000000000003</text:p>
          </table:table-cell>
          <table:table-cell table:formula="of:=[.K245]/[.F245]*100" office:value-type="float" office:value="1.0886469673406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415" calcext:value-type="float">
            <text:p>415</text:p>
          </table:table-cell>
          <table:table-cell office:value-type="float" office:value="1.2906" calcext:value-type="float">
            <text:p>1.2906</text:p>
          </table:table-cell>
          <table:table-cell office:value-type="float" office:value="77.43" calcext:value-type="float">
            <text:p>77.43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246]-[.F246]" office:value-type="float" office:value="0.569999999999993" calcext:value-type="float">
            <text:p>0.569999999999993</text:p>
          </table:table-cell>
          <table:table-cell table:formula="of:=ABS([.J246])" office:value-type="float" office:value="0.569999999999993" calcext:value-type="float">
            <text:p>0.569999999999993</text:p>
          </table:table-cell>
          <table:table-cell table:formula="of:=[.K246]/[.F246]*100" office:value-type="float" office:value="0.736148779542804" calcext:value-type="float">
            <text:p>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3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1.2977" calcext:value-type="float">
            <text:p>1.2977</text:p>
          </table:table-cell>
          <table:table-cell office:value-type="float" office:value="77.86" calcext:value-type="float">
            <text:p>77.86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247]-[.F247]" office:value-type="float" office:value="0.140000000000001" calcext:value-type="float">
            <text:p>0.140000000000001</text:p>
          </table:table-cell>
          <table:table-cell table:formula="of:=ABS([.J247])" office:value-type="float" office:value="0.140000000000001" calcext:value-type="float">
            <text:p>0.140000000000001</text:p>
          </table:table-cell>
          <table:table-cell table:formula="of:=[.K247]/[.F247]*100" office:value-type="float" office:value="0.179809915232469" calcext:value-type="float">
            <text:p>0.2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1682" calcext:value-type="float">
            <text:p>1.1682</text:p>
          </table:table-cell>
          <table:table-cell office:value-type="float" office:value="70.09" calcext:value-type="float">
            <text:p>70.0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formula="of:=[.H248]-[.F248]" office:value-type="float" office:value="-10.09" calcext:value-type="float">
            <text:p>-10.09</text:p>
          </table:table-cell>
          <table:table-cell table:formula="of:=ABS([.J248])" office:value-type="float" office:value="10.09" calcext:value-type="float">
            <text:p>10.09</text:p>
          </table:table-cell>
          <table:table-cell table:formula="of:=[.K248]/[.F248]*100" office:value-type="float" office:value="14.395776858325" calcext:value-type="float">
            <text:p>14.4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1763" calcext:value-type="float">
            <text:p>1.1763</text:p>
          </table:table-cell>
          <table:table-cell office:value-type="float" office:value="70.58" calcext:value-type="float">
            <text:p>70.5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H249]-[.F249]" office:value-type="float" office:value="19.42" calcext:value-type="float">
            <text:p>19.42</text:p>
          </table:table-cell>
          <table:table-cell table:formula="of:=ABS([.J249])" office:value-type="float" office:value="19.42" calcext:value-type="float">
            <text:p>19.42</text:p>
          </table:table-cell>
          <table:table-cell table:formula="of:=[.K249]/[.F249]*100" office:value-type="float" office:value="27.5148767356192" calcext:value-type="float">
            <text:p>27.5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2145" calcext:value-type="float">
            <text:p>1.2145</text:p>
          </table:table-cell>
          <table:table-cell office:value-type="float" office:value="72.87" calcext:value-type="float">
            <text:p>72.87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[.H250]-[.F250]" office:value-type="float" office:value="17.13" calcext:value-type="float">
            <text:p>17.13</text:p>
          </table:table-cell>
          <table:table-cell table:formula="of:=ABS([.J250])" office:value-type="float" office:value="17.13" calcext:value-type="float">
            <text:p>17.13</text:p>
          </table:table-cell>
          <table:table-cell table:formula="of:=[.K250]/[.F250]*100" office:value-type="float" office:value="23.5076163030053" calcext:value-type="float">
            <text:p>23.5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2463" calcext:value-type="float">
            <text:p>1.2463</text:p>
          </table:table-cell>
          <table:table-cell office:value-type="float" office:value="74.78" calcext:value-type="float">
            <text:p>74.7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251]-[.F251]" office:value-type="float" office:value="15.22" calcext:value-type="float">
            <text:p>15.22</text:p>
          </table:table-cell>
          <table:table-cell table:formula="of:=ABS([.J251])" office:value-type="float" office:value="15.22" calcext:value-type="float">
            <text:p>15.22</text:p>
          </table:table-cell>
          <table:table-cell table:formula="of:=[.K251]/[.F251]*100" office:value-type="float" office:value="20.3530355710083" calcext:value-type="float">
            <text:p>20.4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.2646" calcext:value-type="float">
            <text:p>1.2646</text:p>
          </table:table-cell>
          <table:table-cell office:value-type="float" office:value="75.88" calcext:value-type="float">
            <text:p>75.8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252]-[.F252]" office:value-type="float" office:value="14.12" calcext:value-type="float">
            <text:p>14.12</text:p>
          </table:table-cell>
          <table:table-cell table:formula="of:=ABS([.J252])" office:value-type="float" office:value="14.12" calcext:value-type="float">
            <text:p>14.12</text:p>
          </table:table-cell>
          <table:table-cell table:formula="of:=[.K252]/[.F252]*100" office:value-type="float" office:value="18.6083289404323" calcext:value-type="float">
            <text:p>18.6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2741" calcext:value-type="float">
            <text:p>1.2741</text:p>
          </table:table-cell>
          <table:table-cell office:value-type="float" office:value="76.45" calcext:value-type="float">
            <text:p>76.45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formula="of:=[.H253]-[.F253]" office:value-type="float" office:value="13.55" calcext:value-type="float">
            <text:p>13.55</text:p>
          </table:table-cell>
          <table:table-cell table:formula="of:=ABS([.J253])" office:value-type="float" office:value="13.55" calcext:value-type="float">
            <text:p>13.55</text:p>
          </table:table-cell>
          <table:table-cell table:formula="of:=[.K253]/[.F253]*100" office:value-type="float" office:value="17.7240026160889" calcext:value-type="float">
            <text:p>17.7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2794" calcext:value-type="float">
            <text:p>1.2794</text:p>
          </table:table-cell>
          <table:table-cell office:value-type="float" office:value="76.76" calcext:value-type="float">
            <text:p>76.76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[.H254]-[.F254]" office:value-type="float" office:value="13.24" calcext:value-type="float">
            <text:p>13.24</text:p>
          </table:table-cell>
          <table:table-cell table:formula="of:=ABS([.J254])" office:value-type="float" office:value="13.24" calcext:value-type="float">
            <text:p>13.24</text:p>
          </table:table-cell>
          <table:table-cell table:formula="of:=[.K254]/[.F254]*100" office:value-type="float" office:value="17.2485669619593" calcext:value-type="float">
            <text:p>17.2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.2702" calcext:value-type="float">
            <text:p>1.2702</text:p>
          </table:table-cell>
          <table:table-cell office:value-type="float" office:value="76.21" calcext:value-type="float">
            <text:p>76.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255]-[.F255]" office:value-type="float" office:value="-16.21" calcext:value-type="float">
            <text:p>-16.21</text:p>
          </table:table-cell>
          <table:table-cell table:formula="of:=ABS([.J255])" office:value-type="float" office:value="16.21" calcext:value-type="float">
            <text:p>16.21</text:p>
          </table:table-cell>
          <table:table-cell table:formula="of:=[.K255]/[.F255]*100" office:value-type="float" office:value="21.2701745177798" calcext:value-type="float">
            <text:p>21.3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.2637" calcext:value-type="float">
            <text:p>1.2637</text:p>
          </table:table-cell>
          <table:table-cell office:value-type="float" office:value="75.82" calcext:value-type="float">
            <text:p>75.8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[.H256]-[.F256]" office:value-type="float" office:value="-15.82" calcext:value-type="float">
            <text:p>-15.82</text:p>
          </table:table-cell>
          <table:table-cell table:formula="of:=ABS([.J256])" office:value-type="float" office:value="15.82" calcext:value-type="float">
            <text:p>15.82</text:p>
          </table:table-cell>
          <table:table-cell table:formula="of:=[.K256]/[.F256]*100" office:value-type="float" office:value="20.8652070693748" calcext:value-type="float">
            <text:p>20.9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.2485" calcext:value-type="float">
            <text:p>1.2485</text:p>
          </table:table-cell>
          <table:table-cell office:value-type="float" office:value="74.91" calcext:value-type="float">
            <text:p>74.9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[.H257]-[.F257]" office:value-type="float" office:value="-14.91" calcext:value-type="float">
            <text:p>-14.91</text:p>
          </table:table-cell>
          <table:table-cell table:formula="of:=ABS([.J257])" office:value-type="float" office:value="14.91" calcext:value-type="float">
            <text:p>14.91</text:p>
          </table:table-cell>
          <table:table-cell table:formula="of:=[.K257]/[.F257]*100" office:value-type="float" office:value="19.9038846615939" calcext:value-type="float">
            <text:p>19.9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2255" calcext:value-type="float">
            <text:p>1.2255</text:p>
          </table:table-cell>
          <table:table-cell office:value-type="float" office:value="73.53" calcext:value-type="float">
            <text:p>73.53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formula="of:=[.H258]-[.F258]" office:value-type="float" office:value="-10.53" calcext:value-type="float">
            <text:p>-10.53</text:p>
          </table:table-cell>
          <table:table-cell table:formula="of:=ABS([.J258])" office:value-type="float" office:value="10.53" calcext:value-type="float">
            <text:p>10.53</text:p>
          </table:table-cell>
          <table:table-cell table:formula="of:=[.K258]/[.F258]*100" office:value-type="float" office:value="14.3206854345165" calcext:value-type="float">
            <text:p>14.3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.2268" calcext:value-type="float">
            <text:p>1.2268</text:p>
          </table:table-cell>
          <table:table-cell office:value-type="float" office:value="73.61" calcext:value-type="float">
            <text:p>73.6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259]-[.F259]" office:value-type="float" office:value="-10.61" calcext:value-type="float">
            <text:p>-10.61</text:p>
          </table:table-cell>
          <table:table-cell table:formula="of:=ABS([.J259])" office:value-type="float" office:value="10.61" calcext:value-type="float">
            <text:p>10.61</text:p>
          </table:table-cell>
          <table:table-cell table:formula="of:=[.K259]/[.F259]*100" office:value-type="float" office:value="14.4138024724902" calcext:value-type="float">
            <text:p>14.4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2314" calcext:value-type="float">
            <text:p>1.2314</text:p>
          </table:table-cell>
          <table:table-cell office:value-type="float" office:value="73.88" calcext:value-type="float">
            <text:p>73.88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formula="of:=[.H260]-[.F260]" office:value-type="float" office:value="-1.88" calcext:value-type="float">
            <text:p>-1.88</text:p>
          </table:table-cell>
          <table:table-cell table:formula="of:=ABS([.J260])" office:value-type="float" office:value="1.88" calcext:value-type="float">
            <text:p>1.88</text:p>
          </table:table-cell>
          <table:table-cell table:formula="of:=[.K260]/[.F260]*100" office:value-type="float" office:value="2.54466702761234" calcext:value-type="float">
            <text:p>2.5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.2298" calcext:value-type="float">
            <text:p>1.2298</text:p>
          </table:table-cell>
          <table:table-cell office:value-type="float" office:value="73.79" calcext:value-type="float">
            <text:p>73.79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261]-[.F261]" office:value-type="float" office:value="1.20999999999999" calcext:value-type="float">
            <text:p>1.20999999999999</text:p>
          </table:table-cell>
          <table:table-cell table:formula="of:=ABS([.J261])" office:value-type="float" office:value="1.20999999999999" calcext:value-type="float">
            <text:p>1.20999999999999</text:p>
          </table:table-cell>
          <table:table-cell table:formula="of:=[.K261]/[.F261]*100" office:value-type="float" office:value="1.63978858923973" calcext:value-type="float">
            <text:p>1.6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.2273" calcext:value-type="float">
            <text:p>1.2273</text:p>
          </table:table-cell>
          <table:table-cell office:value-type="float" office:value="73.64" calcext:value-type="float">
            <text:p>73.64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[.H262]-[.F262]" office:value-type="float" office:value="1.36" calcext:value-type="float">
            <text:p>1.36</text:p>
          </table:table-cell>
          <table:table-cell table:formula="of:=ABS([.J262])" office:value-type="float" office:value="1.36" calcext:value-type="float">
            <text:p>1.36</text:p>
          </table:table-cell>
          <table:table-cell table:formula="of:=[.K262]/[.F262]*100" office:value-type="float" office:value="1.84682237914177" calcext:value-type="float">
            <text:p>1.8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.2073" calcext:value-type="float">
            <text:p>1.2073</text:p>
          </table:table-cell>
          <table:table-cell office:value-type="float" office:value="72.44" calcext:value-type="float">
            <text:p>72.4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263]-[.F263]" office:value-type="float" office:value="2.56" calcext:value-type="float">
            <text:p>2.56</text:p>
          </table:table-cell>
          <table:table-cell table:formula="of:=ABS([.J263])" office:value-type="float" office:value="2.56" calcext:value-type="float">
            <text:p>2.56</text:p>
          </table:table-cell>
          <table:table-cell table:formula="of:=[.K263]/[.F263]*100" office:value-type="float" office:value="3.53395913859746" calcext:value-type="float">
            <text:p>3.5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1889" calcext:value-type="float">
            <text:p>1.1889</text:p>
          </table:table-cell>
          <table:table-cell office:value-type="float" office:value="71.34" calcext:value-type="float">
            <text:p>71.3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264]-[.F264]" office:value-type="float" office:value="3.66" calcext:value-type="float">
            <text:p>3.66</text:p>
          </table:table-cell>
          <table:table-cell table:formula="of:=ABS([.J264])" office:value-type="float" office:value="3.66" calcext:value-type="float">
            <text:p>3.66</text:p>
          </table:table-cell>
          <table:table-cell table:formula="of:=[.K264]/[.F264]*100" office:value-type="float" office:value="5.13036164844407" calcext:value-type="float">
            <text:p>5.1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.1916" calcext:value-type="float">
            <text:p>1.1916</text:p>
          </table:table-cell>
          <table:table-cell office:value-type="float" office:value="71.5" calcext:value-type="float">
            <text:p>71.5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table:formula="of:=[.H265]-[.F265]" office:value-type="float" office:value="3.5" calcext:value-type="float">
            <text:p>3.5</text:p>
          </table:table-cell>
          <table:table-cell table:formula="of:=ABS([.J265])" office:value-type="float" office:value="3.5" calcext:value-type="float">
            <text:p>3.5</text:p>
          </table:table-cell>
          <table:table-cell table:formula="of:=[.K265]/[.F265]*100" office:value-type="float" office:value="4.8951048951049" calcext:value-type="float">
            <text:p>4.9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.2144" calcext:value-type="float">
            <text:p>1.2144</text:p>
          </table:table-cell>
          <table:table-cell office:value-type="float" office:value="72.86" calcext:value-type="float">
            <text:p>72.86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table:formula="of:=[.H266]-[.F266]" office:value-type="float" office:value="2.14" calcext:value-type="float">
            <text:p>2.14</text:p>
          </table:table-cell>
          <table:table-cell table:formula="of:=ABS([.J266])" office:value-type="float" office:value="2.14" calcext:value-type="float">
            <text:p>2.14</text:p>
          </table:table-cell>
          <table:table-cell table:formula="of:=[.K266]/[.F266]*100" office:value-type="float" office:value="2.93713972001098" calcext:value-type="float">
            <text:p>2.9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.2356" calcext:value-type="float">
            <text:p>1.2356</text:p>
          </table:table-cell>
          <table:table-cell office:value-type="float" office:value="74.14" calcext:value-type="float">
            <text:p>74.1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67]-[.F267]" office:value-type="float" office:value="-20.14" calcext:value-type="float">
            <text:p>-20.14</text:p>
          </table:table-cell>
          <table:table-cell table:formula="of:=ABS([.J267])" office:value-type="float" office:value="20.14" calcext:value-type="float">
            <text:p>20.14</text:p>
          </table:table-cell>
          <table:table-cell table:formula="of:=[.K267]/[.F267]*100" office:value-type="float" office:value="27.1648233072565" calcext:value-type="float">
            <text:p>27.2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.2493" calcext:value-type="float">
            <text:p>1.2493</text:p>
          </table:table-cell>
          <table:table-cell office:value-type="float" office:value="74.96" calcext:value-type="float">
            <text:p>74.9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68]-[.F268]" office:value-type="float" office:value="-20.96" calcext:value-type="float">
            <text:p>-20.96</text:p>
          </table:table-cell>
          <table:table-cell table:formula="of:=ABS([.J268])" office:value-type="float" office:value="20.96" calcext:value-type="float">
            <text:p>20.96</text:p>
          </table:table-cell>
          <table:table-cell table:formula="of:=[.K268]/[.F268]*100" office:value-type="float" office:value="27.9615795090715" calcext:value-type="float">
            <text:p>28.0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.2657" calcext:value-type="float">
            <text:p>1.2657</text:p>
          </table:table-cell>
          <table:table-cell office:value-type="float" office:value="75.94" calcext:value-type="float">
            <text:p>75.94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H269]-[.F269]" office:value-type="float" office:value="-24.94" calcext:value-type="float">
            <text:p>-24.94</text:p>
          </table:table-cell>
          <table:table-cell table:formula="of:=ABS([.J269])" office:value-type="float" office:value="24.94" calcext:value-type="float">
            <text:p>24.94</text:p>
          </table:table-cell>
          <table:table-cell table:formula="of:=[.K269]/[.F269]*100" office:value-type="float" office:value="32.8417171451146" calcext:value-type="float">
            <text:p>32.8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.2556" calcext:value-type="float">
            <text:p>1.2556</text:p>
          </table:table-cell>
          <table:table-cell office:value-type="float" office:value="75.34" calcext:value-type="float">
            <text:p>75.34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H270]-[.F270]" office:value-type="float" office:value="-24.34" calcext:value-type="float">
            <text:p>-24.34</text:p>
          </table:table-cell>
          <table:table-cell table:formula="of:=ABS([.J270])" office:value-type="float" office:value="24.34" calcext:value-type="float">
            <text:p>24.34</text:p>
          </table:table-cell>
          <table:table-cell table:formula="of:=[.K270]/[.F270]*100" office:value-type="float" office:value="32.3068754977436" calcext:value-type="float">
            <text:p>32.3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.2638" calcext:value-type="float">
            <text:p>1.2638</text:p>
          </table:table-cell>
          <table:table-cell office:value-type="float" office:value="75.83" calcext:value-type="float">
            <text:p>75.83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H271]-[.F271]" office:value-type="float" office:value="-24.83" calcext:value-type="float">
            <text:p>-24.83</text:p>
          </table:table-cell>
          <table:table-cell table:formula="of:=ABS([.J271])" office:value-type="float" office:value="24.83" calcext:value-type="float">
            <text:p>24.83</text:p>
          </table:table-cell>
          <table:table-cell table:formula="of:=[.K271]/[.F271]*100" office:value-type="float" office:value="32.7442964525913" calcext:value-type="float">
            <text:p>32.7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.2625" calcext:value-type="float">
            <text:p>1.2625</text:p>
          </table:table-cell>
          <table:table-cell office:value-type="float" office:value="75.75" calcext:value-type="float">
            <text:p>75.7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H272]-[.F272]" office:value-type="float" office:value="-24.75" calcext:value-type="float">
            <text:p>-24.75</text:p>
          </table:table-cell>
          <table:table-cell table:formula="of:=ABS([.J272])" office:value-type="float" office:value="24.75" calcext:value-type="float">
            <text:p>24.75</text:p>
          </table:table-cell>
          <table:table-cell table:formula="of:=[.K272]/[.F272]*100" office:value-type="float" office:value="32.6732673267327" calcext:value-type="float">
            <text:p>32.7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.2777" calcext:value-type="float">
            <text:p>1.2777</text:p>
          </table:table-cell>
          <table:table-cell office:value-type="float" office:value="76.66" calcext:value-type="float">
            <text:p>76.6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73]-[.F273]" office:value-type="float" office:value="-22.66" calcext:value-type="float">
            <text:p>-22.66</text:p>
          </table:table-cell>
          <table:table-cell table:formula="of:=ABS([.J273])" office:value-type="float" office:value="22.66" calcext:value-type="float">
            <text:p>22.66</text:p>
          </table:table-cell>
          <table:table-cell table:formula="of:=[.K273]/[.F273]*100" office:value-type="float" office:value="29.5590920949648" calcext:value-type="float">
            <text:p>29.6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.2878" calcext:value-type="float">
            <text:p>1.2878</text:p>
          </table:table-cell>
          <table:table-cell office:value-type="float" office:value="77.27" calcext:value-type="float">
            <text:p>77.2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74]-[.F274]" office:value-type="float" office:value="-23.27" calcext:value-type="float">
            <text:p>-23.27</text:p>
          </table:table-cell>
          <table:table-cell table:formula="of:=ABS([.J274])" office:value-type="float" office:value="23.27" calcext:value-type="float">
            <text:p>23.27</text:p>
          </table:table-cell>
          <table:table-cell table:formula="of:=[.K274]/[.F274]*100" office:value-type="float" office:value="30.1151805357836" calcext:value-type="float">
            <text:p>30.1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.2918" calcext:value-type="float">
            <text:p>1.2918</text:p>
          </table:table-cell>
          <table:table-cell office:value-type="float" office:value="77.51" calcext:value-type="float">
            <text:p>77.51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table:formula="of:=[.H275]-[.F275]" office:value-type="float" office:value="-23.51" calcext:value-type="float">
            <text:p>-23.51</text:p>
          </table:table-cell>
          <table:table-cell table:formula="of:=ABS([.J275])" office:value-type="float" office:value="23.51" calcext:value-type="float">
            <text:p>23.51</text:p>
          </table:table-cell>
          <table:table-cell table:formula="of:=[.K275]/[.F275]*100" office:value-type="float" office:value="30.3315701199845" calcext:value-type="float">
            <text:p>30.3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.289" calcext:value-type="float">
            <text:p>1.289</text:p>
          </table:table-cell>
          <table:table-cell office:value-type="float" office:value="77.34" calcext:value-type="float">
            <text:p>77.34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formula="of:=[.H276]-[.F276]" office:value-type="float" office:value="-23.34" calcext:value-type="float">
            <text:p>-23.34</text:p>
          </table:table-cell>
          <table:table-cell table:formula="of:=ABS([.J276])" office:value-type="float" office:value="23.34" calcext:value-type="float">
            <text:p>23.34</text:p>
          </table:table-cell>
          <table:table-cell table:formula="of:=[.K276]/[.F276]*100" office:value-type="float" office:value="30.1784328937161" calcext:value-type="float">
            <text:p>30.2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.2802" calcext:value-type="float">
            <text:p>1.2802</text:p>
          </table:table-cell>
          <table:table-cell office:value-type="float" office:value="76.81" calcext:value-type="float">
            <text:p>76.8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77]-[.F277]" office:value-type="float" office:value="-22.81" calcext:value-type="float">
            <text:p>-22.81</text:p>
          </table:table-cell>
          <table:table-cell table:formula="of:=ABS([.J277])" office:value-type="float" office:value="22.81" calcext:value-type="float">
            <text:p>22.81</text:p>
          </table:table-cell>
          <table:table-cell table:formula="of:=[.K277]/[.F277]*100" office:value-type="float" office:value="29.6966540814998" calcext:value-type="float">
            <text:p>29.7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.2662" calcext:value-type="float">
            <text:p>1.2662</text:p>
          </table:table-cell>
          <table:table-cell office:value-type="float" office:value="75.97" calcext:value-type="float">
            <text:p>75.9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78]-[.F278]" office:value-type="float" office:value="-21.97" calcext:value-type="float">
            <text:p>-21.97</text:p>
          </table:table-cell>
          <table:table-cell table:formula="of:=ABS([.J278])" office:value-type="float" office:value="21.97" calcext:value-type="float">
            <text:p>21.97</text:p>
          </table:table-cell>
          <table:table-cell table:formula="of:=[.K278]/[.F278]*100" office:value-type="float" office:value="28.9193102540476" calcext:value-type="float">
            <text:p>28.9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.2419" calcext:value-type="float">
            <text:p>1.2419</text:p>
          </table:table-cell>
          <table:table-cell office:value-type="float" office:value="74.51" calcext:value-type="float">
            <text:p>74.5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79]-[.F279]" office:value-type="float" office:value="-20.51" calcext:value-type="float">
            <text:p>-20.51</text:p>
          </table:table-cell>
          <table:table-cell table:formula="of:=ABS([.J279])" office:value-type="float" office:value="20.51" calcext:value-type="float">
            <text:p>20.51</text:p>
          </table:table-cell>
          <table:table-cell table:formula="of:=[.K279]/[.F279]*100" office:value-type="float" office:value="27.5265065091934" calcext:value-type="float">
            <text:p>27.5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.2413" calcext:value-type="float">
            <text:p>1.2413</text:p>
          </table:table-cell>
          <table:table-cell office:value-type="float" office:value="74.48" calcext:value-type="float">
            <text:p>74.48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formula="of:=[.H280]-[.F280]" office:value-type="float" office:value="-17.48" calcext:value-type="float">
            <text:p>-17.48</text:p>
          </table:table-cell>
          <table:table-cell table:formula="of:=ABS([.J280])" office:value-type="float" office:value="17.48" calcext:value-type="float">
            <text:p>17.48</text:p>
          </table:table-cell>
          <table:table-cell table:formula="of:=[.K280]/[.F280]*100" office:value-type="float" office:value="23.469387755102" calcext:value-type="float">
            <text:p>23.5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.2264" calcext:value-type="float">
            <text:p>1.2264</text:p>
          </table:table-cell>
          <table:table-cell office:value-type="float" office:value="73.58" calcext:value-type="float">
            <text:p>73.58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formula="of:=[.H281]-[.F281]" office:value-type="float" office:value="-7.58" calcext:value-type="float">
            <text:p>-7.58</text:p>
          </table:table-cell>
          <table:table-cell table:formula="of:=ABS([.J281])" office:value-type="float" office:value="7.58" calcext:value-type="float">
            <text:p>7.58</text:p>
          </table:table-cell>
          <table:table-cell table:formula="of:=[.K281]/[.F281]*100" office:value-type="float" office:value="10.3017124218538" calcext:value-type="float">
            <text:p>10.3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.2327" calcext:value-type="float">
            <text:p>1.2327</text:p>
          </table:table-cell>
          <table:table-cell office:value-type="float" office:value="73.96" calcext:value-type="float">
            <text:p>73.96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formula="of:=[.H282]-[.F282]" office:value-type="float" office:value="-7.95999999999999" calcext:value-type="float">
            <text:p>-7.95999999999999</text:p>
          </table:table-cell>
          <table:table-cell table:formula="of:=ABS([.J282])" office:value-type="float" office:value="7.95999999999999" calcext:value-type="float">
            <text:p>7.95999999999999</text:p>
          </table:table-cell>
          <table:table-cell table:formula="of:=[.K282]/[.F282]*100" office:value-type="float" office:value="10.7625743645214" calcext:value-type="float">
            <text:p>10.8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.2536" calcext:value-type="float">
            <text:p>1.2536</text:p>
          </table:table-cell>
          <table:table-cell office:value-type="float" office:value="75.22" calcext:value-type="float">
            <text:p>75.2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283]-[.F283]" office:value-type="float" office:value="-9.22" calcext:value-type="float">
            <text:p>-9.22</text:p>
          </table:table-cell>
          <table:table-cell table:formula="of:=ABS([.J283])" office:value-type="float" office:value="9.22" calcext:value-type="float">
            <text:p>9.22</text:p>
          </table:table-cell>
          <table:table-cell table:formula="of:=[.K283]/[.F283]*100" office:value-type="float" office:value="12.25737835682" calcext:value-type="float">
            <text:p>12.3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.2556" calcext:value-type="float">
            <text:p>1.2556</text:p>
          </table:table-cell>
          <table:table-cell office:value-type="float" office:value="75.34" calcext:value-type="float">
            <text:p>75.34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[.H284]-[.F284]" office:value-type="float" office:value="-9.34" calcext:value-type="float">
            <text:p>-9.34</text:p>
          </table:table-cell>
          <table:table-cell table:formula="of:=ABS([.J284])" office:value-type="float" office:value="9.34" calcext:value-type="float">
            <text:p>9.34</text:p>
          </table:table-cell>
          <table:table-cell table:formula="of:=[.K284]/[.F284]*100" office:value-type="float" office:value="12.3971329970799" calcext:value-type="float">
            <text:p>12.4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.2603" calcext:value-type="float">
            <text:p>1.2603</text:p>
          </table:table-cell>
          <table:table-cell office:value-type="float" office:value="75.62" calcext:value-type="float">
            <text:p>75.62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formula="of:=[.H285]-[.F285]" office:value-type="float" office:value="-0.620000000000005" calcext:value-type="float">
            <text:p>-0.620000000000005</text:p>
          </table:table-cell>
          <table:table-cell table:formula="of:=ABS([.J285])" office:value-type="float" office:value="0.620000000000005" calcext:value-type="float">
            <text:p>0.620000000000005</text:p>
          </table:table-cell>
          <table:table-cell table:formula="of:=[.K285]/[.F285]*100" office:value-type="float" office:value="0.819888918275595" calcext:value-type="float">
            <text:p>0.8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.2471" calcext:value-type="float">
            <text:p>1.2471</text:p>
          </table:table-cell>
          <table:table-cell office:value-type="float" office:value="74.83" calcext:value-type="float">
            <text:p>74.83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286]-[.F286]" office:value-type="float" office:value="3.17" calcext:value-type="float">
            <text:p>3.17</text:p>
          </table:table-cell>
          <table:table-cell table:formula="of:=ABS([.J286])" office:value-type="float" office:value="3.17" calcext:value-type="float">
            <text:p>3.17</text:p>
          </table:table-cell>
          <table:table-cell table:formula="of:=[.K286]/[.F286]*100" office:value-type="float" office:value="4.23626887611921" calcext:value-type="float">
            <text:p>4.2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.2511" calcext:value-type="float">
            <text:p>1.2511</text:p>
          </table:table-cell>
          <table:table-cell office:value-type="float" office:value="75.06" calcext:value-type="float">
            <text:p>75.06</text:p>
          </table:table-cell>
          <table:table-cell office:value-type="float" office:value="1.6" calcext:value-type="float">
            <text:p>1.6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table:formula="of:=[.H287]-[.F287]" office:value-type="float" office:value="20.94" calcext:value-type="float">
            <text:p>20.94</text:p>
          </table:table-cell>
          <table:table-cell table:formula="of:=ABS([.J287])" office:value-type="float" office:value="20.94" calcext:value-type="float">
            <text:p>20.94</text:p>
          </table:table-cell>
          <table:table-cell table:formula="of:=[.K287]/[.F287]*100" office:value-type="float" office:value="27.8976818545164" calcext:value-type="float">
            <text:p>27.9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1.2577" calcext:value-type="float">
            <text:p>1.2577</text:p>
          </table:table-cell>
          <table:table-cell office:value-type="float" office:value="75.46" calcext:value-type="float">
            <text:p>75.46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table:formula="of:=[.H288]-[.F288]" office:value-type="float" office:value="2.54000000000001" calcext:value-type="float">
            <text:p>2.54000000000001</text:p>
          </table:table-cell>
          <table:table-cell table:formula="of:=ABS([.J288])" office:value-type="float" office:value="2.54000000000001" calcext:value-type="float">
            <text:p>2.54000000000001</text:p>
          </table:table-cell>
          <table:table-cell table:formula="of:=[.K288]/[.F288]*100" office:value-type="float" office:value="3.36602173336868" calcext:value-type="float">
            <text:p>3.4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1.2636" calcext:value-type="float">
            <text:p>1.2636</text:p>
          </table:table-cell>
          <table:table-cell office:value-type="float" office:value="75.81" calcext:value-type="float">
            <text:p>75.81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formula="of:=[.H289]-[.F289]" office:value-type="float" office:value="-0.810000000000002" calcext:value-type="float">
            <text:p>-0.810000000000002</text:p>
          </table:table-cell>
          <table:table-cell table:formula="of:=ABS([.J289])" office:value-type="float" office:value="0.810000000000002" calcext:value-type="float">
            <text:p>0.810000000000002</text:p>
          </table:table-cell>
          <table:table-cell table:formula="of:=[.K289]/[.F289]*100" office:value-type="float" office:value="1.06846062524733" calcext:value-type="float">
            <text:p>1.1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1.275" calcext:value-type="float">
            <text:p>1.275</text:p>
          </table:table-cell>
          <table:table-cell office:value-type="float" office:value="76.5" calcext:value-type="float">
            <text:p>76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290]-[.F290]" office:value-type="float" office:value="-4.5" calcext:value-type="float">
            <text:p>-4.5</text:p>
          </table:table-cell>
          <table:table-cell table:formula="of:=ABS([.J290])" office:value-type="float" office:value="4.5" calcext:value-type="float">
            <text:p>4.5</text:p>
          </table:table-cell>
          <table:table-cell table:formula="of:=[.K290]/[.F290]*100" office:value-type="float" office:value="5.88235294117647" calcext:value-type="float">
            <text:p>5.9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.2733" calcext:value-type="float">
            <text:p>1.2733</text:p>
          </table:table-cell>
          <table:table-cell office:value-type="float" office:value="76.4" calcext:value-type="float">
            <text:p>76.4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291]-[.F291]" office:value-type="float" office:value="-13.4" calcext:value-type="float">
            <text:p>-13.4</text:p>
          </table:table-cell>
          <table:table-cell table:formula="of:=ABS([.J291])" office:value-type="float" office:value="13.4" calcext:value-type="float">
            <text:p>13.4</text:p>
          </table:table-cell>
          <table:table-cell table:formula="of:=[.K291]/[.F291]*100" office:value-type="float" office:value="17.5392670157068" calcext:value-type="float">
            <text:p>17.5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1.2512" calcext:value-type="float">
            <text:p>1.2512</text:p>
          </table:table-cell>
          <table:table-cell office:value-type="float" office:value="75.07" calcext:value-type="float">
            <text:p>75.0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H292]-[.F292]" office:value-type="float" office:value="-15.07" calcext:value-type="float">
            <text:p>-15.07</text:p>
          </table:table-cell>
          <table:table-cell table:formula="of:=ABS([.J292])" office:value-type="float" office:value="15.07" calcext:value-type="float">
            <text:p>15.07</text:p>
          </table:table-cell>
          <table:table-cell table:formula="of:=[.K292]/[.F292]*100" office:value-type="float" office:value="20.0745970427601" calcext:value-type="float">
            <text:p>20.1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.2528" calcext:value-type="float">
            <text:p>1.2528</text:p>
          </table:table-cell>
          <table:table-cell office:value-type="float" office:value="75.17" calcext:value-type="float">
            <text:p>75.17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[.H293]-[.F293]" office:value-type="float" office:value="-18.17" calcext:value-type="float">
            <text:p>-18.17</text:p>
          </table:table-cell>
          <table:table-cell table:formula="of:=ABS([.J293])" office:value-type="float" office:value="18.17" calcext:value-type="float">
            <text:p>18.17</text:p>
          </table:table-cell>
          <table:table-cell table:formula="of:=[.K293]/[.F293]*100" office:value-type="float" office:value="24.1718770786218" calcext:value-type="float">
            <text:p>24.2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.2461" calcext:value-type="float">
            <text:p>1.2461</text:p>
          </table:table-cell>
          <table:table-cell office:value-type="float" office:value="74.77" calcext:value-type="float">
            <text:p>74.7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294]-[.F294]" office:value-type="float" office:value="-17.77" calcext:value-type="float">
            <text:p>-17.77</text:p>
          </table:table-cell>
          <table:table-cell table:formula="of:=ABS([.J294])" office:value-type="float" office:value="17.77" calcext:value-type="float">
            <text:p>17.77</text:p>
          </table:table-cell>
          <table:table-cell table:formula="of:=[.K294]/[.F294]*100" office:value-type="float" office:value="23.7662163969506" calcext:value-type="float">
            <text:p>23.8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.2398" calcext:value-type="float">
            <text:p>1.2398</text:p>
          </table:table-cell>
          <table:table-cell office:value-type="float" office:value="74.39" calcext:value-type="float">
            <text:p>74.3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[.H295]-[.F295]" office:value-type="float" office:value="-14.39" calcext:value-type="float">
            <text:p>-14.39</text:p>
          </table:table-cell>
          <table:table-cell table:formula="of:=ABS([.J295])" office:value-type="float" office:value="14.39" calcext:value-type="float">
            <text:p>14.39</text:p>
          </table:table-cell>
          <table:table-cell table:formula="of:=[.K295]/[.F295]*100" office:value-type="float" office:value="19.3439978491733" calcext:value-type="float">
            <text:p>19.3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1.2722" calcext:value-type="float">
            <text:p>1.2722</text:p>
          </table:table-cell>
          <table:table-cell office:value-type="float" office:value="76.33" calcext:value-type="float">
            <text:p>76.3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296]-[.F296]" office:value-type="float" office:value="4.67" calcext:value-type="float">
            <text:p>4.67</text:p>
          </table:table-cell>
          <table:table-cell table:formula="of:=ABS([.J296])" office:value-type="float" office:value="4.67" calcext:value-type="float">
            <text:p>4.67</text:p>
          </table:table-cell>
          <table:table-cell table:formula="of:=[.K296]/[.F296]*100" office:value-type="float" office:value="6.11817109917464" calcext:value-type="float">
            <text:p>6.1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1.2872" calcext:value-type="float">
            <text:p>1.2872</text:p>
          </table:table-cell>
          <table:table-cell office:value-type="float" office:value="77.23" calcext:value-type="float">
            <text:p>77.23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[.H297]-[.F297]" office:value-type="float" office:value="3.77" calcext:value-type="float">
            <text:p>3.77</text:p>
          </table:table-cell>
          <table:table-cell table:formula="of:=ABS([.J297])" office:value-type="float" office:value="3.77" calcext:value-type="float">
            <text:p>3.77</text:p>
          </table:table-cell>
          <table:table-cell table:formula="of:=[.K297]/[.F297]*100" office:value-type="float" office:value="4.88152272432992" calcext:value-type="float">
            <text:p>4.9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1.2931" calcext:value-type="float">
            <text:p>1.2931</text:p>
          </table:table-cell>
          <table:table-cell office:value-type="float" office:value="77.58" calcext:value-type="float">
            <text:p>77.58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formula="of:=[.H298]-[.F298]" office:value-type="float" office:value="3.42" calcext:value-type="float">
            <text:p>3.42</text:p>
          </table:table-cell>
          <table:table-cell table:formula="of:=ABS([.J298])" office:value-type="float" office:value="3.42" calcext:value-type="float">
            <text:p>3.42</text:p>
          </table:table-cell>
          <table:table-cell table:formula="of:=[.K298]/[.F298]*100" office:value-type="float" office:value="4.40835266821346" calcext:value-type="float">
            <text:p>4.4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office:value-type="float" office:value="1.3089" calcext:value-type="float">
            <text:p>1.3089</text:p>
          </table:table-cell>
          <table:table-cell office:value-type="float" office:value="78.53" calcext:value-type="float">
            <text:p>78.5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99]-[.F299]" office:value-type="float" office:value="-24.53" calcext:value-type="float">
            <text:p>-24.53</text:p>
          </table:table-cell>
          <table:table-cell table:formula="of:=ABS([.J299])" office:value-type="float" office:value="24.53" calcext:value-type="float">
            <text:p>24.53</text:p>
          </table:table-cell>
          <table:table-cell table:formula="of:=[.K299]/[.F299]*100" office:value-type="float" office:value="31.2364701388005" calcext:value-type="float">
            <text:p>31.2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1.2938" calcext:value-type="float">
            <text:p>1.2938</text:p>
          </table:table-cell>
          <table:table-cell office:value-type="float" office:value="77.63" calcext:value-type="float">
            <text:p>77.6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300]-[.F300]" office:value-type="float" office:value="-23.63" calcext:value-type="float">
            <text:p>-23.63</text:p>
          </table:table-cell>
          <table:table-cell table:formula="of:=ABS([.J300])" office:value-type="float" office:value="23.63" calcext:value-type="float">
            <text:p>23.63</text:p>
          </table:table-cell>
          <table:table-cell table:formula="of:=[.K300]/[.F300]*100" office:value-type="float" office:value="30.4392631714543" calcext:value-type="float">
            <text:p>30.4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1.2831" calcext:value-type="float">
            <text:p>1.2831</text:p>
          </table:table-cell>
          <table:table-cell office:value-type="float" office:value="76.98" calcext:value-type="float">
            <text:p>76.9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301]-[.F301]" office:value-type="float" office:value="-22.98" calcext:value-type="float">
            <text:p>-22.98</text:p>
          </table:table-cell>
          <table:table-cell table:formula="of:=ABS([.J301])" office:value-type="float" office:value="22.98" calcext:value-type="float">
            <text:p>22.98</text:p>
          </table:table-cell>
          <table:table-cell table:formula="of:=[.K301]/[.F301]*100" office:value-type="float" office:value="29.8519095869057" calcext:value-type="float">
            <text:p>29.9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1.2864" calcext:value-type="float">
            <text:p>1.2864</text:p>
          </table:table-cell>
          <table:table-cell office:value-type="float" office:value="77.18" calcext:value-type="float">
            <text:p>77.1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H302]-[.F302]" office:value-type="float" office:value="-26.18" calcext:value-type="float">
            <text:p>-26.18</text:p>
          </table:table-cell>
          <table:table-cell table:formula="of:=ABS([.J302])" office:value-type="float" office:value="26.18" calcext:value-type="float">
            <text:p>26.18</text:p>
          </table:table-cell>
          <table:table-cell table:formula="of:=[.K302]/[.F302]*100" office:value-type="float" office:value="33.920704845815" calcext:value-type="float">
            <text:p>33.9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1.2719" calcext:value-type="float">
            <text:p>1.2719</text:p>
          </table:table-cell>
          <table:table-cell office:value-type="float" office:value="76.31" calcext:value-type="float">
            <text:p>76.3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H303]-[.F303]" office:value-type="float" office:value="-25.31" calcext:value-type="float">
            <text:p>-25.31</text:p>
          </table:table-cell>
          <table:table-cell table:formula="of:=ABS([.J303])" office:value-type="float" office:value="25.31" calcext:value-type="float">
            <text:p>25.31</text:p>
          </table:table-cell>
          <table:table-cell table:formula="of:=[.K303]/[.F303]*100" office:value-type="float" office:value="33.1673437295243" calcext:value-type="float">
            <text:p>33.2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57" calcext:value-type="float">
            <text:p>57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1.2735" calcext:value-type="float">
            <text:p>1.2735</text:p>
          </table:table-cell>
          <table:table-cell office:value-type="float" office:value="76.41" calcext:value-type="float">
            <text:p>76.4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H304]-[.F304]" office:value-type="float" office:value="-25.41" calcext:value-type="float">
            <text:p>-25.41</text:p>
          </table:table-cell>
          <table:table-cell table:formula="of:=ABS([.J304])" office:value-type="float" office:value="25.41" calcext:value-type="float">
            <text:p>25.41</text:p>
          </table:table-cell>
          <table:table-cell table:formula="of:=[.K304]/[.F304]*100" office:value-type="float" office:value="33.2548095798979" calcext:value-type="float">
            <text:p>33.3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58" calcext:value-type="float">
            <text:p>58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1.273" calcext:value-type="float">
            <text:p>1.273</text:p>
          </table:table-cell>
          <table:table-cell office:value-type="float" office:value="76.38" calcext:value-type="float">
            <text:p>76.3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H305]-[.F305]" office:value-type="float" office:value="-25.38" calcext:value-type="float">
            <text:p>-25.38</text:p>
          </table:table-cell>
          <table:table-cell table:formula="of:=ABS([.J305])" office:value-type="float" office:value="25.38" calcext:value-type="float">
            <text:p>25.38</text:p>
          </table:table-cell>
          <table:table-cell table:formula="of:=[.K305]/[.F305]*100" office:value-type="float" office:value="33.2285938727416" calcext:value-type="float">
            <text:p>33.2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59" calcext:value-type="float">
            <text:p>59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1.2812" calcext:value-type="float">
            <text:p>1.2812</text:p>
          </table:table-cell>
          <table:table-cell office:value-type="float" office:value="76.87" calcext:value-type="float">
            <text:p>76.87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formula="of:=[.H306]-[.F306]" office:value-type="float" office:value="-19.87" calcext:value-type="float">
            <text:p>-19.87</text:p>
          </table:table-cell>
          <table:table-cell table:formula="of:=ABS([.J306])" office:value-type="float" office:value="19.87" calcext:value-type="float">
            <text:p>19.87</text:p>
          </table:table-cell>
          <table:table-cell table:formula="of:=[.K306]/[.F306]*100" office:value-type="float" office:value="25.8488356966307" calcext:value-type="float">
            <text:p>25.8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.283" calcext:value-type="float">
            <text:p>1.283</text:p>
          </table:table-cell>
          <table:table-cell office:value-type="float" office:value="76.98" calcext:value-type="float">
            <text:p>76.9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307]-[.F307]" office:value-type="float" office:value="-19.98" calcext:value-type="float">
            <text:p>-19.98</text:p>
          </table:table-cell>
          <table:table-cell table:formula="of:=ABS([.J307])" office:value-type="float" office:value="19.98" calcext:value-type="float">
            <text:p>19.98</text:p>
          </table:table-cell>
          <table:table-cell table:formula="of:=[.K307]/[.F307]*100" office:value-type="float" office:value="25.9547934528449" calcext:value-type="float">
            <text:p>26.0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1.285" calcext:value-type="float">
            <text:p>1.285</text:p>
          </table:table-cell>
          <table:table-cell office:value-type="float" office:value="77.1" calcext:value-type="float">
            <text:p>77.1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308]-[.F308]" office:value-type="float" office:value="-20.1" calcext:value-type="float">
            <text:p>-20.1</text:p>
          </table:table-cell>
          <table:table-cell table:formula="of:=ABS([.J308])" office:value-type="float" office:value="20.1" calcext:value-type="float">
            <text:p>20.1</text:p>
          </table:table-cell>
          <table:table-cell table:formula="of:=[.K308]/[.F308]*100" office:value-type="float" office:value="26.0700389105058" calcext:value-type="float">
            <text:p>26.1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62" calcext:value-type="float">
            <text:p>62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1.2853" calcext:value-type="float">
            <text:p>1.2853</text:p>
          </table:table-cell>
          <table:table-cell office:value-type="float" office:value="77.12" calcext:value-type="float">
            <text:p>77.12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formula="of:=[.H309]-[.F309]" office:value-type="float" office:value="-20.12" calcext:value-type="float">
            <text:p>-20.12</text:p>
          </table:table-cell>
          <table:table-cell table:formula="of:=ABS([.J309])" office:value-type="float" office:value="20.12" calcext:value-type="float">
            <text:p>20.12</text:p>
          </table:table-cell>
          <table:table-cell table:formula="of:=[.K309]/[.F309]*100" office:value-type="float" office:value="26.0892116182573" calcext:value-type="float">
            <text:p>26.1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.2828" calcext:value-type="float">
            <text:p>1.2828</text:p>
          </table:table-cell>
          <table:table-cell office:value-type="float" office:value="76.97" calcext:value-type="float">
            <text:p>76.9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310]-[.F310]" office:value-type="float" office:value="-19.97" calcext:value-type="float">
            <text:p>-19.97</text:p>
          </table:table-cell>
          <table:table-cell table:formula="of:=ABS([.J310])" office:value-type="float" office:value="19.97" calcext:value-type="float">
            <text:p>19.97</text:p>
          </table:table-cell>
          <table:table-cell table:formula="of:=[.K310]/[.F310]*100" office:value-type="float" office:value="25.945173444199" calcext:value-type="float">
            <text:p>25.9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.2896" calcext:value-type="float">
            <text:p>1.2896</text:p>
          </table:table-cell>
          <table:table-cell office:value-type="float" office:value="77.37" calcext:value-type="float">
            <text:p>77.37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table:formula="of:=[.H311]-[.F311]" office:value-type="float" office:value="-20.37" calcext:value-type="float">
            <text:p>-20.37</text:p>
          </table:table-cell>
          <table:table-cell table:formula="of:=ABS([.J311])" office:value-type="float" office:value="20.37" calcext:value-type="float">
            <text:p>20.37</text:p>
          </table:table-cell>
          <table:table-cell table:formula="of:=[.K311]/[.F311]*100" office:value-type="float" office:value="26.3280341217526" calcext:value-type="float">
            <text:p>26.3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.2841" calcext:value-type="float">
            <text:p>1.2841</text:p>
          </table:table-cell>
          <table:table-cell office:value-type="float" office:value="77.05" calcext:value-type="float">
            <text:p>77.05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formula="of:=[.H312]-[.F312]" office:value-type="float" office:value="-11.05" calcext:value-type="float">
            <text:p>-11.05</text:p>
          </table:table-cell>
          <table:table-cell table:formula="of:=ABS([.J312])" office:value-type="float" office:value="11.05" calcext:value-type="float">
            <text:p>11.05</text:p>
          </table:table-cell>
          <table:table-cell table:formula="of:=[.K312]/[.F312]*100" office:value-type="float" office:value="14.3413367942894" calcext:value-type="float">
            <text:p>14.3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66" calcext:value-type="float">
            <text:p>66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1.2877" calcext:value-type="float">
            <text:p>1.2877</text:p>
          </table:table-cell>
          <table:table-cell office:value-type="float" office:value="77.26" calcext:value-type="float">
            <text:p>77.26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formula="of:=[.H313]-[.F313]" office:value-type="float" office:value="-8.26000000000001" calcext:value-type="float">
            <text:p>-8.26000000000001</text:p>
          </table:table-cell>
          <table:table-cell table:formula="of:=ABS([.J313])" office:value-type="float" office:value="8.26000000000001" calcext:value-type="float">
            <text:p>8.26000000000001</text:p>
          </table:table-cell>
          <table:table-cell table:formula="of:=[.K313]/[.F313]*100" office:value-type="float" office:value="10.6911726637329" calcext:value-type="float">
            <text:p>10.7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1.2955" calcext:value-type="float">
            <text:p>1.2955</text:p>
          </table:table-cell>
          <table:table-cell office:value-type="float" office:value="77.73" calcext:value-type="float">
            <text:p>77.73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formula="of:=[.H314]-[.F314]" office:value-type="float" office:value="-8.73" calcext:value-type="float">
            <text:p>-8.73</text:p>
          </table:table-cell>
          <table:table-cell table:formula="of:=ABS([.J314])" office:value-type="float" office:value="8.73" calcext:value-type="float">
            <text:p>8.73</text:p>
          </table:table-cell>
          <table:table-cell table:formula="of:=[.K314]/[.F314]*100" office:value-type="float" office:value="11.2311848707063" calcext:value-type="float">
            <text:p>11.2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68" calcext:value-type="float">
            <text:p>68</text:p>
          </table:table-cell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office:value-type="float" office:value="1.2988" calcext:value-type="float">
            <text:p>1.2988</text:p>
          </table:table-cell>
          <table:table-cell office:value-type="float" office:value="77.93" calcext:value-type="float">
            <text:p>77.9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formula="of:=[.H315]-[.F315]" office:value-type="float" office:value="-17.93" calcext:value-type="float">
            <text:p>-17.93</text:p>
          </table:table-cell>
          <table:table-cell table:formula="of:=ABS([.J315])" office:value-type="float" office:value="17.93" calcext:value-type="float">
            <text:p>17.93</text:p>
          </table:table-cell>
          <table:table-cell table:formula="of:=[.K315]/[.F315]*100" office:value-type="float" office:value="23.0078275375337" calcext:value-type="float">
            <text:p>23.0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1.3112" calcext:value-type="float">
            <text:p>1.3112</text:p>
          </table:table-cell>
          <table:table-cell office:value-type="float" office:value="78.67" calcext:value-type="float">
            <text:p>78.67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[.H316]-[.F316]" office:value-type="float" office:value="-3.67" calcext:value-type="float">
            <text:p>-3.67</text:p>
          </table:table-cell>
          <table:table-cell table:formula="of:=ABS([.J316])" office:value-type="float" office:value="3.67" calcext:value-type="float">
            <text:p>3.67</text:p>
          </table:table-cell>
          <table:table-cell table:formula="of:=[.K316]/[.F316]*100" office:value-type="float" office:value="4.66505656539977" calcext:value-type="float">
            <text:p>4.7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1.3048" calcext:value-type="float">
            <text:p>1.3048</text:p>
          </table:table-cell>
          <table:table-cell office:value-type="float" office:value="78.29" calcext:value-type="float">
            <text:p>78.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317]-[.F317]" office:value-type="float" office:value="-18.29" calcext:value-type="float">
            <text:p>-18.29</text:p>
          </table:table-cell>
          <table:table-cell table:formula="of:=ABS([.J317])" office:value-type="float" office:value="18.29" calcext:value-type="float">
            <text:p>18.29</text:p>
          </table:table-cell>
          <table:table-cell table:formula="of:=[.K317]/[.F317]*100" office:value-type="float" office:value="23.3618597522034" calcext:value-type="float">
            <text:p>23.4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1.3032" calcext:value-type="float">
            <text:p>1.3032</text:p>
          </table:table-cell>
          <table:table-cell office:value-type="float" office:value="78.19" calcext:value-type="float">
            <text:p>78.1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formula="of:=[.H318]-[.F318]" office:value-type="float" office:value="-18.19" calcext:value-type="float">
            <text:p>-18.19</text:p>
          </table:table-cell>
          <table:table-cell table:formula="of:=ABS([.J318])" office:value-type="float" office:value="18.19" calcext:value-type="float">
            <text:p>18.19</text:p>
          </table:table-cell>
          <table:table-cell table:formula="of:=[.K318]/[.F318]*100" office:value-type="float" office:value="23.2638444813915" calcext:value-type="float">
            <text:p>23.3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1.2928" calcext:value-type="float">
            <text:p>1.2928</text:p>
          </table:table-cell>
          <table:table-cell office:value-type="float" office:value="77.57" calcext:value-type="float">
            <text:p>77.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319]-[.F319]" office:value-type="float" office:value="-17.57" calcext:value-type="float">
            <text:p>-17.57</text:p>
          </table:table-cell>
          <table:table-cell table:formula="of:=ABS([.J319])" office:value-type="float" office:value="17.57" calcext:value-type="float">
            <text:p>17.57</text:p>
          </table:table-cell>
          <table:table-cell table:formula="of:=[.K319]/[.F319]*100" office:value-type="float" office:value="22.650509217481" calcext:value-type="float">
            <text:p>22.7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1.2821" calcext:value-type="float">
            <text:p>1.2821</text:p>
          </table:table-cell>
          <table:table-cell office:value-type="float" office:value="76.92" calcext:value-type="float">
            <text:p>76.9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H320]-[.F320]" office:value-type="float" office:value="-16.92" calcext:value-type="float">
            <text:p>-16.92</text:p>
          </table:table-cell>
          <table:table-cell table:formula="of:=ABS([.J320])" office:value-type="float" office:value="16.92" calcext:value-type="float">
            <text:p>16.92</text:p>
          </table:table-cell>
          <table:table-cell table:formula="of:=[.K320]/[.F320]*100" office:value-type="float" office:value="21.996879875195" calcext:value-type="float">
            <text:p>22.0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1.2566" calcext:value-type="float">
            <text:p>1.2566</text:p>
          </table:table-cell>
          <table:table-cell office:value-type="float" office:value="75.4" calcext:value-type="float">
            <text:p>7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321]-[.F321]" office:value-type="float" office:value="-15.4" calcext:value-type="float">
            <text:p>-15.4</text:p>
          </table:table-cell>
          <table:table-cell table:formula="of:=ABS([.J321])" office:value-type="float" office:value="15.4" calcext:value-type="float">
            <text:p>15.4</text:p>
          </table:table-cell>
          <table:table-cell table:formula="of:=[.K321]/[.F321]*100" office:value-type="float" office:value="20.4244031830239" calcext:value-type="float">
            <text:p>20.4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.2482" calcext:value-type="float">
            <text:p>1.2482</text:p>
          </table:table-cell>
          <table:table-cell office:value-type="float" office:value="74.89" calcext:value-type="float">
            <text:p>74.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322]-[.F322]" office:value-type="float" office:value="-14.89" calcext:value-type="float">
            <text:p>-14.89</text:p>
          </table:table-cell>
          <table:table-cell table:formula="of:=ABS([.J322])" office:value-type="float" office:value="14.89" calcext:value-type="float">
            <text:p>14.89</text:p>
          </table:table-cell>
          <table:table-cell table:formula="of:=[.K322]/[.F322]*100" office:value-type="float" office:value="19.88249432501" calcext:value-type="float">
            <text:p>19.9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76" calcext:value-type="float">
            <text:p>76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1.2202" calcext:value-type="float">
            <text:p>1.2202</text:p>
          </table:table-cell>
          <table:table-cell office:value-type="float" office:value="73.21" calcext:value-type="float">
            <text:p>73.2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formula="of:=[.H323]-[.F323]" office:value-type="float" office:value="-13.21" calcext:value-type="float">
            <text:p>-13.21</text:p>
          </table:table-cell>
          <table:table-cell table:formula="of:=ABS([.J323])" office:value-type="float" office:value="13.21" calcext:value-type="float">
            <text:p>13.21</text:p>
          </table:table-cell>
          <table:table-cell table:formula="of:=[.K323]/[.F323]*100" office:value-type="float" office:value="18.0439830624232" calcext:value-type="float">
            <text:p>18.0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77" calcext:value-type="float">
            <text:p>7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1.2239" calcext:value-type="float">
            <text:p>1.2239</text:p>
          </table:table-cell>
          <table:table-cell office:value-type="float" office:value="73.43" calcext:value-type="float">
            <text:p>73.4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H324]-[.F324]" office:value-type="float" office:value="-13.43" calcext:value-type="float">
            <text:p>-13.43</text:p>
          </table:table-cell>
          <table:table-cell table:formula="of:=ABS([.J324])" office:value-type="float" office:value="13.43" calcext:value-type="float">
            <text:p>13.43</text:p>
          </table:table-cell>
          <table:table-cell table:formula="of:=[.K324]/[.F324]*100" office:value-type="float" office:value="18.2895274411004" calcext:value-type="float">
            <text:p>18.3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1.2296" calcext:value-type="float">
            <text:p>1.2296</text:p>
          </table:table-cell>
          <table:table-cell office:value-type="float" office:value="73.78" calcext:value-type="float">
            <text:p>73.78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H325]-[.F325]" office:value-type="float" office:value="-10.78" calcext:value-type="float">
            <text:p>-10.78</text:p>
          </table:table-cell>
          <table:table-cell table:formula="of:=ABS([.J325])" office:value-type="float" office:value="10.78" calcext:value-type="float">
            <text:p>10.78</text:p>
          </table:table-cell>
          <table:table-cell table:formula="of:=[.K325]/[.F325]*100" office:value-type="float" office:value="14.6110056925996" calcext:value-type="float">
            <text:p>14.6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79" calcext:value-type="float">
            <text:p>79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1.228" calcext:value-type="float">
            <text:p>1.228</text:p>
          </table:table-cell>
          <table:table-cell office:value-type="float" office:value="73.68" calcext:value-type="float">
            <text:p>73.6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[.H326]-[.F326]" office:value-type="float" office:value="-13.68" calcext:value-type="float">
            <text:p>-13.68</text:p>
          </table:table-cell>
          <table:table-cell table:formula="of:=ABS([.J326])" office:value-type="float" office:value="13.68" calcext:value-type="float">
            <text:p>13.68</text:p>
          </table:table-cell>
          <table:table-cell table:formula="of:=[.K326]/[.F326]*100" office:value-type="float" office:value="18.5667752442997" calcext:value-type="float">
            <text:p>18.6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415" calcext:value-type="float">
            <text:p>415</text:p>
          </table:table-cell>
          <table:table-cell office:value-type="float" office:value="1.2477" calcext:value-type="float">
            <text:p>1.2477</text:p>
          </table:table-cell>
          <table:table-cell office:value-type="float" office:value="74.86" calcext:value-type="float">
            <text:p>74.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[.H327]-[.F327]" office:value-type="float" office:value="-14.86" calcext:value-type="float">
            <text:p>-14.86</text:p>
          </table:table-cell>
          <table:table-cell table:formula="of:=ABS([.J327])" office:value-type="float" office:value="14.86" calcext:value-type="float">
            <text:p>14.86</text:p>
          </table:table-cell>
          <table:table-cell table:formula="of:=[.K327]/[.F327]*100" office:value-type="float" office:value="19.8503873897943" calcext:value-type="float">
            <text:p>19.9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subject04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1.2505" calcext:value-type="float">
            <text:p>1.2505</text:p>
          </table:table-cell>
          <table:table-cell office:value-type="float" office:value="75.03" calcext:value-type="float">
            <text:p>75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328]-[.F328]" office:value-type="float" office:value="-15.03" calcext:value-type="float">
            <text:p>-15.03</text:p>
          </table:table-cell>
          <table:table-cell table:formula="of:=ABS([.J328])" office:value-type="float" office:value="15.03" calcext:value-type="float">
            <text:p>15.03</text:p>
          </table:table-cell>
          <table:table-cell table:formula="of:=[.K328]/[.F328]*100" office:value-type="float" office:value="20.031987205118" calcext:value-type="float">
            <text:p>20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1176" calcext:value-type="float">
            <text:p>1.1176</text:p>
          </table:table-cell>
          <table:table-cell office:value-type="float" office:value="67.06" calcext:value-type="float">
            <text:p>67.06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formula="of:=[.H329]-[.F329]" office:value-type="float" office:value="-4.06" calcext:value-type="float">
            <text:p>-4.06</text:p>
          </table:table-cell>
          <table:table-cell table:formula="of:=ABS([.J329])" office:value-type="float" office:value="4.06" calcext:value-type="float">
            <text:p>4.06</text:p>
          </table:table-cell>
          <table:table-cell table:formula="of:=[.K329]/[.F329]*100" office:value-type="float" office:value="6.05427974947808" calcext:value-type="float">
            <text:p>6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1283" calcext:value-type="float">
            <text:p>1.1283</text:p>
          </table:table-cell>
          <table:table-cell office:value-type="float" office:value="67.7" calcext:value-type="float">
            <text:p>67.7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330]-[.F330]" office:value-type="float" office:value="-4.7" calcext:value-type="float">
            <text:p>-4.7</text:p>
          </table:table-cell>
          <table:table-cell table:formula="of:=ABS([.J330])" office:value-type="float" office:value="4.7" calcext:value-type="float">
            <text:p>4.7</text:p>
          </table:table-cell>
          <table:table-cell table:formula="of:=[.K330]/[.F330]*100" office:value-type="float" office:value="6.94239290989661" calcext:value-type="float">
            <text:p>6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1248" calcext:value-type="float">
            <text:p>1.1248</text:p>
          </table:table-cell>
          <table:table-cell office:value-type="float" office:value="67.49" calcext:value-type="float">
            <text:p>67.49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331]-[.F331]" office:value-type="float" office:value="-4.49" calcext:value-type="float">
            <text:p>-4.49</text:p>
          </table:table-cell>
          <table:table-cell table:formula="of:=ABS([.J331])" office:value-type="float" office:value="4.49" calcext:value-type="float">
            <text:p>4.49</text:p>
          </table:table-cell>
          <table:table-cell table:formula="of:=[.K331]/[.F331]*100" office:value-type="float" office:value="6.65283745740109" calcext:value-type="float">
            <text:p>6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1383" calcext:value-type="float">
            <text:p>1.1383</text:p>
          </table:table-cell>
          <table:table-cell office:value-type="float" office:value="68.3" calcext:value-type="float">
            <text:p>68.3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332]-[.F332]" office:value-type="float" office:value="-5.3" calcext:value-type="float">
            <text:p>-5.3</text:p>
          </table:table-cell>
          <table:table-cell table:formula="of:=ABS([.J332])" office:value-type="float" office:value="5.3" calcext:value-type="float">
            <text:p>5.3</text:p>
          </table:table-cell>
          <table:table-cell table:formula="of:=[.K332]/[.F332]*100" office:value-type="float" office:value="7.75988286969253" calcext:value-type="float">
            <text:p>7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.1506" calcext:value-type="float">
            <text:p>1.1506</text:p>
          </table:table-cell>
          <table:table-cell office:value-type="float" office:value="69.04" calcext:value-type="float">
            <text:p>69.04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formula="of:=[.H333]-[.F333]" office:value-type="float" office:value="-6.04000000000001" calcext:value-type="float">
            <text:p>-6.04000000000001</text:p>
          </table:table-cell>
          <table:table-cell table:formula="of:=ABS([.J333])" office:value-type="float" office:value="6.04000000000001" calcext:value-type="float">
            <text:p>6.04000000000001</text:p>
          </table:table-cell>
          <table:table-cell table:formula="of:=[.K333]/[.F333]*100" office:value-type="float" office:value="8.74855156431055" calcext:value-type="float">
            <text:p>8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1216" calcext:value-type="float">
            <text:p>1.1216</text:p>
          </table:table-cell>
          <table:table-cell office:value-type="float" office:value="67.3" calcext:value-type="float">
            <text:p>67.3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formula="of:=[.H334]-[.F334]" office:value-type="float" office:value="-4.3" calcext:value-type="float">
            <text:p>-4.3</text:p>
          </table:table-cell>
          <table:table-cell table:formula="of:=ABS([.J334])" office:value-type="float" office:value="4.3" calcext:value-type="float">
            <text:p>4.3</text:p>
          </table:table-cell>
          <table:table-cell table:formula="of:=[.K334]/[.F334]*100" office:value-type="float" office:value="6.38930163447251" calcext:value-type="float">
            <text:p>6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1188" calcext:value-type="float">
            <text:p>1.1188</text:p>
          </table:table-cell>
          <table:table-cell office:value-type="float" office:value="67.13" calcext:value-type="float">
            <text:p>67.13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formula="of:=[.H335]-[.F335]" office:value-type="float" office:value="16.87" calcext:value-type="float">
            <text:p>16.87</text:p>
          </table:table-cell>
          <table:table-cell table:formula="of:=ABS([.J335])" office:value-type="float" office:value="16.87" calcext:value-type="float">
            <text:p>16.87</text:p>
          </table:table-cell>
          <table:table-cell table:formula="of:=[.K335]/[.F335]*100" office:value-type="float" office:value="25.1303441084463" calcext:value-type="float">
            <text:p>25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.1384" calcext:value-type="float">
            <text:p>1.1384</text:p>
          </table:table-cell>
          <table:table-cell office:value-type="float" office:value="68.3" calcext:value-type="float">
            <text:p>68.3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formula="of:=[.H336]-[.F336]" office:value-type="float" office:value="0.700000000000003" calcext:value-type="float">
            <text:p>0.700000000000003</text:p>
          </table:table-cell>
          <table:table-cell table:formula="of:=ABS([.J336])" office:value-type="float" office:value="0.700000000000003" calcext:value-type="float">
            <text:p>0.700000000000003</text:p>
          </table:table-cell>
          <table:table-cell table:formula="of:=[.K336]/[.F336]*100" office:value-type="float" office:value="1.02489019033675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.1395" calcext:value-type="float">
            <text:p>1.1395</text:p>
          </table:table-cell>
          <table:table-cell office:value-type="float" office:value="68.37" calcext:value-type="float">
            <text:p>68.37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formula="of:=[.H337]-[.F337]" office:value-type="float" office:value="0.629999999999996" calcext:value-type="float">
            <text:p>0.629999999999996</text:p>
          </table:table-cell>
          <table:table-cell table:formula="of:=ABS([.J337])" office:value-type="float" office:value="0.629999999999996" calcext:value-type="float">
            <text:p>0.629999999999996</text:p>
          </table:table-cell>
          <table:table-cell table:formula="of:=[.K337]/[.F337]*100" office:value-type="float" office:value="0.921456779289155" calcext:value-type="float">
            <text:p>0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.1435" calcext:value-type="float">
            <text:p>1.1435</text:p>
          </table:table-cell>
          <table:table-cell office:value-type="float" office:value="68.61" calcext:value-type="float">
            <text:p>68.61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338]-[.F338]" office:value-type="float" office:value="0.390000000000001" calcext:value-type="float">
            <text:p>0.390000000000001</text:p>
          </table:table-cell>
          <table:table-cell table:formula="of:=ABS([.J338])" office:value-type="float" office:value="0.390000000000001" calcext:value-type="float">
            <text:p>0.390000000000001</text:p>
          </table:table-cell>
          <table:table-cell table:formula="of:=[.K338]/[.F338]*100" office:value-type="float" office:value="0.568430257979887" calcext:value-type="float">
            <text:p>0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1483" calcext:value-type="float">
            <text:p>1.1483</text:p>
          </table:table-cell>
          <table:table-cell office:value-type="float" office:value="68.9" calcext:value-type="float">
            <text:p>68.9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339]-[.F339]" office:value-type="float" office:value="0.0999999999999943" calcext:value-type="float">
            <text:p>0.0999999999999943</text:p>
          </table:table-cell>
          <table:table-cell table:formula="of:=ABS([.J339])" office:value-type="float" office:value="0.0999999999999943" calcext:value-type="float">
            <text:p>0.0999999999999943</text:p>
          </table:table-cell>
          <table:table-cell table:formula="of:=[.K339]/[.F339]*100" office:value-type="float" office:value="0.145137880986929" calcext:value-type="float">
            <text:p>0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.1357" calcext:value-type="float">
            <text:p>1.1357</text:p>
          </table:table-cell>
          <table:table-cell office:value-type="float" office:value="68.14" calcext:value-type="float">
            <text:p>68.14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formula="of:=[.H340]-[.F340]" office:value-type="float" office:value="0.859999999999999" calcext:value-type="float">
            <text:p>0.859999999999999</text:p>
          </table:table-cell>
          <table:table-cell table:formula="of:=ABS([.J340])" office:value-type="float" office:value="0.859999999999999" calcext:value-type="float">
            <text:p>0.859999999999999</text:p>
          </table:table-cell>
          <table:table-cell table:formula="of:=[.K340]/[.F340]*100" office:value-type="float" office:value="1.26210742588788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1381" calcext:value-type="float">
            <text:p>1.1381</text:p>
          </table:table-cell>
          <table:table-cell office:value-type="float" office:value="68.29" calcext:value-type="float">
            <text:p>68.29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formula="of:=[.H341]-[.F341]" office:value-type="float" office:value="0.709999999999994" calcext:value-type="float">
            <text:p>0.709999999999994</text:p>
          </table:table-cell>
          <table:table-cell table:formula="of:=ABS([.J341])" office:value-type="float" office:value="0.709999999999994" calcext:value-type="float">
            <text:p>0.709999999999994</text:p>
          </table:table-cell>
          <table:table-cell table:formula="of:=[.K341]/[.F341]*100" office:value-type="float" office:value="1.03968370185971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.1389" calcext:value-type="float">
            <text:p>1.1389</text:p>
          </table:table-cell>
          <table:table-cell office:value-type="float" office:value="68.33" calcext:value-type="float">
            <text:p>68.33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342]-[.F342]" office:value-type="float" office:value="0.670000000000002" calcext:value-type="float">
            <text:p>0.670000000000002</text:p>
          </table:table-cell>
          <table:table-cell table:formula="of:=ABS([.J342])" office:value-type="float" office:value="0.670000000000002" calcext:value-type="float">
            <text:p>0.670000000000002</text:p>
          </table:table-cell>
          <table:table-cell table:formula="of:=[.K342]/[.F342]*100" office:value-type="float" office:value="0.98053563588468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.1342" calcext:value-type="float">
            <text:p>1.1342</text:p>
          </table:table-cell>
          <table:table-cell office:value-type="float" office:value="68.05" calcext:value-type="float">
            <text:p>68.05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table:formula="of:=[.H343]-[.F343]" office:value-type="float" office:value="0.950000000000003" calcext:value-type="float">
            <text:p>0.950000000000003</text:p>
          </table:table-cell>
          <table:table-cell table:formula="of:=ABS([.J343])" office:value-type="float" office:value="0.950000000000003" calcext:value-type="float">
            <text:p>0.950000000000003</text:p>
          </table:table-cell>
          <table:table-cell table:formula="of:=[.K343]/[.F343]*100" office:value-type="float" office:value="1.39603232916973" calcext:value-type="float">
            <text:p>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.1239" calcext:value-type="float">
            <text:p>1.1239</text:p>
          </table:table-cell>
          <table:table-cell office:value-type="float" office:value="67.44" calcext:value-type="float">
            <text:p>67.44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formula="of:=[.H344]-[.F344]" office:value-type="float" office:value="1.56" calcext:value-type="float">
            <text:p>1.56</text:p>
          </table:table-cell>
          <table:table-cell table:formula="of:=ABS([.J344])" office:value-type="float" office:value="1.56" calcext:value-type="float">
            <text:p>1.56</text:p>
          </table:table-cell>
          <table:table-cell table:formula="of:=[.K344]/[.F344]*100" office:value-type="float" office:value="2.31316725978648" calcext:value-type="float">
            <text:p>2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1155" calcext:value-type="float">
            <text:p>1.1155</text:p>
          </table:table-cell>
          <table:table-cell office:value-type="float" office:value="66.93" calcext:value-type="float">
            <text:p>66.93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345]-[.F345]" office:value-type="float" office:value="-0.930000000000007" calcext:value-type="float">
            <text:p>-0.930000000000007</text:p>
          </table:table-cell>
          <table:table-cell table:formula="of:=ABS([.J345])" office:value-type="float" office:value="0.930000000000007" calcext:value-type="float">
            <text:p>0.930000000000007</text:p>
          </table:table-cell>
          <table:table-cell table:formula="of:=[.K345]/[.F345]*100" office:value-type="float" office:value="1.38951142985209" calcext:value-type="float">
            <text:p>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.0989" calcext:value-type="float">
            <text:p>1.0989</text:p>
          </table:table-cell>
          <table:table-cell office:value-type="float" office:value="65.93" calcext:value-type="float">
            <text:p>65.93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346]-[.F346]" office:value-type="float" office:value="0.0699999999999932" calcext:value-type="float">
            <text:p>0.0699999999999932</text:p>
          </table:table-cell>
          <table:table-cell table:formula="of:=ABS([.J346])" office:value-type="float" office:value="0.0699999999999932" calcext:value-type="float">
            <text:p>0.0699999999999932</text:p>
          </table:table-cell>
          <table:table-cell table:formula="of:=[.K346]/[.F346]*100" office:value-type="float" office:value="0.106173214014854" calcext:value-type="float">
            <text:p>0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.0941" calcext:value-type="float">
            <text:p>1.0941</text:p>
          </table:table-cell>
          <table:table-cell office:value-type="float" office:value="65.65" calcext:value-type="float">
            <text:p>65.65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[.H347]-[.F347]" office:value-type="float" office:value="0.349999999999994" calcext:value-type="float">
            <text:p>0.349999999999994</text:p>
          </table:table-cell>
          <table:table-cell table:formula="of:=ABS([.J347])" office:value-type="float" office:value="0.349999999999994" calcext:value-type="float">
            <text:p>0.349999999999994</text:p>
          </table:table-cell>
          <table:table-cell table:formula="of:=[.K347]/[.F347]*100" office:value-type="float" office:value="0.533130236100525" calcext:value-type="float">
            <text:p>0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.1095" calcext:value-type="float">
            <text:p>1.1095</text:p>
          </table:table-cell>
          <table:table-cell office:value-type="float" office:value="66.57" calcext:value-type="float">
            <text:p>66.57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[.H348]-[.F348]" office:value-type="float" office:value="2.43000000000001" calcext:value-type="float">
            <text:p>2.43000000000001</text:p>
          </table:table-cell>
          <table:table-cell table:formula="of:=ABS([.J348])" office:value-type="float" office:value="2.43000000000001" calcext:value-type="float">
            <text:p>2.43000000000001</text:p>
          </table:table-cell>
          <table:table-cell table:formula="of:=[.K348]/[.F348]*100" office:value-type="float" office:value="3.65029292474088" calcext:value-type="float">
            <text:p>3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.1087" calcext:value-type="float">
            <text:p>1.1087</text:p>
          </table:table-cell>
          <table:table-cell office:value-type="float" office:value="66.52" calcext:value-type="float">
            <text:p>66.52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[.H349]-[.F349]" office:value-type="float" office:value="2.48" calcext:value-type="float">
            <text:p>2.48</text:p>
          </table:table-cell>
          <table:table-cell table:formula="of:=ABS([.J349])" office:value-type="float" office:value="2.48" calcext:value-type="float">
            <text:p>2.48</text:p>
          </table:table-cell>
          <table:table-cell table:formula="of:=[.K349]/[.F349]*100" office:value-type="float" office:value="3.7282020444979" calcext:value-type="float">
            <text:p>3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.1291" calcext:value-type="float">
            <text:p>1.1291</text:p>
          </table:table-cell>
          <table:table-cell office:value-type="float" office:value="67.74" calcext:value-type="float">
            <text:p>67.74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350]-[.F350]" office:value-type="float" office:value="1.26000000000001" calcext:value-type="float">
            <text:p>1.26000000000001</text:p>
          </table:table-cell>
          <table:table-cell table:formula="of:=ABS([.J350])" office:value-type="float" office:value="1.26000000000001" calcext:value-type="float">
            <text:p>1.26000000000001</text:p>
          </table:table-cell>
          <table:table-cell table:formula="of:=[.K350]/[.F350]*100" office:value-type="float" office:value="1.86005314437556" calcext:value-type="float">
            <text:p>1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.134" calcext:value-type="float">
            <text:p>1.134</text:p>
          </table:table-cell>
          <table:table-cell office:value-type="float" office:value="68.04" calcext:value-type="float">
            <text:p>68.04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351]-[.F351]" office:value-type="float" office:value="0.959999999999994" calcext:value-type="float">
            <text:p>0.959999999999994</text:p>
          </table:table-cell>
          <table:table-cell table:formula="of:=ABS([.J351])" office:value-type="float" office:value="0.959999999999994" calcext:value-type="float">
            <text:p>0.959999999999994</text:p>
          </table:table-cell>
          <table:table-cell table:formula="of:=[.K351]/[.F351]*100" office:value-type="float" office:value="1.41093474426807" calcext:value-type="float">
            <text:p>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.1351" calcext:value-type="float">
            <text:p>1.1351</text:p>
          </table:table-cell>
          <table:table-cell office:value-type="float" office:value="68.11" calcext:value-type="float">
            <text:p>68.11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352]-[.F352]" office:value-type="float" office:value="0.890000000000001" calcext:value-type="float">
            <text:p>0.890000000000001</text:p>
          </table:table-cell>
          <table:table-cell table:formula="of:=ABS([.J352])" office:value-type="float" office:value="0.890000000000001" calcext:value-type="float">
            <text:p>0.890000000000001</text:p>
          </table:table-cell>
          <table:table-cell table:formula="of:=[.K352]/[.F352]*100" office:value-type="float" office:value="1.30670973425341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.1534" calcext:value-type="float">
            <text:p>1.1534</text:p>
          </table:table-cell>
          <table:table-cell office:value-type="float" office:value="69.2" calcext:value-type="float">
            <text:p>69.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353]-[.F353]" office:value-type="float" office:value="5.8" calcext:value-type="float">
            <text:p>5.8</text:p>
          </table:table-cell>
          <table:table-cell table:formula="of:=ABS([.J353])" office:value-type="float" office:value="5.8" calcext:value-type="float">
            <text:p>5.8</text:p>
          </table:table-cell>
          <table:table-cell table:formula="of:=[.K353]/[.F353]*100" office:value-type="float" office:value="8.38150289017341" calcext:value-type="float">
            <text:p>8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.1561" calcext:value-type="float">
            <text:p>1.1561</text:p>
          </table:table-cell>
          <table:table-cell office:value-type="float" office:value="69.36" calcext:value-type="float">
            <text:p>69.36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354]-[.F354]" office:value-type="float" office:value="8.64" calcext:value-type="float">
            <text:p>8.64</text:p>
          </table:table-cell>
          <table:table-cell table:formula="of:=ABS([.J354])" office:value-type="float" office:value="8.64" calcext:value-type="float">
            <text:p>8.64</text:p>
          </table:table-cell>
          <table:table-cell table:formula="of:=[.K354]/[.F354]*100" office:value-type="float" office:value="12.4567474048443" calcext:value-type="float">
            <text:p>12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.1761" calcext:value-type="float">
            <text:p>1.1761</text:p>
          </table:table-cell>
          <table:table-cell office:value-type="float" office:value="70.56" calcext:value-type="float">
            <text:p>70.56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H355]-[.F355]" office:value-type="float" office:value="16.44" calcext:value-type="float">
            <text:p>16.44</text:p>
          </table:table-cell>
          <table:table-cell table:formula="of:=ABS([.J355])" office:value-type="float" office:value="16.44" calcext:value-type="float">
            <text:p>16.44</text:p>
          </table:table-cell>
          <table:table-cell table:formula="of:=[.K355]/[.F355]*100" office:value-type="float" office:value="23.2993197278912" calcext:value-type="float">
            <text:p>2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.1666" calcext:value-type="float">
            <text:p>1.1666</text:p>
          </table:table-cell>
          <table:table-cell office:value-type="float" office:value="70" calcext:value-type="float">
            <text:p>70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356]-[.F356]" office:value-type="float" office:value="17" calcext:value-type="float">
            <text:p>17</text:p>
          </table:table-cell>
          <table:table-cell table:formula="of:=ABS([.J356])" office:value-type="float" office:value="17" calcext:value-type="float">
            <text:p>17</text:p>
          </table:table-cell>
          <table:table-cell table:formula="of:=[.K356]/[.F356]*100" office:value-type="float" office:value="24.2857142857143" calcext:value-type="float">
            <text:p>24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.1438" calcext:value-type="float">
            <text:p>1.1438</text:p>
          </table:table-cell>
          <table:table-cell office:value-type="float" office:value="68.63" calcext:value-type="float">
            <text:p>68.63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357]-[.F357]" office:value-type="float" office:value="18.37" calcext:value-type="float">
            <text:p>18.37</text:p>
          </table:table-cell>
          <table:table-cell table:formula="of:=ABS([.J357])" office:value-type="float" office:value="18.37" calcext:value-type="float">
            <text:p>18.37</text:p>
          </table:table-cell>
          <table:table-cell table:formula="of:=[.K357]/[.F357]*100" office:value-type="float" office:value="26.7667200932537" calcext:value-type="float">
            <text:p>26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.1173" calcext:value-type="float">
            <text:p>1.1173</text:p>
          </table:table-cell>
          <table:table-cell office:value-type="float" office:value="67.04" calcext:value-type="float">
            <text:p>67.04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formula="of:=[.H358]-[.F358]" office:value-type="float" office:value="19.96" calcext:value-type="float">
            <text:p>19.96</text:p>
          </table:table-cell>
          <table:table-cell table:formula="of:=ABS([.J358])" office:value-type="float" office:value="19.96" calcext:value-type="float">
            <text:p>19.96</text:p>
          </table:table-cell>
          <table:table-cell table:formula="of:=[.K358]/[.F358]*100" office:value-type="float" office:value="29.7732696897375" calcext:value-type="float">
            <text:p>29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.0826" calcext:value-type="float">
            <text:p>1.0826</text:p>
          </table:table-cell>
          <table:table-cell office:value-type="float" office:value="64.96" calcext:value-type="float">
            <text:p>64.96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359]-[.F359]" office:value-type="float" office:value="22.04" calcext:value-type="float">
            <text:p>22.04</text:p>
          </table:table-cell>
          <table:table-cell table:formula="of:=ABS([.J359])" office:value-type="float" office:value="22.04" calcext:value-type="float">
            <text:p>22.04</text:p>
          </table:table-cell>
          <table:table-cell table:formula="of:=[.K359]/[.F359]*100" office:value-type="float" office:value="33.9285714285714" calcext:value-type="float">
            <text:p>33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.0698" calcext:value-type="float">
            <text:p>1.0698</text:p>
          </table:table-cell>
          <table:table-cell office:value-type="float" office:value="64.19" calcext:value-type="float">
            <text:p>64.1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360]-[.F360]" office:value-type="float" office:value="1.81" calcext:value-type="float">
            <text:p>1.81</text:p>
          </table:table-cell>
          <table:table-cell table:formula="of:=ABS([.J360])" office:value-type="float" office:value="1.81" calcext:value-type="float">
            <text:p>1.81</text:p>
          </table:table-cell>
          <table:table-cell table:formula="of:=[.K360]/[.F360]*100" office:value-type="float" office:value="2.81975385574077" calcext:value-type="float">
            <text:p>2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.0671" calcext:value-type="float">
            <text:p>1.0671</text:p>
          </table:table-cell>
          <table:table-cell office:value-type="float" office:value="64.02" calcext:value-type="float">
            <text:p>64.02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H361]-[.F361]" office:value-type="float" office:value="1.98" calcext:value-type="float">
            <text:p>1.98</text:p>
          </table:table-cell>
          <table:table-cell table:formula="of:=ABS([.J361])" office:value-type="float" office:value="1.98" calcext:value-type="float">
            <text:p>1.98</text:p>
          </table:table-cell>
          <table:table-cell table:formula="of:=[.K361]/[.F361]*100" office:value-type="float" office:value="3.09278350515465" calcext:value-type="float">
            <text:p>3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.0599" calcext:value-type="float">
            <text:p>1.0599</text:p>
          </table:table-cell>
          <table:table-cell office:value-type="float" office:value="63.59" calcext:value-type="float">
            <text:p>63.59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formula="of:=[.H362]-[.F362]" office:value-type="float" office:value="2.41" calcext:value-type="float">
            <text:p>2.41</text:p>
          </table:table-cell>
          <table:table-cell table:formula="of:=ABS([.J362])" office:value-type="float" office:value="2.41" calcext:value-type="float">
            <text:p>2.41</text:p>
          </table:table-cell>
          <table:table-cell table:formula="of:=[.K362]/[.F362]*100" office:value-type="float" office:value="3.78990407296744" calcext:value-type="float">
            <text:p>3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.0686" calcext:value-type="float">
            <text:p>1.0686</text:p>
          </table:table-cell>
          <table:table-cell office:value-type="float" office:value="64.12" calcext:value-type="float">
            <text:p>64.12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formula="of:=[.H363]-[.F363]" office:value-type="float" office:value="1.88" calcext:value-type="float">
            <text:p>1.88</text:p>
          </table:table-cell>
          <table:table-cell table:formula="of:=ABS([.J363])" office:value-type="float" office:value="1.88" calcext:value-type="float">
            <text:p>1.88</text:p>
          </table:table-cell>
          <table:table-cell table:formula="of:=[.K363]/[.F363]*100" office:value-type="float" office:value="2.93200249532127" calcext:value-type="float">
            <text:p>2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.069" calcext:value-type="float">
            <text:p>1.069</text:p>
          </table:table-cell>
          <table:table-cell office:value-type="float" office:value="64.14" calcext:value-type="float">
            <text:p>64.1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364]-[.F364]" office:value-type="float" office:value="1.86" calcext:value-type="float">
            <text:p>1.86</text:p>
          </table:table-cell>
          <table:table-cell table:formula="of:=ABS([.J364])" office:value-type="float" office:value="1.86" calcext:value-type="float">
            <text:p>1.86</text:p>
          </table:table-cell>
          <table:table-cell table:formula="of:=[.K364]/[.F364]*100" office:value-type="float" office:value="2.89990645463049" calcext:value-type="float">
            <text:p>2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.074" calcext:value-type="float">
            <text:p>1.074</text:p>
          </table:table-cell>
          <table:table-cell office:value-type="float" office:value="64.44" calcext:value-type="float">
            <text:p>64.4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365]-[.F365]" office:value-type="float" office:value="1.56" calcext:value-type="float">
            <text:p>1.56</text:p>
          </table:table-cell>
          <table:table-cell table:formula="of:=ABS([.J365])" office:value-type="float" office:value="1.56" calcext:value-type="float">
            <text:p>1.56</text:p>
          </table:table-cell>
          <table:table-cell table:formula="of:=[.K365]/[.F365]*100" office:value-type="float" office:value="2.42085661080075" calcext:value-type="float">
            <text:p>2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.089" calcext:value-type="float">
            <text:p>1.089</text:p>
          </table:table-cell>
          <table:table-cell office:value-type="float" office:value="65.34" calcext:value-type="float">
            <text:p>65.3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366]-[.F366]" office:value-type="float" office:value="0.659999999999997" calcext:value-type="float">
            <text:p>0.659999999999997</text:p>
          </table:table-cell>
          <table:table-cell table:formula="of:=ABS([.J366])" office:value-type="float" office:value="0.659999999999997" calcext:value-type="float">
            <text:p>0.659999999999997</text:p>
          </table:table-cell>
          <table:table-cell table:formula="of:=[.K366]/[.F366]*100" office:value-type="float" office:value="1.010101010101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.087" calcext:value-type="float">
            <text:p>1.087</text:p>
          </table:table-cell>
          <table:table-cell office:value-type="float" office:value="65.22" calcext:value-type="float">
            <text:p>65.22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367]-[.F367]" office:value-type="float" office:value="3.78" calcext:value-type="float">
            <text:p>3.78</text:p>
          </table:table-cell>
          <table:table-cell table:formula="of:=ABS([.J367])" office:value-type="float" office:value="3.78" calcext:value-type="float">
            <text:p>3.78</text:p>
          </table:table-cell>
          <table:table-cell table:formula="of:=[.K367]/[.F367]*100" office:value-type="float" office:value="5.79576816927323" calcext:value-type="float">
            <text:p>5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.0891" calcext:value-type="float">
            <text:p>1.0891</text:p>
          </table:table-cell>
          <table:table-cell office:value-type="float" office:value="65.34" calcext:value-type="float">
            <text:p>65.34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formula="of:=[.H368]-[.F368]" office:value-type="float" office:value="3.66" calcext:value-type="float">
            <text:p>3.66</text:p>
          </table:table-cell>
          <table:table-cell table:formula="of:=ABS([.J368])" office:value-type="float" office:value="3.66" calcext:value-type="float">
            <text:p>3.66</text:p>
          </table:table-cell>
          <table:table-cell table:formula="of:=[.K368]/[.F368]*100" office:value-type="float" office:value="5.60146923783287" calcext:value-type="float">
            <text:p>5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1.0918" calcext:value-type="float">
            <text:p>1.0918</text:p>
          </table:table-cell>
          <table:table-cell office:value-type="float" office:value="65.51" calcext:value-type="float">
            <text:p>65.51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formula="of:=[.H369]-[.F369]" office:value-type="float" office:value="3.49" calcext:value-type="float">
            <text:p>3.49</text:p>
          </table:table-cell>
          <table:table-cell table:formula="of:=ABS([.J369])" office:value-type="float" office:value="3.49" calcext:value-type="float">
            <text:p>3.49</text:p>
          </table:table-cell>
          <table:table-cell table:formula="of:=[.K369]/[.F369]*100" office:value-type="float" office:value="5.32743092657609" calcext:value-type="float">
            <text:p>5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1.0988" calcext:value-type="float">
            <text:p>1.0988</text:p>
          </table:table-cell>
          <table:table-cell office:value-type="float" office:value="65.93" calcext:value-type="float">
            <text:p>65.93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formula="of:=[.H370]-[.F370]" office:value-type="float" office:value="9.06999999999999" calcext:value-type="float">
            <text:p>9.06999999999999</text:p>
          </table:table-cell>
          <table:table-cell table:formula="of:=ABS([.J370])" office:value-type="float" office:value="9.06999999999999" calcext:value-type="float">
            <text:p>9.06999999999999</text:p>
          </table:table-cell>
          <table:table-cell table:formula="of:=[.K370]/[.F370]*100" office:value-type="float" office:value="13.757015015926" calcext:value-type="float">
            <text:p>13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1.1037" calcext:value-type="float">
            <text:p>1.1037</text:p>
          </table:table-cell>
          <table:table-cell office:value-type="float" office:value="66.22" calcext:value-type="float">
            <text:p>66.22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formula="of:=[.H371]-[.F371]" office:value-type="float" office:value="8.78" calcext:value-type="float">
            <text:p>8.78</text:p>
          </table:table-cell>
          <table:table-cell table:formula="of:=ABS([.J371])" office:value-type="float" office:value="8.78" calcext:value-type="float">
            <text:p>8.78</text:p>
          </table:table-cell>
          <table:table-cell table:formula="of:=[.K371]/[.F371]*100" office:value-type="float" office:value="13.2588341890667" calcext:value-type="float">
            <text:p>1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.1028" calcext:value-type="float">
            <text:p>1.1028</text:p>
          </table:table-cell>
          <table:table-cell office:value-type="float" office:value="66.17" calcext:value-type="float">
            <text:p>66.17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372]-[.F372]" office:value-type="float" office:value="8.83" calcext:value-type="float">
            <text:p>8.83</text:p>
          </table:table-cell>
          <table:table-cell table:formula="of:=ABS([.J372])" office:value-type="float" office:value="8.83" calcext:value-type="float">
            <text:p>8.83</text:p>
          </table:table-cell>
          <table:table-cell table:formula="of:=[.K372]/[.F372]*100" office:value-type="float" office:value="13.3444158984434" calcext:value-type="float">
            <text:p>1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1.1155" calcext:value-type="float">
            <text:p>1.1155</text:p>
          </table:table-cell>
          <table:table-cell office:value-type="float" office:value="66.93" calcext:value-type="float">
            <text:p>66.9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373]-[.F373]" office:value-type="float" office:value="8.06999999999999" calcext:value-type="float">
            <text:p>8.06999999999999</text:p>
          </table:table-cell>
          <table:table-cell table:formula="of:=ABS([.J373])" office:value-type="float" office:value="8.06999999999999" calcext:value-type="float">
            <text:p>8.06999999999999</text:p>
          </table:table-cell>
          <table:table-cell table:formula="of:=[.K373]/[.F373]*100" office:value-type="float" office:value="12.0573733751681" calcext:value-type="float">
            <text:p>12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.115" calcext:value-type="float">
            <text:p>1.115</text:p>
          </table:table-cell>
          <table:table-cell office:value-type="float" office:value="66.9" calcext:value-type="float">
            <text:p>66.9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formula="of:=[.H374]-[.F374]" office:value-type="float" office:value="8.09999999999999" calcext:value-type="float">
            <text:p>8.09999999999999</text:p>
          </table:table-cell>
          <table:table-cell table:formula="of:=ABS([.J374])" office:value-type="float" office:value="8.09999999999999" calcext:value-type="float">
            <text:p>8.09999999999999</text:p>
          </table:table-cell>
          <table:table-cell table:formula="of:=[.K374]/[.F374]*100" office:value-type="float" office:value="12.1076233183856" calcext:value-type="float">
            <text:p>12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.112" calcext:value-type="float">
            <text:p>1.112</text:p>
          </table:table-cell>
          <table:table-cell office:value-type="float" office:value="66.72" calcext:value-type="float">
            <text:p>66.72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table:formula="of:=[.H375]-[.F375]" office:value-type="float" office:value="8.28" calcext:value-type="float">
            <text:p>8.28</text:p>
          </table:table-cell>
          <table:table-cell table:formula="of:=ABS([.J375])" office:value-type="float" office:value="8.28" calcext:value-type="float">
            <text:p>8.28</text:p>
          </table:table-cell>
          <table:table-cell table:formula="of:=[.K375]/[.F375]*100" office:value-type="float" office:value="12.410071942446" calcext:value-type="float">
            <text:p>12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.1253" calcext:value-type="float">
            <text:p>1.1253</text:p>
          </table:table-cell>
          <table:table-cell office:value-type="float" office:value="67.52" calcext:value-type="float">
            <text:p>67.52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formula="of:=[.H376]-[.F376]" office:value-type="float" office:value="-10.52" calcext:value-type="float">
            <text:p>-10.52</text:p>
          </table:table-cell>
          <table:table-cell table:formula="of:=ABS([.J376])" office:value-type="float" office:value="10.52" calcext:value-type="float">
            <text:p>10.52</text:p>
          </table:table-cell>
          <table:table-cell table:formula="of:=[.K376]/[.F376]*100" office:value-type="float" office:value="15.5805687203791" calcext:value-type="float">
            <text:p>15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1.1126" calcext:value-type="float">
            <text:p>1.1126</text:p>
          </table:table-cell>
          <table:table-cell office:value-type="float" office:value="66.76" calcext:value-type="float">
            <text:p>66.7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377]-[.F377]" office:value-type="float" office:value="-9.76000000000001" calcext:value-type="float">
            <text:p>-9.76000000000001</text:p>
          </table:table-cell>
          <table:table-cell table:formula="of:=ABS([.J377])" office:value-type="float" office:value="9.76000000000001" calcext:value-type="float">
            <text:p>9.76000000000001</text:p>
          </table:table-cell>
          <table:table-cell table:formula="of:=[.K377]/[.F377]*100" office:value-type="float" office:value="14.619532654284" calcext:value-type="float">
            <text:p>14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1.1366" calcext:value-type="float">
            <text:p>1.1366</text:p>
          </table:table-cell>
          <table:table-cell office:value-type="float" office:value="68.2" calcext:value-type="float">
            <text:p>68.2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378]-[.F378]" office:value-type="float" office:value="-11.2" calcext:value-type="float">
            <text:p>-11.2</text:p>
          </table:table-cell>
          <table:table-cell table:formula="of:=ABS([.J378])" office:value-type="float" office:value="11.2" calcext:value-type="float">
            <text:p>11.2</text:p>
          </table:table-cell>
          <table:table-cell table:formula="of:=[.K378]/[.F378]*100" office:value-type="float" office:value="16.4222873900293" calcext:value-type="float">
            <text:p>16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1.1509" calcext:value-type="float">
            <text:p>1.1509</text:p>
          </table:table-cell>
          <table:table-cell office:value-type="float" office:value="69.05" calcext:value-type="float">
            <text:p>69.05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379]-[.F379]" office:value-type="float" office:value="-12.05" calcext:value-type="float">
            <text:p>-12.05</text:p>
          </table:table-cell>
          <table:table-cell table:formula="of:=ABS([.J379])" office:value-type="float" office:value="12.05" calcext:value-type="float">
            <text:p>12.05</text:p>
          </table:table-cell>
          <table:table-cell table:formula="of:=[.K379]/[.F379]*100" office:value-type="float" office:value="17.4511223750905" calcext:value-type="float">
            <text:p>17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office:value-type="float" office:value="1.1582" calcext:value-type="float">
            <text:p>1.1582</text:p>
          </table:table-cell>
          <table:table-cell office:value-type="float" office:value="69.49" calcext:value-type="float">
            <text:p>69.49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[.H380]-[.F380]" office:value-type="float" office:value="-0.489999999999995" calcext:value-type="float">
            <text:p>-0.489999999999995</text:p>
          </table:table-cell>
          <table:table-cell table:formula="of:=ABS([.J380])" office:value-type="float" office:value="0.489999999999995" calcext:value-type="float">
            <text:p>0.489999999999995</text:p>
          </table:table-cell>
          <table:table-cell table:formula="of:=[.K380]/[.F380]*100" office:value-type="float" office:value="0.705137429846014" calcext:value-type="float">
            <text:p>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1.1758" calcext:value-type="float">
            <text:p>1.1758</text:p>
          </table:table-cell>
          <table:table-cell office:value-type="float" office:value="70.55" calcext:value-type="float">
            <text:p>70.55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[.H381]-[.F381]" office:value-type="float" office:value="-1.55" calcext:value-type="float">
            <text:p>-1.55</text:p>
          </table:table-cell>
          <table:table-cell table:formula="of:=ABS([.J381])" office:value-type="float" office:value="1.55" calcext:value-type="float">
            <text:p>1.55</text:p>
          </table:table-cell>
          <table:table-cell table:formula="of:=[.K381]/[.F381]*100" office:value-type="float" office:value="2.19702338766832" calcext:value-type="float">
            <text:p>2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1.1674" calcext:value-type="float">
            <text:p>1.1674</text:p>
          </table:table-cell>
          <table:table-cell office:value-type="float" office:value="70.05" calcext:value-type="float">
            <text:p>70.05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382]-[.F382]" office:value-type="float" office:value="-1.05" calcext:value-type="float">
            <text:p>-1.05</text:p>
          </table:table-cell>
          <table:table-cell table:formula="of:=ABS([.J382])" office:value-type="float" office:value="1.05" calcext:value-type="float">
            <text:p>1.05</text:p>
          </table:table-cell>
          <table:table-cell table:formula="of:=[.K382]/[.F382]*100" office:value-type="float" office:value="1.49892933618843" calcext:value-type="float">
            <text:p>1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1.1665" calcext:value-type="float">
            <text:p>1.1665</text:p>
          </table:table-cell>
          <table:table-cell office:value-type="float" office:value="69.99" calcext:value-type="float">
            <text:p>69.99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383]-[.F383]" office:value-type="float" office:value="-0.989999999999995" calcext:value-type="float">
            <text:p>-0.989999999999995</text:p>
          </table:table-cell>
          <table:table-cell table:formula="of:=ABS([.J383])" office:value-type="float" office:value="0.989999999999995" calcext:value-type="float">
            <text:p>0.989999999999995</text:p>
          </table:table-cell>
          <table:table-cell table:formula="of:=[.K383]/[.F383]*100" office:value-type="float" office:value="1.41448778396913" calcext:value-type="float">
            <text:p>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1.1888" calcext:value-type="float">
            <text:p>1.1888</text:p>
          </table:table-cell>
          <table:table-cell office:value-type="float" office:value="71.33" calcext:value-type="float">
            <text:p>71.33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384]-[.F384]" office:value-type="float" office:value="-2.33" calcext:value-type="float">
            <text:p>-2.33</text:p>
          </table:table-cell>
          <table:table-cell table:formula="of:=ABS([.J384])" office:value-type="float" office:value="2.33" calcext:value-type="float">
            <text:p>2.33</text:p>
          </table:table-cell>
          <table:table-cell table:formula="of:=[.K384]/[.F384]*100" office:value-type="float" office:value="3.26650778073742" calcext:value-type="float">
            <text:p>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57" calcext:value-type="float">
            <text:p>57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1.2282" calcext:value-type="float">
            <text:p>1.2282</text:p>
          </table:table-cell>
          <table:table-cell office:value-type="float" office:value="73.69" calcext:value-type="float">
            <text:p>73.69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formula="of:=[.H385]-[.F385]" office:value-type="float" office:value="4.31" calcext:value-type="float">
            <text:p>4.31</text:p>
          </table:table-cell>
          <table:table-cell table:formula="of:=ABS([.J385])" office:value-type="float" office:value="4.31" calcext:value-type="float">
            <text:p>4.31</text:p>
          </table:table-cell>
          <table:table-cell table:formula="of:=[.K385]/[.F385]*100" office:value-type="float" office:value="5.84882616365857" calcext:value-type="float">
            <text:p>5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58" calcext:value-type="float">
            <text:p>58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1.2454" calcext:value-type="float">
            <text:p>1.2454</text:p>
          </table:table-cell>
          <table:table-cell office:value-type="float" office:value="74.72" calcext:value-type="float">
            <text:p>74.72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formula="of:=[.H386]-[.F386]" office:value-type="float" office:value="3.28" calcext:value-type="float">
            <text:p>3.28</text:p>
          </table:table-cell>
          <table:table-cell table:formula="of:=ABS([.J386])" office:value-type="float" office:value="3.28" calcext:value-type="float">
            <text:p>3.28</text:p>
          </table:table-cell>
          <table:table-cell table:formula="of:=[.K386]/[.F386]*100" office:value-type="float" office:value="4.389721627409" calcext:value-type="float">
            <text:p>4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59" calcext:value-type="float">
            <text:p>59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1.283" calcext:value-type="float">
            <text:p>1.283</text:p>
          </table:table-cell>
          <table:table-cell office:value-type="float" office:value="76.98" calcext:value-type="float">
            <text:p>76.9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387]-[.F387]" office:value-type="float" office:value="1.02" calcext:value-type="float">
            <text:p>1.02</text:p>
          </table:table-cell>
          <table:table-cell table:formula="of:=ABS([.J387])" office:value-type="float" office:value="1.02" calcext:value-type="float">
            <text:p>1.02</text:p>
          </table:table-cell>
          <table:table-cell table:formula="of:=[.K387]/[.F387]*100" office:value-type="float" office:value="1.32501948558067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.2841" calcext:value-type="float">
            <text:p>1.2841</text:p>
          </table:table-cell>
          <table:table-cell office:value-type="float" office:value="77.05" calcext:value-type="float">
            <text:p>77.0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388]-[.F388]" office:value-type="float" office:value="0.950000000000003" calcext:value-type="float">
            <text:p>0.950000000000003</text:p>
          </table:table-cell>
          <table:table-cell table:formula="of:=ABS([.J388])" office:value-type="float" office:value="0.950000000000003" calcext:value-type="float">
            <text:p>0.950000000000003</text:p>
          </table:table-cell>
          <table:table-cell table:formula="of:=[.K388]/[.F388]*100" office:value-type="float" office:value="1.23296560674887" calcext:value-type="float">
            <text:p>1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1.2779" calcext:value-type="float">
            <text:p>1.2779</text:p>
          </table:table-cell>
          <table:table-cell office:value-type="float" office:value="76.67" calcext:value-type="float">
            <text:p>76.67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formula="of:=[.H389]-[.F389]" office:value-type="float" office:value="1.33" calcext:value-type="float">
            <text:p>1.33</text:p>
          </table:table-cell>
          <table:table-cell table:formula="of:=ABS([.J389])" office:value-type="float" office:value="1.33" calcext:value-type="float">
            <text:p>1.33</text:p>
          </table:table-cell>
          <table:table-cell table:formula="of:=[.K389]/[.F389]*100" office:value-type="float" office:value="1.73470718664406" calcext:value-type="float">
            <text:p>1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62" calcext:value-type="float">
            <text:p>62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1.2493" calcext:value-type="float">
            <text:p>1.2493</text:p>
          </table:table-cell>
          <table:table-cell office:value-type="float" office:value="74.96" calcext:value-type="float">
            <text:p>74.96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formula="of:=[.H390]-[.F390]" office:value-type="float" office:value="3.04000000000001" calcext:value-type="float">
            <text:p>3.04000000000001</text:p>
          </table:table-cell>
          <table:table-cell table:formula="of:=ABS([.J390])" office:value-type="float" office:value="3.04000000000001" calcext:value-type="float">
            <text:p>3.04000000000001</text:p>
          </table:table-cell>
          <table:table-cell table:formula="of:=[.K390]/[.F390]*100" office:value-type="float" office:value="4.0554962646745" calcext:value-type="float">
            <text:p>4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.227" calcext:value-type="float">
            <text:p>1.227</text:p>
          </table:table-cell>
          <table:table-cell office:value-type="float" office:value="73.62" calcext:value-type="float">
            <text:p>73.62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table:formula="of:=[.H391]-[.F391]" office:value-type="float" office:value="1.38" calcext:value-type="float">
            <text:p>1.38</text:p>
          </table:table-cell>
          <table:table-cell table:formula="of:=ABS([.J391])" office:value-type="float" office:value="1.38" calcext:value-type="float">
            <text:p>1.38</text:p>
          </table:table-cell>
          <table:table-cell table:formula="of:=[.K391]/[.F391]*100" office:value-type="float" office:value="1.87449062754686" calcext:value-type="float">
            <text:p>1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.2125" calcext:value-type="float">
            <text:p>1.2125</text:p>
          </table:table-cell>
          <table:table-cell office:value-type="float" office:value="72.75" calcext:value-type="float">
            <text:p>72.75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formula="of:=[.H392]-[.F392]" office:value-type="float" office:value="2.25" calcext:value-type="float">
            <text:p>2.25</text:p>
          </table:table-cell>
          <table:table-cell table:formula="of:=ABS([.J392])" office:value-type="float" office:value="2.25" calcext:value-type="float">
            <text:p>2.25</text:p>
          </table:table-cell>
          <table:table-cell table:formula="of:=[.K392]/[.F392]*100" office:value-type="float" office:value="3.09278350515464" calcext:value-type="float">
            <text:p>3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.1782" calcext:value-type="float">
            <text:p>1.1782</text:p>
          </table:table-cell>
          <table:table-cell office:value-type="float" office:value="70.69" calcext:value-type="float">
            <text:p>70.69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table:formula="of:=[.H393]-[.F393]" office:value-type="float" office:value="22.31" calcext:value-type="float">
            <text:p>22.31</text:p>
          </table:table-cell>
          <table:table-cell table:formula="of:=ABS([.J393])" office:value-type="float" office:value="22.31" calcext:value-type="float">
            <text:p>22.31</text:p>
          </table:table-cell>
          <table:table-cell table:formula="of:=[.K393]/[.F393]*100" office:value-type="float" office:value="31.56033385203" calcext:value-type="float">
            <text:p>31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66" calcext:value-type="float">
            <text:p>66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1.1869" calcext:value-type="float">
            <text:p>1.1869</text:p>
          </table:table-cell>
          <table:table-cell office:value-type="float" office:value="71.21" calcext:value-type="float">
            <text:p>71.2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394]-[.F394]" office:value-type="float" office:value="0.790000000000006" calcext:value-type="float">
            <text:p>0.790000000000006</text:p>
          </table:table-cell>
          <table:table-cell table:formula="of:=ABS([.J394])" office:value-type="float" office:value="0.790000000000006" calcext:value-type="float">
            <text:p>0.790000000000006</text:p>
          </table:table-cell>
          <table:table-cell table:formula="of:=[.K394]/[.F394]*100" office:value-type="float" office:value="1.10939474792867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1.1633" calcext:value-type="float">
            <text:p>1.1633</text:p>
          </table:table-cell>
          <table:table-cell office:value-type="float" office:value="69.8" calcext:value-type="float">
            <text:p>69.8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table:formula="of:=[.H395]-[.F395]" office:value-type="float" office:value="2.2" calcext:value-type="float">
            <text:p>2.2</text:p>
          </table:table-cell>
          <table:table-cell table:formula="of:=ABS([.J395])" office:value-type="float" office:value="2.2" calcext:value-type="float">
            <text:p>2.2</text:p>
          </table:table-cell>
          <table:table-cell table:formula="of:=[.K395]/[.F395]*100" office:value-type="float" office:value="3.15186246418339" calcext:value-type="float">
            <text:p>3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68" calcext:value-type="float">
            <text:p>68</text:p>
          </table:table-cell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office:value-type="float" office:value="1.1546" calcext:value-type="float">
            <text:p>1.1546</text:p>
          </table:table-cell>
          <table:table-cell office:value-type="float" office:value="69.27" calcext:value-type="float">
            <text:p>69.27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formula="of:=[.H396]-[.F396]" office:value-type="float" office:value="-3.27" calcext:value-type="float">
            <text:p>-3.27</text:p>
          </table:table-cell>
          <table:table-cell table:formula="of:=ABS([.J396])" office:value-type="float" office:value="3.27" calcext:value-type="float">
            <text:p>3.27</text:p>
          </table:table-cell>
          <table:table-cell table:formula="of:=[.K396]/[.F396]*100" office:value-type="float" office:value="4.7206582936336" calcext:value-type="float">
            <text:p>4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1.1765" calcext:value-type="float">
            <text:p>1.1765</text:p>
          </table:table-cell>
          <table:table-cell office:value-type="float" office:value="70.59" calcext:value-type="float">
            <text:p>70.59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formula="of:=[.H397]-[.F397]" office:value-type="float" office:value="-7.59" calcext:value-type="float">
            <text:p>-7.59</text:p>
          </table:table-cell>
          <table:table-cell table:formula="of:=ABS([.J397])" office:value-type="float" office:value="7.59" calcext:value-type="float">
            <text:p>7.59</text:p>
          </table:table-cell>
          <table:table-cell table:formula="of:=[.K397]/[.F397]*100" office:value-type="float" office:value="10.7522311942202" calcext:value-type="float">
            <text:p>10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1.1691" calcext:value-type="float">
            <text:p>1.1691</text:p>
          </table:table-cell>
          <table:table-cell office:value-type="float" office:value="70.15" calcext:value-type="float">
            <text:p>70.15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formula="of:=[.H398]-[.F398]" office:value-type="float" office:value="-13.15" calcext:value-type="float">
            <text:p>-13.15</text:p>
          </table:table-cell>
          <table:table-cell table:formula="of:=ABS([.J398])" office:value-type="float" office:value="13.15" calcext:value-type="float">
            <text:p>13.15</text:p>
          </table:table-cell>
          <table:table-cell table:formula="of:=[.K398]/[.F398]*100" office:value-type="float" office:value="18.7455452601568" calcext:value-type="float">
            <text:p>18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1.1778" calcext:value-type="float">
            <text:p>1.1778</text:p>
          </table:table-cell>
          <table:table-cell office:value-type="float" office:value="70.67" calcext:value-type="float">
            <text:p>70.67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formula="of:=[.H399]-[.F399]" office:value-type="float" office:value="-7.67" calcext:value-type="float">
            <text:p>-7.67</text:p>
          </table:table-cell>
          <table:table-cell table:formula="of:=ABS([.J399])" office:value-type="float" office:value="7.67" calcext:value-type="float">
            <text:p>7.67</text:p>
          </table:table-cell>
          <table:table-cell table:formula="of:=[.K399]/[.F399]*100" office:value-type="float" office:value="10.853261638602" calcext:value-type="float">
            <text:p>10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1.1728" calcext:value-type="float">
            <text:p>1.1728</text:p>
          </table:table-cell>
          <table:table-cell office:value-type="float" office:value="70.37" calcext:value-type="float">
            <text:p>70.37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formula="of:=[.H400]-[.F400]" office:value-type="float" office:value="-7.37" calcext:value-type="float">
            <text:p>-7.37</text:p>
          </table:table-cell>
          <table:table-cell table:formula="of:=ABS([.J400])" office:value-type="float" office:value="7.37" calcext:value-type="float">
            <text:p>7.37</text:p>
          </table:table-cell>
          <table:table-cell table:formula="of:=[.K400]/[.F400]*100" office:value-type="float" office:value="10.4732130169106" calcext:value-type="float">
            <text:p>10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1.137" calcext:value-type="float">
            <text:p>1.137</text:p>
          </table:table-cell>
          <table:table-cell office:value-type="float" office:value="68.22" calcext:value-type="float">
            <text:p>68.22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table:formula="of:=[.H401]-[.F401]" office:value-type="float" office:value="-2.22" calcext:value-type="float">
            <text:p>-2.22</text:p>
          </table:table-cell>
          <table:table-cell table:formula="of:=ABS([.J401])" office:value-type="float" office:value="2.22" calcext:value-type="float">
            <text:p>2.22</text:p>
          </table:table-cell>
          <table:table-cell table:formula="of:=[.K401]/[.F401]*100" office:value-type="float" office:value="3.25417766051011" calcext:value-type="float">
            <text:p>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1.1253" calcext:value-type="float">
            <text:p>1.1253</text:p>
          </table:table-cell>
          <table:table-cell office:value-type="float" office:value="67.52" calcext:value-type="float">
            <text:p>67.5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402]-[.F402]" office:value-type="float" office:value="16.48" calcext:value-type="float">
            <text:p>16.48</text:p>
          </table:table-cell>
          <table:table-cell table:formula="of:=ABS([.J402])" office:value-type="float" office:value="16.48" calcext:value-type="float">
            <text:p>16.48</text:p>
          </table:table-cell>
          <table:table-cell table:formula="of:=[.K402]/[.F402]*100" office:value-type="float" office:value="24.4075829383886" calcext:value-type="float">
            <text:p>24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.1165" calcext:value-type="float">
            <text:p>1.1165</text:p>
          </table:table-cell>
          <table:table-cell office:value-type="float" office:value="66.99" calcext:value-type="float">
            <text:p>66.99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formula="of:=[.H403]-[.F403]" office:value-type="float" office:value="17.01" calcext:value-type="float">
            <text:p>17.01</text:p>
          </table:table-cell>
          <table:table-cell table:formula="of:=ABS([.J403])" office:value-type="float" office:value="17.01" calcext:value-type="float">
            <text:p>17.01</text:p>
          </table:table-cell>
          <table:table-cell table:formula="of:=[.K403]/[.F403]*100" office:value-type="float" office:value="25.3918495297806" calcext:value-type="float">
            <text:p>25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76" calcext:value-type="float">
            <text:p>76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1.1037" calcext:value-type="float">
            <text:p>1.1037</text:p>
          </table:table-cell>
          <table:table-cell office:value-type="float" office:value="66.22" calcext:value-type="float">
            <text:p>66.22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table:formula="of:=[.H404]-[.F404]" office:value-type="float" office:value="5.78" calcext:value-type="float">
            <text:p>5.78</text:p>
          </table:table-cell>
          <table:table-cell table:formula="of:=ABS([.J404])" office:value-type="float" office:value="5.78" calcext:value-type="float">
            <text:p>5.78</text:p>
          </table:table-cell>
          <table:table-cell table:formula="of:=[.K404]/[.F404]*100" office:value-type="float" office:value="8.72848082150408" calcext:value-type="float">
            <text:p>8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77" calcext:value-type="float">
            <text:p>7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1.099" calcext:value-type="float">
            <text:p>1.099</text:p>
          </table:table-cell>
          <table:table-cell office:value-type="float" office:value="65.94" calcext:value-type="float">
            <text:p>65.9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405]-[.F405]" office:value-type="float" office:value="6.06" calcext:value-type="float">
            <text:p>6.06</text:p>
          </table:table-cell>
          <table:table-cell table:formula="of:=ABS([.J405])" office:value-type="float" office:value="6.06" calcext:value-type="float">
            <text:p>6.06</text:p>
          </table:table-cell>
          <table:table-cell table:formula="of:=[.K405]/[.F405]*100" office:value-type="float" office:value="9.1901728844404" calcext:value-type="float">
            <text:p>9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1.0966" calcext:value-type="float">
            <text:p>1.0966</text:p>
          </table:table-cell>
          <table:table-cell office:value-type="float" office:value="65.8" calcext:value-type="float">
            <text:p>65.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406]-[.F406]" office:value-type="float" office:value="6.2" calcext:value-type="float">
            <text:p>6.2</text:p>
          </table:table-cell>
          <table:table-cell table:formula="of:=ABS([.J406])" office:value-type="float" office:value="6.2" calcext:value-type="float">
            <text:p>6.2</text:p>
          </table:table-cell>
          <table:table-cell table:formula="of:=[.K406]/[.F406]*100" office:value-type="float" office:value="9.42249240121581" calcext:value-type="float">
            <text:p>9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79" calcext:value-type="float">
            <text:p>79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1.1003" calcext:value-type="float">
            <text:p>1.1003</text:p>
          </table:table-cell>
          <table:table-cell office:value-type="float" office:value="66.02" calcext:value-type="float">
            <text:p>66.0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407]-[.F407]" office:value-type="float" office:value="5.98" calcext:value-type="float">
            <text:p>5.98</text:p>
          </table:table-cell>
          <table:table-cell table:formula="of:=ABS([.J407])" office:value-type="float" office:value="5.98" calcext:value-type="float">
            <text:p>5.98</text:p>
          </table:table-cell>
          <table:table-cell table:formula="of:=[.K407]/[.F407]*100" office:value-type="float" office:value="9.05786125416541" calcext:value-type="float">
            <text:p>9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415" calcext:value-type="float">
            <text:p>415</text:p>
          </table:table-cell>
          <table:table-cell office:value-type="float" office:value="1.1015" calcext:value-type="float">
            <text:p>1.1015</text:p>
          </table:table-cell>
          <table:table-cell office:value-type="float" office:value="66.09" calcext:value-type="float">
            <text:p>66.09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formula="of:=[.H408]-[.F408]" office:value-type="float" office:value="5.91" calcext:value-type="float">
            <text:p>5.91</text:p>
          </table:table-cell>
          <table:table-cell table:formula="of:=ABS([.J408])" office:value-type="float" office:value="5.91" calcext:value-type="float">
            <text:p>5.91</text:p>
          </table:table-cell>
          <table:table-cell table:formula="of:=[.K408]/[.F408]*100" office:value-type="float" office:value="8.94235133908306" calcext:value-type="float">
            <text:p>8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1.1134" calcext:value-type="float">
            <text:p>1.1134</text:p>
          </table:table-cell>
          <table:table-cell office:value-type="float" office:value="66.8" calcext:value-type="float">
            <text:p>66.8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409]-[.F409]" office:value-type="float" office:value="2.2" calcext:value-type="float">
            <text:p>2.2</text:p>
          </table:table-cell>
          <table:table-cell table:formula="of:=ABS([.J409])" office:value-type="float" office:value="2.2" calcext:value-type="float">
            <text:p>2.2</text:p>
          </table:table-cell>
          <table:table-cell table:formula="of:=[.K409]/[.F409]*100" office:value-type="float" office:value="3.2934131736527" calcext:value-type="float">
            <text:p>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5</text:p>
          </table:table-cell>
          <table:table-cell office:value-type="float" office:value="82" calcext:value-type="float">
            <text:p>82</text:p>
          </table:table-cell>
          <table:table-cell office:value-type="float" office:value="405" calcext:value-type="float">
            <text:p>405</text:p>
          </table:table-cell>
          <table:table-cell office:value-type="float" office:value="425" calcext:value-type="float">
            <text:p>425</text:p>
          </table:table-cell>
          <table:table-cell office:value-type="float" office:value="1.1086" calcext:value-type="float">
            <text:p>1.1086</text:p>
          </table:table-cell>
          <table:table-cell office:value-type="float" office:value="66.51" calcext:value-type="float">
            <text:p>66.51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formula="of:=[.H410]-[.F410]" office:value-type="float" office:value="2.49" calcext:value-type="float">
            <text:p>2.49</text:p>
          </table:table-cell>
          <table:table-cell table:formula="of:=ABS([.J410])" office:value-type="float" office:value="2.49" calcext:value-type="float">
            <text:p>2.49</text:p>
          </table:table-cell>
          <table:table-cell table:formula="of:=[.K410]/[.F410]*100" office:value-type="float" office:value="3.74379792512403" calcext:value-type="float">
            <text:p>3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2234" calcext:value-type="float">
            <text:p>1.2234</text:p>
          </table:table-cell>
          <table:table-cell office:value-type="float" office:value="73.4" calcext:value-type="float">
            <text:p>73.4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table:formula="of:=[.H411]-[.F411]" office:value-type="float" office:value="-16.4" calcext:value-type="float">
            <text:p>-16.4</text:p>
          </table:table-cell>
          <table:table-cell table:formula="of:=ABS([.J411])" office:value-type="float" office:value="16.4" calcext:value-type="float">
            <text:p>16.4</text:p>
          </table:table-cell>
          <table:table-cell table:formula="of:=[.K411]/[.F411]*100" office:value-type="float" office:value="22.3433242506812" calcext:value-type="float">
            <text:p>22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2387" calcext:value-type="float">
            <text:p>1.2387</text:p>
          </table:table-cell>
          <table:table-cell office:value-type="float" office:value="74.32" calcext:value-type="float">
            <text:p>74.32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412]-[.F412]" office:value-type="float" office:value="-17.32" calcext:value-type="float">
            <text:p>-17.32</text:p>
          </table:table-cell>
          <table:table-cell table:formula="of:=ABS([.J412])" office:value-type="float" office:value="17.32" calcext:value-type="float">
            <text:p>17.32</text:p>
          </table:table-cell>
          <table:table-cell table:formula="of:=[.K412]/[.F412]*100" office:value-type="float" office:value="23.3046286329386" calcext:value-type="float">
            <text:p>2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244" calcext:value-type="float">
            <text:p>1.244</text:p>
          </table:table-cell>
          <table:table-cell office:value-type="float" office:value="74.64" calcext:value-type="float">
            <text:p>74.64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[.H413]-[.F413]" office:value-type="float" office:value="-17.64" calcext:value-type="float">
            <text:p>-17.64</text:p>
          </table:table-cell>
          <table:table-cell table:formula="of:=ABS([.J413])" office:value-type="float" office:value="17.64" calcext:value-type="float">
            <text:p>17.64</text:p>
          </table:table-cell>
          <table:table-cell table:formula="of:=[.K413]/[.F413]*100" office:value-type="float" office:value="23.6334405144695" calcext:value-type="float">
            <text:p>23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2435" calcext:value-type="float">
            <text:p>1.2435</text:p>
          </table:table-cell>
          <table:table-cell office:value-type="float" office:value="74.61" calcext:value-type="float">
            <text:p>74.6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414]-[.F414]" office:value-type="float" office:value="-20.61" calcext:value-type="float">
            <text:p>-20.61</text:p>
          </table:table-cell>
          <table:table-cell table:formula="of:=ABS([.J414])" office:value-type="float" office:value="20.61" calcext:value-type="float">
            <text:p>20.61</text:p>
          </table:table-cell>
          <table:table-cell table:formula="of:=[.K414]/[.F414]*100" office:value-type="float" office:value="27.6236429433052" calcext:value-type="float">
            <text:p>27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.2214" calcext:value-type="float">
            <text:p>1.2214</text:p>
          </table:table-cell>
          <table:table-cell office:value-type="float" office:value="73.28" calcext:value-type="float">
            <text:p>73.2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415]-[.F415]" office:value-type="float" office:value="-19.28" calcext:value-type="float">
            <text:p>-19.28</text:p>
          </table:table-cell>
          <table:table-cell table:formula="of:=ABS([.J415])" office:value-type="float" office:value="19.28" calcext:value-type="float">
            <text:p>19.28</text:p>
          </table:table-cell>
          <table:table-cell table:formula="of:=[.K415]/[.F415]*100" office:value-type="float" office:value="26.3100436681223" calcext:value-type="float">
            <text:p>26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215" calcext:value-type="float">
            <text:p>1.215</text:p>
          </table:table-cell>
          <table:table-cell office:value-type="float" office:value="72.9" calcext:value-type="float">
            <text:p>72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416]-[.F416]" office:value-type="float" office:value="-18.9" calcext:value-type="float">
            <text:p>-18.9</text:p>
          </table:table-cell>
          <table:table-cell table:formula="of:=ABS([.J416])" office:value-type="float" office:value="18.9" calcext:value-type="float">
            <text:p>18.9</text:p>
          </table:table-cell>
          <table:table-cell table:formula="of:=[.K416]/[.F416]*100" office:value-type="float" office:value="25.9259259259259" calcext:value-type="float">
            <text:p>25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2012" calcext:value-type="float">
            <text:p>1.2012</text:p>
          </table:table-cell>
          <table:table-cell office:value-type="float" office:value="72.07" calcext:value-type="float">
            <text:p>72.07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formula="of:=[.H417]-[.F417]" office:value-type="float" office:value="-9.06999999999999" calcext:value-type="float">
            <text:p>-9.06999999999999</text:p>
          </table:table-cell>
          <table:table-cell table:formula="of:=ABS([.J417])" office:value-type="float" office:value="9.06999999999999" calcext:value-type="float">
            <text:p>9.06999999999999</text:p>
          </table:table-cell>
          <table:table-cell table:formula="of:=[.K417]/[.F417]*100" office:value-type="float" office:value="12.584986818371" calcext:value-type="float">
            <text:p>12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.1941" calcext:value-type="float">
            <text:p>1.1941</text:p>
          </table:table-cell>
          <table:table-cell office:value-type="float" office:value="71.64" calcext:value-type="float">
            <text:p>71.64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418]-[.F418]" office:value-type="float" office:value="-8.64" calcext:value-type="float">
            <text:p>-8.64</text:p>
          </table:table-cell>
          <table:table-cell table:formula="of:=ABS([.J418])" office:value-type="float" office:value="8.64" calcext:value-type="float">
            <text:p>8.64</text:p>
          </table:table-cell>
          <table:table-cell table:formula="of:=[.K418]/[.F418]*100" office:value-type="float" office:value="12.0603015075377" calcext:value-type="float">
            <text:p>12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.1933" calcext:value-type="float">
            <text:p>1.1933</text:p>
          </table:table-cell>
          <table:table-cell office:value-type="float" office:value="71.6" calcext:value-type="float">
            <text:p>71.6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419]-[.F419]" office:value-type="float" office:value="-8.59999999999999" calcext:value-type="float">
            <text:p>-8.59999999999999</text:p>
          </table:table-cell>
          <table:table-cell table:formula="of:=ABS([.J419])" office:value-type="float" office:value="8.59999999999999" calcext:value-type="float">
            <text:p>8.59999999999999</text:p>
          </table:table-cell>
          <table:table-cell table:formula="of:=[.K419]/[.F419]*100" office:value-type="float" office:value="12.0111731843575" calcext:value-type="float">
            <text:p>12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.179" calcext:value-type="float">
            <text:p>1.179</text:p>
          </table:table-cell>
          <table:table-cell office:value-type="float" office:value="70.74" calcext:value-type="float">
            <text:p>70.74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formula="of:=[.H420]-[.F420]" office:value-type="float" office:value="-7.74" calcext:value-type="float">
            <text:p>-7.74</text:p>
          </table:table-cell>
          <table:table-cell table:formula="of:=ABS([.J420])" office:value-type="float" office:value="7.74" calcext:value-type="float">
            <text:p>7.74</text:p>
          </table:table-cell>
          <table:table-cell table:formula="of:=[.K420]/[.F420]*100" office:value-type="float" office:value="10.941475826972" calcext:value-type="float">
            <text:p>10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1835" calcext:value-type="float">
            <text:p>1.1835</text:p>
          </table:table-cell>
          <table:table-cell office:value-type="float" office:value="71.01" calcext:value-type="float">
            <text:p>71.01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formula="of:=[.H421]-[.F421]" office:value-type="float" office:value="6.99" calcext:value-type="float">
            <text:p>6.99</text:p>
          </table:table-cell>
          <table:table-cell table:formula="of:=ABS([.J421])" office:value-type="float" office:value="6.99" calcext:value-type="float">
            <text:p>6.99</text:p>
          </table:table-cell>
          <table:table-cell table:formula="of:=[.K421]/[.F421]*100" office:value-type="float" office:value="9.84368398817067" calcext:value-type="float">
            <text:p>9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.1817" calcext:value-type="float">
            <text:p>1.1817</text:p>
          </table:table-cell>
          <table:table-cell office:value-type="float" office:value="70.9" calcext:value-type="float">
            <text:p>70.9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422]-[.F422]" office:value-type="float" office:value="7.09999999999999" calcext:value-type="float">
            <text:p>7.09999999999999</text:p>
          </table:table-cell>
          <table:table-cell table:formula="of:=ABS([.J422])" office:value-type="float" office:value="7.09999999999999" calcext:value-type="float">
            <text:p>7.09999999999999</text:p>
          </table:table-cell>
          <table:table-cell table:formula="of:=[.K422]/[.F422]*100" office:value-type="float" office:value="10.0141043723554" calcext:value-type="float">
            <text:p>10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1854" calcext:value-type="float">
            <text:p>1.1854</text:p>
          </table:table-cell>
          <table:table-cell office:value-type="float" office:value="71.12" calcext:value-type="float">
            <text:p>71.12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formula="of:=[.H423]-[.F423]" office:value-type="float" office:value="6.88" calcext:value-type="float">
            <text:p>6.88</text:p>
          </table:table-cell>
          <table:table-cell table:formula="of:=ABS([.J423])" office:value-type="float" office:value="6.88" calcext:value-type="float">
            <text:p>6.88</text:p>
          </table:table-cell>
          <table:table-cell table:formula="of:=[.K423]/[.F423]*100" office:value-type="float" office:value="9.67379077615297" calcext:value-type="float">
            <text:p>9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.1929" calcext:value-type="float">
            <text:p>1.1929</text:p>
          </table:table-cell>
          <table:table-cell office:value-type="float" office:value="71.57" calcext:value-type="float">
            <text:p>71.57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formula="of:=[.H424]-[.F424]" office:value-type="float" office:value="6.43000000000001" calcext:value-type="float">
            <text:p>6.43000000000001</text:p>
          </table:table-cell>
          <table:table-cell table:formula="of:=ABS([.J424])" office:value-type="float" office:value="6.43000000000001" calcext:value-type="float">
            <text:p>6.43000000000001</text:p>
          </table:table-cell>
          <table:table-cell table:formula="of:=[.K424]/[.F424]*100" office:value-type="float" office:value="8.98421126170184" calcext:value-type="float">
            <text:p>9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.1876" calcext:value-type="float">
            <text:p>1.1876</text:p>
          </table:table-cell>
          <table:table-cell office:value-type="float" office:value="71.26" calcext:value-type="float">
            <text:p>71.26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[.H425]-[.F425]" office:value-type="float" office:value="3.74" calcext:value-type="float">
            <text:p>3.74</text:p>
          </table:table-cell>
          <table:table-cell table:formula="of:=ABS([.J425])" office:value-type="float" office:value="3.74" calcext:value-type="float">
            <text:p>3.74</text:p>
          </table:table-cell>
          <table:table-cell table:formula="of:=[.K425]/[.F425]*100" office:value-type="float" office:value="5.24838619141172" calcext:value-type="float">
            <text:p>5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.1824" calcext:value-type="float">
            <text:p>1.1824</text:p>
          </table:table-cell>
          <table:table-cell office:value-type="float" office:value="70.95" calcext:value-type="float">
            <text:p>70.95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formula="of:=[.H426]-[.F426]" office:value-type="float" office:value="4.05" calcext:value-type="float">
            <text:p>4.05</text:p>
          </table:table-cell>
          <table:table-cell table:formula="of:=ABS([.J426])" office:value-type="float" office:value="4.05" calcext:value-type="float">
            <text:p>4.05</text:p>
          </table:table-cell>
          <table:table-cell table:formula="of:=[.K426]/[.F426]*100" office:value-type="float" office:value="5.70824524312896" calcext:value-type="float">
            <text:p>5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2002" calcext:value-type="float">
            <text:p>1.2002</text:p>
          </table:table-cell>
          <table:table-cell office:value-type="float" office:value="72.01" calcext:value-type="float">
            <text:p>72.01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H427]-[.F427]" office:value-type="float" office:value="-9.01000000000001" calcext:value-type="float">
            <text:p>-9.01000000000001</text:p>
          </table:table-cell>
          <table:table-cell table:formula="of:=ABS([.J427])" office:value-type="float" office:value="9.01000000000001" calcext:value-type="float">
            <text:p>9.01000000000001</text:p>
          </table:table-cell>
          <table:table-cell table:formula="of:=[.K427]/[.F427]*100" office:value-type="float" office:value="12.5121510901264" calcext:value-type="float">
            <text:p>12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.2015" calcext:value-type="float">
            <text:p>1.2015</text:p>
          </table:table-cell>
          <table:table-cell office:value-type="float" office:value="72.09" calcext:value-type="float">
            <text:p>72.09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table:formula="of:=[.H428]-[.F428]" office:value-type="float" office:value="-9.09" calcext:value-type="float">
            <text:p>-9.09</text:p>
          </table:table-cell>
          <table:table-cell table:formula="of:=ABS([.J428])" office:value-type="float" office:value="9.09" calcext:value-type="float">
            <text:p>9.09</text:p>
          </table:table-cell>
          <table:table-cell table:formula="of:=[.K428]/[.F428]*100" office:value-type="float" office:value="12.6092384519351" calcext:value-type="float">
            <text:p>12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.2085" calcext:value-type="float">
            <text:p>1.2085</text:p>
          </table:table-cell>
          <table:table-cell office:value-type="float" office:value="72.51" calcext:value-type="float">
            <text:p>72.51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formula="of:=[.H429]-[.F429]" office:value-type="float" office:value="5.49" calcext:value-type="float">
            <text:p>5.49</text:p>
          </table:table-cell>
          <table:table-cell table:formula="of:=ABS([.J429])" office:value-type="float" office:value="5.49" calcext:value-type="float">
            <text:p>5.49</text:p>
          </table:table-cell>
          <table:table-cell table:formula="of:=[.K429]/[.F429]*100" office:value-type="float" office:value="7.57136946628051" calcext:value-type="float">
            <text:p>7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.2365" calcext:value-type="float">
            <text:p>1.2365</text:p>
          </table:table-cell>
          <table:table-cell office:value-type="float" office:value="74.19" calcext:value-type="float">
            <text:p>74.19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430]-[.F430]" office:value-type="float" office:value="3.81" calcext:value-type="float">
            <text:p>3.81</text:p>
          </table:table-cell>
          <table:table-cell table:formula="of:=ABS([.J430])" office:value-type="float" office:value="3.81" calcext:value-type="float">
            <text:p>3.81</text:p>
          </table:table-cell>
          <table:table-cell table:formula="of:=[.K430]/[.F430]*100" office:value-type="float" office:value="5.13546300040437" calcext:value-type="float">
            <text:p>5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.2247" calcext:value-type="float">
            <text:p>1.2247</text:p>
          </table:table-cell>
          <table:table-cell office:value-type="float" office:value="73.48" calcext:value-type="float">
            <text:p>73.4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431]-[.F431]" office:value-type="float" office:value="4.52" calcext:value-type="float">
            <text:p>4.52</text:p>
          </table:table-cell>
          <table:table-cell table:formula="of:=ABS([.J431])" office:value-type="float" office:value="4.52" calcext:value-type="float">
            <text:p>4.52</text:p>
          </table:table-cell>
          <table:table-cell table:formula="of:=[.K431]/[.F431]*100" office:value-type="float" office:value="6.15133369624387" calcext:value-type="float">
            <text:p>6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.2416" calcext:value-type="float">
            <text:p>1.2416</text:p>
          </table:table-cell>
          <table:table-cell office:value-type="float" office:value="74.49" calcext:value-type="float">
            <text:p>74.49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432]-[.F432]" office:value-type="float" office:value="3.51000000000001" calcext:value-type="float">
            <text:p>3.51000000000001</text:p>
          </table:table-cell>
          <table:table-cell table:formula="of:=ABS([.J432])" office:value-type="float" office:value="3.51000000000001" calcext:value-type="float">
            <text:p>3.51000000000001</text:p>
          </table:table-cell>
          <table:table-cell table:formula="of:=[.K432]/[.F432]*100" office:value-type="float" office:value="4.71204188481676" calcext:value-type="float">
            <text:p>4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.2409" calcext:value-type="float">
            <text:p>1.2409</text:p>
          </table:table-cell>
          <table:table-cell office:value-type="float" office:value="74.45" calcext:value-type="float">
            <text:p>74.4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433]-[.F433]" office:value-type="float" office:value="15.55" calcext:value-type="float">
            <text:p>15.55</text:p>
          </table:table-cell>
          <table:table-cell table:formula="of:=ABS([.J433])" office:value-type="float" office:value="15.55" calcext:value-type="float">
            <text:p>15.55</text:p>
          </table:table-cell>
          <table:table-cell table:formula="of:=[.K433]/[.F433]*100" office:value-type="float" office:value="20.8865010073875" calcext:value-type="float">
            <text:p>20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.2183" calcext:value-type="float">
            <text:p>1.2183</text:p>
          </table:table-cell>
          <table:table-cell office:value-type="float" office:value="73.1" calcext:value-type="float">
            <text:p>73.1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formula="of:=[.H434]-[.F434]" office:value-type="float" office:value="16.9" calcext:value-type="float">
            <text:p>16.9</text:p>
          </table:table-cell>
          <table:table-cell table:formula="of:=ABS([.J434])" office:value-type="float" office:value="16.9" calcext:value-type="float">
            <text:p>16.9</text:p>
          </table:table-cell>
          <table:table-cell table:formula="of:=[.K434]/[.F434]*100" office:value-type="float" office:value="23.1190150478796" calcext:value-type="float">
            <text:p>23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.2109" calcext:value-type="float">
            <text:p>1.2109</text:p>
          </table:table-cell>
          <table:table-cell office:value-type="float" office:value="72.65" calcext:value-type="float">
            <text:p>72.65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formula="of:=[.H435]-[.F435]" office:value-type="float" office:value="17.35" calcext:value-type="float">
            <text:p>17.35</text:p>
          </table:table-cell>
          <table:table-cell table:formula="of:=ABS([.J435])" office:value-type="float" office:value="17.35" calcext:value-type="float">
            <text:p>17.35</text:p>
          </table:table-cell>
          <table:table-cell table:formula="of:=[.K435]/[.F435]*100" office:value-type="float" office:value="23.8816242257398" calcext:value-type="float">
            <text:p>23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.2037" calcext:value-type="float">
            <text:p>1.2037</text:p>
          </table:table-cell>
          <table:table-cell office:value-type="float" office:value="72.22" calcext:value-type="float">
            <text:p>72.22</text:p>
          </table:table-cell>
          <table:table-cell office:value-type="float" office:value="1.7" calcext:value-type="float">
            <text:p>1.7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table:formula="of:=[.H436]-[.F436]" office:value-type="float" office:value="29.78" calcext:value-type="float">
            <text:p>29.78</text:p>
          </table:table-cell>
          <table:table-cell table:formula="of:=ABS([.J436])" office:value-type="float" office:value="29.78" calcext:value-type="float">
            <text:p>29.78</text:p>
          </table:table-cell>
          <table:table-cell table:formula="of:=[.K436]/[.F436]*100" office:value-type="float" office:value="41.2351149266131" calcext:value-type="float">
            <text:p>41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.2206" calcext:value-type="float">
            <text:p>1.2206</text:p>
          </table:table-cell>
          <table:table-cell office:value-type="float" office:value="73.23" calcext:value-type="float">
            <text:p>73.2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437]-[.F437]" office:value-type="float" office:value="16.77" calcext:value-type="float">
            <text:p>16.77</text:p>
          </table:table-cell>
          <table:table-cell table:formula="of:=ABS([.J437])" office:value-type="float" office:value="16.77" calcext:value-type="float">
            <text:p>16.77</text:p>
          </table:table-cell>
          <table:table-cell table:formula="of:=[.K437]/[.F437]*100" office:value-type="float" office:value="22.9004506349857" calcext:value-type="float">
            <text:p>22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.2329" calcext:value-type="float">
            <text:p>1.2329</text:p>
          </table:table-cell>
          <table:table-cell office:value-type="float" office:value="73.98" calcext:value-type="float">
            <text:p>73.98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H438]-[.F438]" office:value-type="float" office:value="13.02" calcext:value-type="float">
            <text:p>13.02</text:p>
          </table:table-cell>
          <table:table-cell table:formula="of:=ABS([.J438])" office:value-type="float" office:value="13.02" calcext:value-type="float">
            <text:p>13.02</text:p>
          </table:table-cell>
          <table:table-cell table:formula="of:=[.K438]/[.F438]*100" office:value-type="float" office:value="17.5993511759935" calcext:value-type="float">
            <text:p>17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.2329" calcext:value-type="float">
            <text:p>1.2329</text:p>
          </table:table-cell>
          <table:table-cell office:value-type="float" office:value="73.98" calcext:value-type="float">
            <text:p>73.9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439]-[.F439]" office:value-type="float" office:value="10.02" calcext:value-type="float">
            <text:p>10.02</text:p>
          </table:table-cell>
          <table:table-cell table:formula="of:=ABS([.J439])" office:value-type="float" office:value="10.02" calcext:value-type="float">
            <text:p>10.02</text:p>
          </table:table-cell>
          <table:table-cell table:formula="of:=[.K439]/[.F439]*100" office:value-type="float" office:value="13.544201135442" calcext:value-type="float">
            <text:p>13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.2175" calcext:value-type="float">
            <text:p>1.2175</text:p>
          </table:table-cell>
          <table:table-cell office:value-type="float" office:value="73.05" calcext:value-type="float">
            <text:p>73.05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440]-[.F440]" office:value-type="float" office:value="10.95" calcext:value-type="float">
            <text:p>10.95</text:p>
          </table:table-cell>
          <table:table-cell table:formula="of:=ABS([.J440])" office:value-type="float" office:value="10.95" calcext:value-type="float">
            <text:p>10.95</text:p>
          </table:table-cell>
          <table:table-cell table:formula="of:=[.K440]/[.F440]*100" office:value-type="float" office:value="14.9897330595483" calcext:value-type="float">
            <text:p>15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.2074" calcext:value-type="float">
            <text:p>1.2074</text:p>
          </table:table-cell>
          <table:table-cell office:value-type="float" office:value="72.44" calcext:value-type="float">
            <text:p>72.4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441]-[.F441]" office:value-type="float" office:value="-18.44" calcext:value-type="float">
            <text:p>-18.44</text:p>
          </table:table-cell>
          <table:table-cell table:formula="of:=ABS([.J441])" office:value-type="float" office:value="18.44" calcext:value-type="float">
            <text:p>18.44</text:p>
          </table:table-cell>
          <table:table-cell table:formula="of:=[.K441]/[.F441]*100" office:value-type="float" office:value="25.4555494202098" calcext:value-type="float">
            <text:p>25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.2098" calcext:value-type="float">
            <text:p>1.2098</text:p>
          </table:table-cell>
          <table:table-cell office:value-type="float" office:value="72.59" calcext:value-type="float">
            <text:p>72.5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442]-[.F442]" office:value-type="float" office:value="-18.59" calcext:value-type="float">
            <text:p>-18.59</text:p>
          </table:table-cell>
          <table:table-cell table:formula="of:=ABS([.J442])" office:value-type="float" office:value="18.59" calcext:value-type="float">
            <text:p>18.59</text:p>
          </table:table-cell>
          <table:table-cell table:formula="of:=[.K442]/[.F442]*100" office:value-type="float" office:value="25.6095880975341" calcext:value-type="float">
            <text:p>25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.2239" calcext:value-type="float">
            <text:p>1.2239</text:p>
          </table:table-cell>
          <table:table-cell office:value-type="float" office:value="73.43" calcext:value-type="float">
            <text:p>73.4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443]-[.F443]" office:value-type="float" office:value="-19.43" calcext:value-type="float">
            <text:p>-19.43</text:p>
          </table:table-cell>
          <table:table-cell table:formula="of:=ABS([.J443])" office:value-type="float" office:value="19.43" calcext:value-type="float">
            <text:p>19.43</text:p>
          </table:table-cell>
          <table:table-cell table:formula="of:=[.K443]/[.F443]*100" office:value-type="float" office:value="26.4605746969903" calcext:value-type="float">
            <text:p>26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.2233" calcext:value-type="float">
            <text:p>1.2233</text:p>
          </table:table-cell>
          <table:table-cell office:value-type="float" office:value="73.4" calcext:value-type="float">
            <text:p>73.4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table:formula="of:=[.H444]-[.F444]" office:value-type="float" office:value="-19.4" calcext:value-type="float">
            <text:p>-19.4</text:p>
          </table:table-cell>
          <table:table-cell table:formula="of:=ABS([.J444])" office:value-type="float" office:value="19.4" calcext:value-type="float">
            <text:p>19.4</text:p>
          </table:table-cell>
          <table:table-cell table:formula="of:=[.K444]/[.F444]*100" office:value-type="float" office:value="26.4305177111717" calcext:value-type="float">
            <text:p>26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.2163" calcext:value-type="float">
            <text:p>1.2163</text:p>
          </table:table-cell>
          <table:table-cell office:value-type="float" office:value="72.98" calcext:value-type="float">
            <text:p>72.98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formula="of:=[.H445]-[.F445]" office:value-type="float" office:value="-18.98" calcext:value-type="float">
            <text:p>-18.98</text:p>
          </table:table-cell>
          <table:table-cell table:formula="of:=ABS([.J445])" office:value-type="float" office:value="18.98" calcext:value-type="float">
            <text:p>18.98</text:p>
          </table:table-cell>
          <table:table-cell table:formula="of:=[.K445]/[.F445]*100" office:value-type="float" office:value="26.0071252397917" calcext:value-type="float">
            <text:p>26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.2214" calcext:value-type="float">
            <text:p>1.2214</text:p>
          </table:table-cell>
          <table:table-cell office:value-type="float" office:value="73.28" calcext:value-type="float">
            <text:p>73.2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446]-[.F446]" office:value-type="float" office:value="-19.28" calcext:value-type="float">
            <text:p>-19.28</text:p>
          </table:table-cell>
          <table:table-cell table:formula="of:=ABS([.J446])" office:value-type="float" office:value="19.28" calcext:value-type="float">
            <text:p>19.28</text:p>
          </table:table-cell>
          <table:table-cell table:formula="of:=[.K446]/[.F446]*100" office:value-type="float" office:value="26.3100436681223" calcext:value-type="float">
            <text:p>26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.2121" calcext:value-type="float">
            <text:p>1.2121</text:p>
          </table:table-cell>
          <table:table-cell office:value-type="float" office:value="72.73" calcext:value-type="float">
            <text:p>72.7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447]-[.F447]" office:value-type="float" office:value="-18.73" calcext:value-type="float">
            <text:p>-18.73</text:p>
          </table:table-cell>
          <table:table-cell table:formula="of:=ABS([.J447])" office:value-type="float" office:value="18.73" calcext:value-type="float">
            <text:p>18.73</text:p>
          </table:table-cell>
          <table:table-cell table:formula="of:=[.K447]/[.F447]*100" office:value-type="float" office:value="25.7527842705899" calcext:value-type="float">
            <text:p>25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.2084" calcext:value-type="float">
            <text:p>1.2084</text:p>
          </table:table-cell>
          <table:table-cell office:value-type="float" office:value="72.51" calcext:value-type="float">
            <text:p>72.5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448]-[.F448]" office:value-type="float" office:value="-18.51" calcext:value-type="float">
            <text:p>-18.51</text:p>
          </table:table-cell>
          <table:table-cell table:formula="of:=ABS([.J448])" office:value-type="float" office:value="18.51" calcext:value-type="float">
            <text:p>18.51</text:p>
          </table:table-cell>
          <table:table-cell table:formula="of:=[.K448]/[.F448]*100" office:value-type="float" office:value="25.5275134464212" calcext:value-type="float">
            <text:p>25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.2141" calcext:value-type="float">
            <text:p>1.2141</text:p>
          </table:table-cell>
          <table:table-cell office:value-type="float" office:value="72.84" calcext:value-type="float">
            <text:p>72.84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formula="of:=[.H449]-[.F449]" office:value-type="float" office:value="-9.84" calcext:value-type="float">
            <text:p>-9.84</text:p>
          </table:table-cell>
          <table:table-cell table:formula="of:=ABS([.J449])" office:value-type="float" office:value="9.84" calcext:value-type="float">
            <text:p>9.84</text:p>
          </table:table-cell>
          <table:table-cell table:formula="of:=[.K449]/[.F449]*100" office:value-type="float" office:value="13.509060955519" calcext:value-type="float">
            <text:p>13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.2321" calcext:value-type="float">
            <text:p>1.2321</text:p>
          </table:table-cell>
          <table:table-cell office:value-type="float" office:value="73.92" calcext:value-type="float">
            <text:p>73.92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H450]-[.F450]" office:value-type="float" office:value="-7.92" calcext:value-type="float">
            <text:p>-7.92</text:p>
          </table:table-cell>
          <table:table-cell table:formula="of:=ABS([.J450])" office:value-type="float" office:value="7.92" calcext:value-type="float">
            <text:p>7.92</text:p>
          </table:table-cell>
          <table:table-cell table:formula="of:=[.K450]/[.F450]*100" office:value-type="float" office:value="10.7142857142857" calcext:value-type="float">
            <text:p>1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1.2238" calcext:value-type="float">
            <text:p>1.2238</text:p>
          </table:table-cell>
          <table:table-cell office:value-type="float" office:value="73.43" calcext:value-type="float">
            <text:p>73.43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formula="of:=[.H451]-[.F451]" office:value-type="float" office:value="-4.43000000000001" calcext:value-type="float">
            <text:p>-4.43000000000001</text:p>
          </table:table-cell>
          <table:table-cell table:formula="of:=ABS([.J451])" office:value-type="float" office:value="4.43000000000001" calcext:value-type="float">
            <text:p>4.43000000000001</text:p>
          </table:table-cell>
          <table:table-cell table:formula="of:=[.K451]/[.F451]*100" office:value-type="float" office:value="6.03295655726543" calcext:value-type="float">
            <text:p>6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1.2312" calcext:value-type="float">
            <text:p>1.2312</text:p>
          </table:table-cell>
          <table:table-cell office:value-type="float" office:value="73.87" calcext:value-type="float">
            <text:p>73.87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formula="of:=[.H452]-[.F452]" office:value-type="float" office:value="-7.87" calcext:value-type="float">
            <text:p>-7.87</text:p>
          </table:table-cell>
          <table:table-cell table:formula="of:=ABS([.J452])" office:value-type="float" office:value="7.87" calcext:value-type="float">
            <text:p>7.87</text:p>
          </table:table-cell>
          <table:table-cell table:formula="of:=[.K452]/[.F452]*100" office:value-type="float" office:value="10.6538513604982" calcext:value-type="float">
            <text:p>1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1.2269" calcext:value-type="float">
            <text:p>1.2269</text:p>
          </table:table-cell>
          <table:table-cell office:value-type="float" office:value="73.61" calcext:value-type="float">
            <text:p>73.61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formula="of:=[.H453]-[.F453]" office:value-type="float" office:value="-7.61" calcext:value-type="float">
            <text:p>-7.61</text:p>
          </table:table-cell>
          <table:table-cell table:formula="of:=ABS([.J453])" office:value-type="float" office:value="7.61" calcext:value-type="float">
            <text:p>7.61</text:p>
          </table:table-cell>
          <table:table-cell table:formula="of:=[.K453]/[.F453]*100" office:value-type="float" office:value="10.3382692568944" calcext:value-type="float">
            <text:p>1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.1946" calcext:value-type="float">
            <text:p>1.1946</text:p>
          </table:table-cell>
          <table:table-cell office:value-type="float" office:value="71.67" calcext:value-type="float">
            <text:p>71.67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H454]-[.F454]" office:value-type="float" office:value="-8.67" calcext:value-type="float">
            <text:p>-8.67</text:p>
          </table:table-cell>
          <table:table-cell table:formula="of:=ABS([.J454])" office:value-type="float" office:value="8.67" calcext:value-type="float">
            <text:p>8.67</text:p>
          </table:table-cell>
          <table:table-cell table:formula="of:=[.K454]/[.F454]*100" office:value-type="float" office:value="12.0971117622436" calcext:value-type="float">
            <text:p>12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1.2075" calcext:value-type="float">
            <text:p>1.2075</text:p>
          </table:table-cell>
          <table:table-cell office:value-type="float" office:value="72.45" calcext:value-type="float">
            <text:p>72.4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H455]-[.F455]" office:value-type="float" office:value="-12.45" calcext:value-type="float">
            <text:p>-12.45</text:p>
          </table:table-cell>
          <table:table-cell table:formula="of:=ABS([.J455])" office:value-type="float" office:value="12.45" calcext:value-type="float">
            <text:p>12.45</text:p>
          </table:table-cell>
          <table:table-cell table:formula="of:=[.K455]/[.F455]*100" office:value-type="float" office:value="17.184265010352" calcext:value-type="float">
            <text:p>17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.2422" calcext:value-type="float">
            <text:p>1.2422</text:p>
          </table:table-cell>
          <table:table-cell office:value-type="float" office:value="74.53" calcext:value-type="float">
            <text:p>74.5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[.H456]-[.F456]" office:value-type="float" office:value="-14.53" calcext:value-type="float">
            <text:p>-14.53</text:p>
          </table:table-cell>
          <table:table-cell table:formula="of:=ABS([.J456])" office:value-type="float" office:value="14.53" calcext:value-type="float">
            <text:p>14.53</text:p>
          </table:table-cell>
          <table:table-cell table:formula="of:=[.K456]/[.F456]*100" office:value-type="float" office:value="19.4955051657051" calcext:value-type="float">
            <text:p>19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.2663" calcext:value-type="float">
            <text:p>1.2663</text:p>
          </table:table-cell>
          <table:table-cell office:value-type="float" office:value="75.98" calcext:value-type="float">
            <text:p>75.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457]-[.F457]" office:value-type="float" office:value="-15.98" calcext:value-type="float">
            <text:p>-15.98</text:p>
          </table:table-cell>
          <table:table-cell table:formula="of:=ABS([.J457])" office:value-type="float" office:value="15.98" calcext:value-type="float">
            <text:p>15.98</text:p>
          </table:table-cell>
          <table:table-cell table:formula="of:=[.K457]/[.F457]*100" office:value-type="float" office:value="21.0318504869703" calcext:value-type="float">
            <text:p>2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.2658" calcext:value-type="float">
            <text:p>1.2658</text:p>
          </table:table-cell>
          <table:table-cell office:value-type="float" office:value="75.95" calcext:value-type="float">
            <text:p>75.95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H458]-[.F458]" office:value-type="float" office:value="-12.95" calcext:value-type="float">
            <text:p>-12.95</text:p>
          </table:table-cell>
          <table:table-cell table:formula="of:=ABS([.J458])" office:value-type="float" office:value="12.95" calcext:value-type="float">
            <text:p>12.95</text:p>
          </table:table-cell>
          <table:table-cell table:formula="of:=[.K458]/[.F458]*100" office:value-type="float" office:value="17.0506912442396" calcext:value-type="float">
            <text:p>17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1.2696" calcext:value-type="float">
            <text:p>1.2696</text:p>
          </table:table-cell>
          <table:table-cell office:value-type="float" office:value="76.18" calcext:value-type="float">
            <text:p>76.18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formula="of:=[.H459]-[.F459]" office:value-type="float" office:value="-4.18000000000001" calcext:value-type="float">
            <text:p>-4.18000000000001</text:p>
          </table:table-cell>
          <table:table-cell table:formula="of:=ABS([.J459])" office:value-type="float" office:value="4.18000000000001" calcext:value-type="float">
            <text:p>4.18000000000001</text:p>
          </table:table-cell>
          <table:table-cell table:formula="of:=[.K459]/[.F459]*100" office:value-type="float" office:value="5.48700446311369" calcext:value-type="float">
            <text:p>5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1.2539" calcext:value-type="float">
            <text:p>1.2539</text:p>
          </table:table-cell>
          <table:table-cell office:value-type="float" office:value="75.23" calcext:value-type="float">
            <text:p>75.2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460]-[.F460]" office:value-type="float" office:value="-0.230000000000004" calcext:value-type="float">
            <text:p>-0.230000000000004</text:p>
          </table:table-cell>
          <table:table-cell table:formula="of:=ABS([.J460])" office:value-type="float" office:value="0.230000000000004" calcext:value-type="float">
            <text:p>0.230000000000004</text:p>
          </table:table-cell>
          <table:table-cell table:formula="of:=[.K460]/[.F460]*100" office:value-type="float" office:value="0.305729097434539" calcext:value-type="float">
            <text:p>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1.271" calcext:value-type="float">
            <text:p>1.271</text:p>
          </table:table-cell>
          <table:table-cell office:value-type="float" office:value="76.26" calcext:value-type="float">
            <text:p>76.26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[.H461]-[.F461]" office:value-type="float" office:value="-1.26000000000001" calcext:value-type="float">
            <text:p>-1.26000000000001</text:p>
          </table:table-cell>
          <table:table-cell table:formula="of:=ABS([.J461])" office:value-type="float" office:value="1.26000000000001" calcext:value-type="float">
            <text:p>1.26000000000001</text:p>
          </table:table-cell>
          <table:table-cell table:formula="of:=[.K461]/[.F461]*100" office:value-type="float" office:value="1.65224232887491" calcext:value-type="float">
            <text:p>1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office:value-type="float" office:value="1.3178" calcext:value-type="float">
            <text:p>1.3178</text:p>
          </table:table-cell>
          <table:table-cell office:value-type="float" office:value="79.07" calcext:value-type="float">
            <text:p>79.07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462]-[.F462]" office:value-type="float" office:value="-4.06999999999999" calcext:value-type="float">
            <text:p>-4.06999999999999</text:p>
          </table:table-cell>
          <table:table-cell table:formula="of:=ABS([.J462])" office:value-type="float" office:value="4.06999999999999" calcext:value-type="float">
            <text:p>4.06999999999999</text:p>
          </table:table-cell>
          <table:table-cell table:formula="of:=[.K462]/[.F462]*100" office:value-type="float" office:value="5.14733780194763" calcext:value-type="float">
            <text:p>5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1.3317" calcext:value-type="float">
            <text:p>1.3317</text:p>
          </table:table-cell>
          <table:table-cell office:value-type="float" office:value="79.9" calcext:value-type="float">
            <text:p>79.9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463]-[.F463]" office:value-type="float" office:value="-1.90000000000001" calcext:value-type="float">
            <text:p>-1.90000000000001</text:p>
          </table:table-cell>
          <table:table-cell table:formula="of:=ABS([.J463])" office:value-type="float" office:value="1.90000000000001" calcext:value-type="float">
            <text:p>1.90000000000001</text:p>
          </table:table-cell>
          <table:table-cell table:formula="of:=[.K463]/[.F463]*100" office:value-type="float" office:value="2.37797246558198" calcext:value-type="float">
            <text:p>2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1.3324" calcext:value-type="float">
            <text:p>1.3324</text:p>
          </table:table-cell>
          <table:table-cell office:value-type="float" office:value="79.94" calcext:value-type="float">
            <text:p>79.94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464]-[.F464]" office:value-type="float" office:value="1.06" calcext:value-type="float">
            <text:p>1.06</text:p>
          </table:table-cell>
          <table:table-cell table:formula="of:=ABS([.J464])" office:value-type="float" office:value="1.06" calcext:value-type="float">
            <text:p>1.06</text:p>
          </table:table-cell>
          <table:table-cell table:formula="of:=[.K464]/[.F464]*100" office:value-type="float" office:value="1.32599449587191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1.3126" calcext:value-type="float">
            <text:p>1.3126</text:p>
          </table:table-cell>
          <table:table-cell office:value-type="float" office:value="78.76" calcext:value-type="float">
            <text:p>78.7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02" calcext:value-type="float">
            <text:p>102</text:p>
          </table:table-cell>
          <table:table-cell table:formula="of:=[.H465]-[.F465]" office:value-type="float" office:value="23.24" calcext:value-type="float">
            <text:p>23.24</text:p>
          </table:table-cell>
          <table:table-cell table:formula="of:=ABS([.J465])" office:value-type="float" office:value="23.24" calcext:value-type="float">
            <text:p>23.24</text:p>
          </table:table-cell>
          <table:table-cell table:formula="of:=[.K465]/[.F465]*100" office:value-type="float" office:value="29.5073641442356" calcext:value-type="float">
            <text:p>29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1.2765" calcext:value-type="float">
            <text:p>1.2765</text:p>
          </table:table-cell>
          <table:table-cell office:value-type="float" office:value="76.59" calcext:value-type="float">
            <text:p>76.5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02" calcext:value-type="float">
            <text:p>102</text:p>
          </table:table-cell>
          <table:table-cell table:formula="of:=[.H466]-[.F466]" office:value-type="float" office:value="25.41" calcext:value-type="float">
            <text:p>25.41</text:p>
          </table:table-cell>
          <table:table-cell table:formula="of:=ABS([.J466])" office:value-type="float" office:value="25.41" calcext:value-type="float">
            <text:p>25.41</text:p>
          </table:table-cell>
          <table:table-cell table:formula="of:=[.K466]/[.F466]*100" office:value-type="float" office:value="33.1766549157853" calcext:value-type="float">
            <text:p>33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57" calcext:value-type="float">
            <text:p>57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1.2622" calcext:value-type="float">
            <text:p>1.2622</text:p>
          </table:table-cell>
          <table:table-cell office:value-type="float" office:value="75.73" calcext:value-type="float">
            <text:p>75.73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02" calcext:value-type="float">
            <text:p>102</text:p>
          </table:table-cell>
          <table:table-cell table:formula="of:=[.H467]-[.F467]" office:value-type="float" office:value="26.27" calcext:value-type="float">
            <text:p>26.27</text:p>
          </table:table-cell>
          <table:table-cell table:formula="of:=ABS([.J467])" office:value-type="float" office:value="26.27" calcext:value-type="float">
            <text:p>26.27</text:p>
          </table:table-cell>
          <table:table-cell table:formula="of:=[.K467]/[.F467]*100" office:value-type="float" office:value="34.6890268057573" calcext:value-type="float">
            <text:p>34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58" calcext:value-type="float">
            <text:p>58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1.2627" calcext:value-type="float">
            <text:p>1.2627</text:p>
          </table:table-cell>
          <table:table-cell office:value-type="float" office:value="75.76" calcext:value-type="float">
            <text:p>75.76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formula="of:=[.H468]-[.F468]" office:value-type="float" office:value="14.24" calcext:value-type="float">
            <text:p>14.24</text:p>
          </table:table-cell>
          <table:table-cell table:formula="of:=ABS([.J468])" office:value-type="float" office:value="14.24" calcext:value-type="float">
            <text:p>14.24</text:p>
          </table:table-cell>
          <table:table-cell table:formula="of:=[.K468]/[.F468]*100" office:value-type="float" office:value="18.7961985216473" calcext:value-type="float">
            <text:p>18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59" calcext:value-type="float">
            <text:p>59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1.2974" calcext:value-type="float">
            <text:p>1.2974</text:p>
          </table:table-cell>
          <table:table-cell office:value-type="float" office:value="77.85" calcext:value-type="float">
            <text:p>77.85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formula="of:=[.H469]-[.F469]" office:value-type="float" office:value="12.15" calcext:value-type="float">
            <text:p>12.15</text:p>
          </table:table-cell>
          <table:table-cell table:formula="of:=ABS([.J469])" office:value-type="float" office:value="12.15" calcext:value-type="float">
            <text:p>12.15</text:p>
          </table:table-cell>
          <table:table-cell table:formula="of:=[.K469]/[.F469]*100" office:value-type="float" office:value="15.606936416185" calcext:value-type="float">
            <text:p>15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.3776" calcext:value-type="float">
            <text:p>1.3776</text:p>
          </table:table-cell>
          <table:table-cell office:value-type="float" office:value="82.66" calcext:value-type="float">
            <text:p>82.66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[.H470]-[.F470]" office:value-type="float" office:value="1.34" calcext:value-type="float">
            <text:p>1.34</text:p>
          </table:table-cell>
          <table:table-cell table:formula="of:=ABS([.J470])" office:value-type="float" office:value="1.34" calcext:value-type="float">
            <text:p>1.34</text:p>
          </table:table-cell>
          <table:table-cell table:formula="of:=[.K470]/[.F470]*100" office:value-type="float" office:value="1.62109847568353" calcext:value-type="float">
            <text:p>1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1.4449" calcext:value-type="float">
            <text:p>1.4449</text:p>
          </table:table-cell>
          <table:table-cell office:value-type="float" office:value="86.7" calcext:value-type="float">
            <text:p>86.7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[.H471]-[.F471]" office:value-type="float" office:value="-2.7" calcext:value-type="float">
            <text:p>-2.7</text:p>
          </table:table-cell>
          <table:table-cell table:formula="of:=ABS([.J471])" office:value-type="float" office:value="2.7" calcext:value-type="float">
            <text:p>2.7</text:p>
          </table:table-cell>
          <table:table-cell table:formula="of:=[.K471]/[.F471]*100" office:value-type="float" office:value="3.11418685121108" calcext:value-type="float">
            <text:p>3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62" calcext:value-type="float">
            <text:p>62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1.4561" calcext:value-type="float">
            <text:p>1.4561</text:p>
          </table:table-cell>
          <table:table-cell office:value-type="float" office:value="87.37" calcext:value-type="float">
            <text:p>87.37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formula="of:=[.H472]-[.F472]" office:value-type="float" office:value="2.63" calcext:value-type="float">
            <text:p>2.63</text:p>
          </table:table-cell>
          <table:table-cell table:formula="of:=ABS([.J472])" office:value-type="float" office:value="2.63" calcext:value-type="float">
            <text:p>2.63</text:p>
          </table:table-cell>
          <table:table-cell table:formula="of:=[.K472]/[.F472]*100" office:value-type="float" office:value="3.01018656289344" calcext:value-type="float">
            <text:p>3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.4303" calcext:value-type="float">
            <text:p>1.4303</text:p>
          </table:table-cell>
          <table:table-cell office:value-type="float" office:value="85.82" calcext:value-type="float">
            <text:p>85.82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[.H473]-[.F473]" office:value-type="float" office:value="-10.82" calcext:value-type="float">
            <text:p>-10.82</text:p>
          </table:table-cell>
          <table:table-cell table:formula="of:=ABS([.J473])" office:value-type="float" office:value="10.82" calcext:value-type="float">
            <text:p>10.82</text:p>
          </table:table-cell>
          <table:table-cell table:formula="of:=[.K473]/[.F473]*100" office:value-type="float" office:value="12.6077837333955" calcext:value-type="float">
            <text:p>12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.3698" calcext:value-type="float">
            <text:p>1.3698</text:p>
          </table:table-cell>
          <table:table-cell office:value-type="float" office:value="82.19" calcext:value-type="float">
            <text:p>82.19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table:formula="of:=[.H474]-[.F474]" office:value-type="float" office:value="-19.19" calcext:value-type="float">
            <text:p>-19.19</text:p>
          </table:table-cell>
          <table:table-cell table:formula="of:=ABS([.J474])" office:value-type="float" office:value="19.19" calcext:value-type="float">
            <text:p>19.19</text:p>
          </table:table-cell>
          <table:table-cell table:formula="of:=[.K474]/[.F474]*100" office:value-type="float" office:value="23.3483392140163" calcext:value-type="float">
            <text:p>2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.3124" calcext:value-type="float">
            <text:p>1.3124</text:p>
          </table:table-cell>
          <table:table-cell office:value-type="float" office:value="78.74" calcext:value-type="float">
            <text:p>78.7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formula="of:=[.H475]-[.F475]" office:value-type="float" office:value="-18.74" calcext:value-type="float">
            <text:p>-18.74</text:p>
          </table:table-cell>
          <table:table-cell table:formula="of:=ABS([.J475])" office:value-type="float" office:value="18.74" calcext:value-type="float">
            <text:p>18.74</text:p>
          </table:table-cell>
          <table:table-cell table:formula="of:=[.K475]/[.F475]*100" office:value-type="float" office:value="23.7998475996952" calcext:value-type="float">
            <text:p>23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66" calcext:value-type="float">
            <text:p>66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1.315" calcext:value-type="float">
            <text:p>1.315</text:p>
          </table:table-cell>
          <table:table-cell office:value-type="float" office:value="78.9" calcext:value-type="float">
            <text:p>78.9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formula="of:=[.H476]-[.F476]" office:value-type="float" office:value="-6.90000000000001" calcext:value-type="float">
            <text:p>-6.90000000000001</text:p>
          </table:table-cell>
          <table:table-cell table:formula="of:=ABS([.J476])" office:value-type="float" office:value="6.90000000000001" calcext:value-type="float">
            <text:p>6.90000000000001</text:p>
          </table:table-cell>
          <table:table-cell table:formula="of:=[.K476]/[.F476]*100" office:value-type="float" office:value="8.74524714828898" calcext:value-type="float">
            <text:p>8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1.3183" calcext:value-type="float">
            <text:p>1.3183</text:p>
          </table:table-cell>
          <table:table-cell office:value-type="float" office:value="79.1" calcext:value-type="float">
            <text:p>79.1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formula="of:=[.H477]-[.F477]" office:value-type="float" office:value="-7.09999999999999" calcext:value-type="float">
            <text:p>-7.09999999999999</text:p>
          </table:table-cell>
          <table:table-cell table:formula="of:=ABS([.J477])" office:value-type="float" office:value="7.09999999999999" calcext:value-type="float">
            <text:p>7.09999999999999</text:p>
          </table:table-cell>
          <table:table-cell table:formula="of:=[.K477]/[.F477]*100" office:value-type="float" office:value="8.97597977243994" calcext:value-type="float">
            <text:p>9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68" calcext:value-type="float">
            <text:p>68</text:p>
          </table:table-cell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office:value-type="float" office:value="1.3413" calcext:value-type="float">
            <text:p>1.3413</text:p>
          </table:table-cell>
          <table:table-cell office:value-type="float" office:value="80.48" calcext:value-type="float">
            <text:p>80.4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H478]-[.F478]" office:value-type="float" office:value="-20.48" calcext:value-type="float">
            <text:p>-20.48</text:p>
          </table:table-cell>
          <table:table-cell table:formula="of:=ABS([.J478])" office:value-type="float" office:value="20.48" calcext:value-type="float">
            <text:p>20.48</text:p>
          </table:table-cell>
          <table:table-cell table:formula="of:=[.K478]/[.F478]*100" office:value-type="float" office:value="25.4473161033797" calcext:value-type="float">
            <text:p>25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1.3268" calcext:value-type="float">
            <text:p>1.3268</text:p>
          </table:table-cell>
          <table:table-cell office:value-type="float" office:value="79.61" calcext:value-type="float">
            <text:p>79.61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[.H479]-[.F479]" office:value-type="float" office:value="-7.61" calcext:value-type="float">
            <text:p>-7.61</text:p>
          </table:table-cell>
          <table:table-cell table:formula="of:=ABS([.J479])" office:value-type="float" office:value="7.61" calcext:value-type="float">
            <text:p>7.61</text:p>
          </table:table-cell>
          <table:table-cell table:formula="of:=[.K479]/[.F479]*100" office:value-type="float" office:value="9.55910061550056" calcext:value-type="float">
            <text:p>9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1.3227" calcext:value-type="float">
            <text:p>1.3227</text:p>
          </table:table-cell>
          <table:table-cell office:value-type="float" office:value="79.36" calcext:value-type="float">
            <text:p>79.36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formula="of:=[.H480]-[.F480]" office:value-type="float" office:value="-4.36" calcext:value-type="float">
            <text:p>-4.36</text:p>
          </table:table-cell>
          <table:table-cell table:formula="of:=ABS([.J480])" office:value-type="float" office:value="4.36" calcext:value-type="float">
            <text:p>4.36</text:p>
          </table:table-cell>
          <table:table-cell table:formula="of:=[.K480]/[.F480]*100" office:value-type="float" office:value="5.49395161290323" calcext:value-type="float">
            <text:p>5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1.2976" calcext:value-type="float">
            <text:p>1.2976</text:p>
          </table:table-cell>
          <table:table-cell office:value-type="float" office:value="77.85" calcext:value-type="float">
            <text:p>77.85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formula="of:=[.H481]-[.F481]" office:value-type="float" office:value="6.15000000000001" calcext:value-type="float">
            <text:p>6.15000000000001</text:p>
          </table:table-cell>
          <table:table-cell table:formula="of:=ABS([.J481])" office:value-type="float" office:value="6.15000000000001" calcext:value-type="float">
            <text:p>6.15000000000001</text:p>
          </table:table-cell>
          <table:table-cell table:formula="of:=[.K481]/[.F481]*100" office:value-type="float" office:value="7.89980732177265" calcext:value-type="float">
            <text:p>7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1.2508" calcext:value-type="float">
            <text:p>1.2508</text:p>
          </table:table-cell>
          <table:table-cell office:value-type="float" office:value="75.05" calcext:value-type="float">
            <text:p>75.05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formula="of:=[.H482]-[.F482]" office:value-type="float" office:value="8.95" calcext:value-type="float">
            <text:p>8.95</text:p>
          </table:table-cell>
          <table:table-cell table:formula="of:=ABS([.J482])" office:value-type="float" office:value="8.95" calcext:value-type="float">
            <text:p>8.95</text:p>
          </table:table-cell>
          <table:table-cell table:formula="of:=[.K482]/[.F482]*100" office:value-type="float" office:value="11.925383077948" calcext:value-type="float">
            <text:p>11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1.2481" calcext:value-type="float">
            <text:p>1.2481</text:p>
          </table:table-cell>
          <table:table-cell office:value-type="float" office:value="74.88" calcext:value-type="float">
            <text:p>74.8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483]-[.F483]" office:value-type="float" office:value="9.12000000000001" calcext:value-type="float">
            <text:p>9.12000000000001</text:p>
          </table:table-cell>
          <table:table-cell table:formula="of:=ABS([.J483])" office:value-type="float" office:value="9.12000000000001" calcext:value-type="float">
            <text:p>9.12000000000001</text:p>
          </table:table-cell>
          <table:table-cell table:formula="of:=[.K483]/[.F483]*100" office:value-type="float" office:value="12.1794871794872" calcext:value-type="float">
            <text:p>12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1.262" calcext:value-type="float">
            <text:p>1.262</text:p>
          </table:table-cell>
          <table:table-cell office:value-type="float" office:value="75.72" calcext:value-type="float">
            <text:p>75.72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H484]-[.F484]" office:value-type="float" office:value="8.28" calcext:value-type="float">
            <text:p>8.28</text:p>
          </table:table-cell>
          <table:table-cell table:formula="of:=ABS([.J484])" office:value-type="float" office:value="8.28" calcext:value-type="float">
            <text:p>8.28</text:p>
          </table:table-cell>
          <table:table-cell table:formula="of:=[.K484]/[.F484]*100" office:value-type="float" office:value="10.9350237717908" calcext:value-type="float">
            <text:p>10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.3141" calcext:value-type="float">
            <text:p>1.3141</text:p>
          </table:table-cell>
          <table:table-cell office:value-type="float" office:value="78.85" calcext:value-type="float">
            <text:p>78.85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H485]-[.F485]" office:value-type="float" office:value="5.15000000000001" calcext:value-type="float">
            <text:p>5.15000000000001</text:p>
          </table:table-cell>
          <table:table-cell table:formula="of:=ABS([.J485])" office:value-type="float" office:value="5.15000000000001" calcext:value-type="float">
            <text:p>5.15000000000001</text:p>
          </table:table-cell>
          <table:table-cell table:formula="of:=[.K485]/[.F485]*100" office:value-type="float" office:value="6.53138871274573" calcext:value-type="float">
            <text:p>6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76" calcext:value-type="float">
            <text:p>76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1.3476" calcext:value-type="float">
            <text:p>1.3476</text:p>
          </table:table-cell>
          <table:table-cell office:value-type="float" office:value="80.85" calcext:value-type="float">
            <text:p>80.85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formula="of:=[.H486]-[.F486]" office:value-type="float" office:value="0.150000000000006" calcext:value-type="float">
            <text:p>0.150000000000006</text:p>
          </table:table-cell>
          <table:table-cell table:formula="of:=ABS([.J486])" office:value-type="float" office:value="0.150000000000006" calcext:value-type="float">
            <text:p>0.150000000000006</text:p>
          </table:table-cell>
          <table:table-cell table:formula="of:=[.K486]/[.F486]*100" office:value-type="float" office:value="0.185528756957335" calcext:value-type="float">
            <text:p>0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77" calcext:value-type="float">
            <text:p>7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1.3861" calcext:value-type="float">
            <text:p>1.3861</text:p>
          </table:table-cell>
          <table:table-cell office:value-type="float" office:value="83.17" calcext:value-type="float">
            <text:p>83.17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formula="of:=[.H487]-[.F487]" office:value-type="float" office:value="-2.17" calcext:value-type="float">
            <text:p>-2.17</text:p>
          </table:table-cell>
          <table:table-cell table:formula="of:=ABS([.J487])" office:value-type="float" office:value="2.17" calcext:value-type="float">
            <text:p>2.17</text:p>
          </table:table-cell>
          <table:table-cell table:formula="of:=[.K487]/[.F487]*100" office:value-type="float" office:value="2.60911386317182" calcext:value-type="float">
            <text:p>2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1.4207" calcext:value-type="float">
            <text:p>1.4207</text:p>
          </table:table-cell>
          <table:table-cell office:value-type="float" office:value="85.24" calcext:value-type="float">
            <text:p>85.2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488]-[.F488]" office:value-type="float" office:value="-31.24" calcext:value-type="float">
            <text:p>-31.24</text:p>
          </table:table-cell>
          <table:table-cell table:formula="of:=ABS([.J488])" office:value-type="float" office:value="31.24" calcext:value-type="float">
            <text:p>31.24</text:p>
          </table:table-cell>
          <table:table-cell table:formula="of:=[.K488]/[.F488]*100" office:value-type="float" office:value="36.6494603472548" calcext:value-type="float">
            <text:p>36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79" calcext:value-type="float">
            <text:p>79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1.4154" calcext:value-type="float">
            <text:p>1.4154</text:p>
          </table:table-cell>
          <table:table-cell office:value-type="float" office:value="84.92" calcext:value-type="float">
            <text:p>84.9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489]-[.F489]" office:value-type="float" office:value="-30.92" calcext:value-type="float">
            <text:p>-30.92</text:p>
          </table:table-cell>
          <table:table-cell table:formula="of:=ABS([.J489])" office:value-type="float" office:value="30.92" calcext:value-type="float">
            <text:p>30.92</text:p>
          </table:table-cell>
          <table:table-cell table:formula="of:=[.K489]/[.F489]*100" office:value-type="float" office:value="36.4107395195478" calcext:value-type="float">
            <text:p>36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415" calcext:value-type="float">
            <text:p>415</text:p>
          </table:table-cell>
          <table:table-cell office:value-type="float" office:value="1.3918" calcext:value-type="float">
            <text:p>1.3918</text:p>
          </table:table-cell>
          <table:table-cell office:value-type="float" office:value="83.51" calcext:value-type="float">
            <text:p>83.5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490]-[.F490]" office:value-type="float" office:value="-29.51" calcext:value-type="float">
            <text:p>-29.51</text:p>
          </table:table-cell>
          <table:table-cell table:formula="of:=ABS([.J490])" office:value-type="float" office:value="29.51" calcext:value-type="float">
            <text:p>29.51</text:p>
          </table:table-cell>
          <table:table-cell table:formula="of:=[.K490]/[.F490]*100" office:value-type="float" office:value="35.3370853789965" calcext:value-type="float">
            <text:p>35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1.3639" calcext:value-type="float">
            <text:p>1.3639</text:p>
          </table:table-cell>
          <table:table-cell office:value-type="float" office:value="81.84" calcext:value-type="float">
            <text:p>81.8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491]-[.F491]" office:value-type="float" office:value="-15.84" calcext:value-type="float">
            <text:p>-15.84</text:p>
          </table:table-cell>
          <table:table-cell table:formula="of:=ABS([.J491])" office:value-type="float" office:value="15.84" calcext:value-type="float">
            <text:p>15.84</text:p>
          </table:table-cell>
          <table:table-cell table:formula="of:=[.K491]/[.F491]*100" office:value-type="float" office:value="19.3548387096774" calcext:value-type="float">
            <text:p>19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82" calcext:value-type="float">
            <text:p>82</text:p>
          </table:table-cell>
          <table:table-cell office:value-type="float" office:value="405" calcext:value-type="float">
            <text:p>405</text:p>
          </table:table-cell>
          <table:table-cell office:value-type="float" office:value="425" calcext:value-type="float">
            <text:p>425</text:p>
          </table:table-cell>
          <table:table-cell office:value-type="float" office:value="1.3147" calcext:value-type="float">
            <text:p>1.3147</text:p>
          </table:table-cell>
          <table:table-cell office:value-type="float" office:value="78.88" calcext:value-type="float">
            <text:p>78.88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formula="of:=[.H492]-[.F492]" office:value-type="float" office:value="-12.88" calcext:value-type="float">
            <text:p>-12.88</text:p>
          </table:table-cell>
          <table:table-cell table:formula="of:=ABS([.J492])" office:value-type="float" office:value="12.88" calcext:value-type="float">
            <text:p>12.88</text:p>
          </table:table-cell>
          <table:table-cell table:formula="of:=[.K492]/[.F492]*100" office:value-type="float" office:value="16.3286004056795" calcext:value-type="float">
            <text:p>16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83" calcext:value-type="float">
            <text:p>83</text:p>
          </table:table-cell>
          <table:table-cell office:value-type="float" office:value="410" calcext:value-type="float">
            <text:p>410</text:p>
          </table:table-cell>
          <table:table-cell office:value-type="float" office:value="430" calcext:value-type="float">
            <text:p>430</text:p>
          </table:table-cell>
          <table:table-cell office:value-type="float" office:value="1.3109" calcext:value-type="float">
            <text:p>1.3109</text:p>
          </table:table-cell>
          <table:table-cell office:value-type="float" office:value="78.65" calcext:value-type="float">
            <text:p>78.6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493]-[.F493]" office:value-type="float" office:value="-3.65000000000001" calcext:value-type="float">
            <text:p>-3.65000000000001</text:p>
          </table:table-cell>
          <table:table-cell table:formula="of:=ABS([.J493])" office:value-type="float" office:value="3.65000000000001" calcext:value-type="float">
            <text:p>3.65000000000001</text:p>
          </table:table-cell>
          <table:table-cell table:formula="of:=[.K493]/[.F493]*100" office:value-type="float" office:value="4.64081373172283" calcext:value-type="float">
            <text:p>4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84" calcext:value-type="float">
            <text:p>84</text:p>
          </table:table-cell>
          <table:table-cell office:value-type="float" office:value="415" calcext:value-type="float">
            <text:p>415</text:p>
          </table:table-cell>
          <table:table-cell office:value-type="float" office:value="435" calcext:value-type="float">
            <text:p>435</text:p>
          </table:table-cell>
          <table:table-cell office:value-type="float" office:value="1.3253" calcext:value-type="float">
            <text:p>1.3253</text:p>
          </table:table-cell>
          <table:table-cell office:value-type="float" office:value="79.52" calcext:value-type="float">
            <text:p>79.52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[.H494]-[.F494]" office:value-type="float" office:value="-4.52" calcext:value-type="float">
            <text:p>-4.52</text:p>
          </table:table-cell>
          <table:table-cell table:formula="of:=ABS([.J494])" office:value-type="float" office:value="4.52" calcext:value-type="float">
            <text:p>4.52</text:p>
          </table:table-cell>
          <table:table-cell table:formula="of:=[.K494]/[.F494]*100" office:value-type="float" office:value="5.6841046277666" calcext:value-type="float">
            <text:p>5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85" calcext:value-type="float">
            <text:p>85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1.3418" calcext:value-type="float">
            <text:p>1.3418</text:p>
          </table:table-cell>
          <table:table-cell office:value-type="float" office:value="80.51" calcext:value-type="float">
            <text:p>80.51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table:formula="of:=[.H495]-[.F495]" office:value-type="float" office:value="-5.51000000000001" calcext:value-type="float">
            <text:p>-5.51000000000001</text:p>
          </table:table-cell>
          <table:table-cell table:formula="of:=ABS([.J495])" office:value-type="float" office:value="5.51000000000001" calcext:value-type="float">
            <text:p>5.51000000000001</text:p>
          </table:table-cell>
          <table:table-cell table:formula="of:=[.K495]/[.F495]*100" office:value-type="float" office:value="6.8438703266675" calcext:value-type="float">
            <text:p>6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86" calcext:value-type="float">
            <text:p>86</text:p>
          </table:table-cell>
          <table:table-cell office:value-type="float" office:value="425" calcext:value-type="float">
            <text:p>425</text:p>
          </table:table-cell>
          <table:table-cell office:value-type="float" office:value="445" calcext:value-type="float">
            <text:p>445</text:p>
          </table:table-cell>
          <table:table-cell office:value-type="float" office:value="1.3736" calcext:value-type="float">
            <text:p>1.3736</text:p>
          </table:table-cell>
          <table:table-cell office:value-type="float" office:value="82.41" calcext:value-type="float">
            <text:p>82.4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496]-[.F496]" office:value-type="float" office:value="-16.41" calcext:value-type="float">
            <text:p>-16.41</text:p>
          </table:table-cell>
          <table:table-cell table:formula="of:=ABS([.J496])" office:value-type="float" office:value="16.41" calcext:value-type="float">
            <text:p>16.41</text:p>
          </table:table-cell>
          <table:table-cell table:formula="of:=[.K496]/[.F496]*100" office:value-type="float" office:value="19.9126319621405" calcext:value-type="float">
            <text:p>19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6</text:p>
          </table:table-cell>
          <table:table-cell office:value-type="float" office:value="87" calcext:value-type="float">
            <text:p>87</text:p>
          </table:table-cell>
          <table:table-cell office:value-type="float" office:value="430" calcext:value-type="float">
            <text:p>430</text:p>
          </table:table-cell>
          <table:table-cell office:value-type="float" office:value="450" calcext:value-type="float">
            <text:p>450</text:p>
          </table:table-cell>
          <table:table-cell office:value-type="float" office:value="1.3855" calcext:value-type="float">
            <text:p>1.3855</text:p>
          </table:table-cell>
          <table:table-cell office:value-type="float" office:value="83.13" calcext:value-type="float">
            <text:p>83.13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formula="of:=[.H497]-[.F497]" office:value-type="float" office:value="-17.13" calcext:value-type="float">
            <text:p>-17.13</text:p>
          </table:table-cell>
          <table:table-cell table:formula="of:=ABS([.J497])" office:value-type="float" office:value="17.13" calcext:value-type="float">
            <text:p>17.13</text:p>
          </table:table-cell>
          <table:table-cell table:formula="of:=[.K497]/[.F497]*100" office:value-type="float" office:value="20.6062793215446" calcext:value-type="float">
            <text:p>20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079" calcext:value-type="float">
            <text:p>1.079</text:p>
          </table:table-cell>
          <table:table-cell office:value-type="float" office:value="64.74" calcext:value-type="float">
            <text:p>64.7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498]-[.F498]" office:value-type="float" office:value="1.26000000000001" calcext:value-type="float">
            <text:p>1.26000000000001</text:p>
          </table:table-cell>
          <table:table-cell table:formula="of:=ABS([.J498])" office:value-type="float" office:value="1.26000000000001" calcext:value-type="float">
            <text:p>1.26000000000001</text:p>
          </table:table-cell>
          <table:table-cell table:formula="of:=[.K498]/[.F498]*100" office:value-type="float" office:value="1.94624652455979" calcext:value-type="float">
            <text:p>1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0888" calcext:value-type="float">
            <text:p>1.0888</text:p>
          </table:table-cell>
          <table:table-cell office:value-type="float" office:value="65.33" calcext:value-type="float">
            <text:p>65.33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499]-[.F499]" office:value-type="float" office:value="0.670000000000002" calcext:value-type="float">
            <text:p>0.670000000000002</text:p>
          </table:table-cell>
          <table:table-cell table:formula="of:=ABS([.J499])" office:value-type="float" office:value="0.670000000000002" calcext:value-type="float">
            <text:p>0.670000000000002</text:p>
          </table:table-cell>
          <table:table-cell table:formula="of:=[.K499]/[.F499]*100" office:value-type="float" office:value="1.02556252870045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1012" calcext:value-type="float">
            <text:p>1.1012</text:p>
          </table:table-cell>
          <table:table-cell office:value-type="float" office:value="66.07" calcext:value-type="float">
            <text:p>66.07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formula="of:=[.H500]-[.F500]" office:value-type="float" office:value="-0.0699999999999932" calcext:value-type="float">
            <text:p>-0.0699999999999932</text:p>
          </table:table-cell>
          <table:table-cell table:formula="of:=ABS([.J500])" office:value-type="float" office:value="0.0699999999999932" calcext:value-type="float">
            <text:p>0.0699999999999932</text:p>
          </table:table-cell>
          <table:table-cell table:formula="of:=[.K500]/[.F500]*100" office:value-type="float" office:value="0.105948236718621" calcext:value-type="float">
            <text:p>0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1089" calcext:value-type="float">
            <text:p>1.1089</text:p>
          </table:table-cell>
          <table:table-cell office:value-type="float" office:value="66.54" calcext:value-type="float">
            <text:p>66.54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[.H501]-[.F501]" office:value-type="float" office:value="-0.540000000000006" calcext:value-type="float">
            <text:p>-0.540000000000006</text:p>
          </table:table-cell>
          <table:table-cell table:formula="of:=ABS([.J501])" office:value-type="float" office:value="0.540000000000006" calcext:value-type="float">
            <text:p>0.540000000000006</text:p>
          </table:table-cell>
          <table:table-cell table:formula="of:=[.K501]/[.F501]*100" office:value-type="float" office:value="0.811541929666376" calcext:value-type="float">
            <text:p>0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.0933" calcext:value-type="float">
            <text:p>1.0933</text:p>
          </table:table-cell>
          <table:table-cell office:value-type="float" office:value="65.6" calcext:value-type="float">
            <text:p>65.6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H502]-[.F502]" office:value-type="float" office:value="0.400000000000006" calcext:value-type="float">
            <text:p>0.400000000000006</text:p>
          </table:table-cell>
          <table:table-cell table:formula="of:=ABS([.J502])" office:value-type="float" office:value="0.400000000000006" calcext:value-type="float">
            <text:p>0.400000000000006</text:p>
          </table:table-cell>
          <table:table-cell table:formula="of:=[.K502]/[.F502]*100" office:value-type="float" office:value="0.609756097560984" calcext:value-type="float">
            <text:p>0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0915" calcext:value-type="float">
            <text:p>1.0915</text:p>
          </table:table-cell>
          <table:table-cell office:value-type="float" office:value="65.49" calcext:value-type="float">
            <text:p>65.4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03]-[.F503]" office:value-type="float" office:value="0.510000000000005" calcext:value-type="float">
            <text:p>0.510000000000005</text:p>
          </table:table-cell>
          <table:table-cell table:formula="of:=ABS([.J503])" office:value-type="float" office:value="0.510000000000005" calcext:value-type="float">
            <text:p>0.510000000000005</text:p>
          </table:table-cell>
          <table:table-cell table:formula="of:=[.K503]/[.F503]*100" office:value-type="float" office:value="0.778744846541465" calcext:value-type="float">
            <text:p>0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0958" calcext:value-type="float">
            <text:p>1.0958</text:p>
          </table:table-cell>
          <table:table-cell office:value-type="float" office:value="65.75" calcext:value-type="float">
            <text:p>65.75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04]-[.F504]" office:value-type="float" office:value="0.25" calcext:value-type="float">
            <text:p>0.25</text:p>
          </table:table-cell>
          <table:table-cell table:formula="of:=ABS([.J504])" office:value-type="float" office:value="0.25" calcext:value-type="float">
            <text:p>0.25</text:p>
          </table:table-cell>
          <table:table-cell table:formula="of:=[.K504]/[.F504]*100" office:value-type="float" office:value="0.380228136882129" calcext:value-type="float">
            <text:p>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.1132" calcext:value-type="float">
            <text:p>1.1132</text:p>
          </table:table-cell>
          <table:table-cell office:value-type="float" office:value="66.79" calcext:value-type="float">
            <text:p>66.7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05]-[.F505]" office:value-type="float" office:value="-0.790000000000006" calcext:value-type="float">
            <text:p>-0.790000000000006</text:p>
          </table:table-cell>
          <table:table-cell table:formula="of:=ABS([.J505])" office:value-type="float" office:value="0.790000000000006" calcext:value-type="float">
            <text:p>0.790000000000006</text:p>
          </table:table-cell>
          <table:table-cell table:formula="of:=[.K505]/[.F505]*100" office:value-type="float" office:value="1.18281179817339" calcext:value-type="float">
            <text:p>1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.1259" calcext:value-type="float">
            <text:p>1.1259</text:p>
          </table:table-cell>
          <table:table-cell office:value-type="float" office:value="67.56" calcext:value-type="float">
            <text:p>67.56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H506]-[.F506]" office:value-type="float" office:value="-1.56" calcext:value-type="float">
            <text:p>-1.56</text:p>
          </table:table-cell>
          <table:table-cell table:formula="of:=ABS([.J506])" office:value-type="float" office:value="1.56" calcext:value-type="float">
            <text:p>1.56</text:p>
          </table:table-cell>
          <table:table-cell table:formula="of:=[.K506]/[.F506]*100" office:value-type="float" office:value="2.30905861456483" calcext:value-type="float">
            <text:p>2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.1156" calcext:value-type="float">
            <text:p>1.1156</text:p>
          </table:table-cell>
          <table:table-cell office:value-type="float" office:value="66.94" calcext:value-type="float">
            <text:p>66.94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formula="of:=[.H507]-[.F507]" office:value-type="float" office:value="-3.94" calcext:value-type="float">
            <text:p>-3.94</text:p>
          </table:table-cell>
          <table:table-cell table:formula="of:=ABS([.J507])" office:value-type="float" office:value="3.94" calcext:value-type="float">
            <text:p>3.94</text:p>
          </table:table-cell>
          <table:table-cell table:formula="of:=[.K507]/[.F507]*100" office:value-type="float" office:value="5.88586794144009" calcext:value-type="float">
            <text:p>5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1161" calcext:value-type="float">
            <text:p>1.1161</text:p>
          </table:table-cell>
          <table:table-cell office:value-type="float" office:value="66.96" calcext:value-type="float">
            <text:p>66.96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08]-[.F508]" office:value-type="float" office:value="-3.95999999999999" calcext:value-type="float">
            <text:p>-3.95999999999999</text:p>
          </table:table-cell>
          <table:table-cell table:formula="of:=ABS([.J508])" office:value-type="float" office:value="3.95999999999999" calcext:value-type="float">
            <text:p>3.95999999999999</text:p>
          </table:table-cell>
          <table:table-cell table:formula="of:=[.K508]/[.F508]*100" office:value-type="float" office:value="5.91397849462365" calcext:value-type="float">
            <text:p>5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.1111" calcext:value-type="float">
            <text:p>1.1111</text:p>
          </table:table-cell>
          <table:table-cell office:value-type="float" office:value="66.66" calcext:value-type="float">
            <text:p>66.66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H509]-[.F509]" office:value-type="float" office:value="-0.659999999999997" calcext:value-type="float">
            <text:p>-0.659999999999997</text:p>
          </table:table-cell>
          <table:table-cell table:formula="of:=ABS([.J509])" office:value-type="float" office:value="0.659999999999997" calcext:value-type="float">
            <text:p>0.659999999999997</text:p>
          </table:table-cell>
          <table:table-cell table:formula="of:=[.K509]/[.F509]*100" office:value-type="float" office:value="0.990099009900985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0959" calcext:value-type="float">
            <text:p>1.0959</text:p>
          </table:table-cell>
          <table:table-cell office:value-type="float" office:value="65.75" calcext:value-type="float">
            <text:p>65.75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formula="of:=[.H510]-[.F510]" office:value-type="float" office:value="-2.75" calcext:value-type="float">
            <text:p>-2.75</text:p>
          </table:table-cell>
          <table:table-cell table:formula="of:=ABS([.J510])" office:value-type="float" office:value="2.75" calcext:value-type="float">
            <text:p>2.75</text:p>
          </table:table-cell>
          <table:table-cell table:formula="of:=[.K510]/[.F510]*100" office:value-type="float" office:value="4.18250950570342" calcext:value-type="float">
            <text:p>4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.1165" calcext:value-type="float">
            <text:p>1.1165</text:p>
          </table:table-cell>
          <table:table-cell office:value-type="float" office:value="66.99" calcext:value-type="float">
            <text:p>66.9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11]-[.F511]" office:value-type="float" office:value="-0.989999999999995" calcext:value-type="float">
            <text:p>-0.989999999999995</text:p>
          </table:table-cell>
          <table:table-cell table:formula="of:=ABS([.J511])" office:value-type="float" office:value="0.989999999999995" calcext:value-type="float">
            <text:p>0.989999999999995</text:p>
          </table:table-cell>
          <table:table-cell table:formula="of:=[.K511]/[.F511]*100" office:value-type="float" office:value="1.47783251231526" calcext:value-type="float">
            <text:p>1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.1184" calcext:value-type="float">
            <text:p>1.1184</text:p>
          </table:table-cell>
          <table:table-cell office:value-type="float" office:value="67.1" calcext:value-type="float">
            <text:p>67.1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formula="of:=[.H512]-[.F512]" office:value-type="float" office:value="-1.09999999999999" calcext:value-type="float">
            <text:p>-1.09999999999999</text:p>
          </table:table-cell>
          <table:table-cell table:formula="of:=ABS([.J512])" office:value-type="float" office:value="1.09999999999999" calcext:value-type="float">
            <text:p>1.09999999999999</text:p>
          </table:table-cell>
          <table:table-cell table:formula="of:=[.K512]/[.F512]*100" office:value-type="float" office:value="1.63934426229507" calcext:value-type="float">
            <text:p>1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.1023" calcext:value-type="float">
            <text:p>1.1023</text:p>
          </table:table-cell>
          <table:table-cell office:value-type="float" office:value="66.14" calcext:value-type="float">
            <text:p>66.1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13]-[.F513]" office:value-type="float" office:value="-0.140000000000001" calcext:value-type="float">
            <text:p>-0.140000000000001</text:p>
          </table:table-cell>
          <table:table-cell table:formula="of:=ABS([.J513])" office:value-type="float" office:value="0.140000000000001" calcext:value-type="float">
            <text:p>0.140000000000001</text:p>
          </table:table-cell>
          <table:table-cell table:formula="of:=[.K513]/[.F513]*100" office:value-type="float" office:value="0.211672210462656" calcext:value-type="float">
            <text:p>0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1139" calcext:value-type="float">
            <text:p>1.1139</text:p>
          </table:table-cell>
          <table:table-cell office:value-type="float" office:value="66.84" calcext:value-type="float">
            <text:p>66.8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14]-[.F514]" office:value-type="float" office:value="-0.840000000000003" calcext:value-type="float">
            <text:p>-0.840000000000003</text:p>
          </table:table-cell>
          <table:table-cell table:formula="of:=ABS([.J514])" office:value-type="float" office:value="0.840000000000003" calcext:value-type="float">
            <text:p>0.840000000000003</text:p>
          </table:table-cell>
          <table:table-cell table:formula="of:=[.K514]/[.F514]*100" office:value-type="float" office:value="1.25673249551167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.1028" calcext:value-type="float">
            <text:p>1.1028</text:p>
          </table:table-cell>
          <table:table-cell office:value-type="float" office:value="66.17" calcext:value-type="float">
            <text:p>66.17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15]-[.F515]" office:value-type="float" office:value="-0.170000000000002" calcext:value-type="float">
            <text:p>-0.170000000000002</text:p>
          </table:table-cell>
          <table:table-cell table:formula="of:=ABS([.J515])" office:value-type="float" office:value="0.170000000000002" calcext:value-type="float">
            <text:p>0.170000000000002</text:p>
          </table:table-cell>
          <table:table-cell table:formula="of:=[.K515]/[.F515]*100" office:value-type="float" office:value="0.256914009369808" calcext:value-type="float">
            <text:p>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.0854" calcext:value-type="float">
            <text:p>1.0854</text:p>
          </table:table-cell>
          <table:table-cell office:value-type="float" office:value="65.12" calcext:value-type="float">
            <text:p>65.12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formula="of:=[.H516]-[.F516]" office:value-type="float" office:value="0.879999999999996" calcext:value-type="float">
            <text:p>0.879999999999996</text:p>
          </table:table-cell>
          <table:table-cell table:formula="of:=ABS([.J516])" office:value-type="float" office:value="0.879999999999996" calcext:value-type="float">
            <text:p>0.879999999999996</text:p>
          </table:table-cell>
          <table:table-cell table:formula="of:=[.K516]/[.F516]*100" office:value-type="float" office:value="1.35135135135134" calcext:value-type="float">
            <text:p>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.0927" calcext:value-type="float">
            <text:p>1.0927</text:p>
          </table:table-cell>
          <table:table-cell office:value-type="float" office:value="65.56" calcext:value-type="float">
            <text:p>65.56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table:formula="of:=[.H517]-[.F517]" office:value-type="float" office:value="3.44" calcext:value-type="float">
            <text:p>3.44</text:p>
          </table:table-cell>
          <table:table-cell table:formula="of:=ABS([.J517])" office:value-type="float" office:value="3.44" calcext:value-type="float">
            <text:p>3.44</text:p>
          </table:table-cell>
          <table:table-cell table:formula="of:=[.K517]/[.F517]*100" office:value-type="float" office:value="5.24710189139719" calcext:value-type="float">
            <text:p>5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.0868" calcext:value-type="float">
            <text:p>1.0868</text:p>
          </table:table-cell>
          <table:table-cell office:value-type="float" office:value="65.21" calcext:value-type="float">
            <text:p>65.21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[.H518]-[.F518]" office:value-type="float" office:value="3.79000000000001" calcext:value-type="float">
            <text:p>3.79000000000001</text:p>
          </table:table-cell>
          <table:table-cell table:formula="of:=ABS([.J518])" office:value-type="float" office:value="3.79000000000001" calcext:value-type="float">
            <text:p>3.79000000000001</text:p>
          </table:table-cell>
          <table:table-cell table:formula="of:=[.K518]/[.F518]*100" office:value-type="float" office:value="5.81199202576293" calcext:value-type="float">
            <text:p>5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.0924" calcext:value-type="float">
            <text:p>1.0924</text:p>
          </table:table-cell>
          <table:table-cell office:value-type="float" office:value="65.55" calcext:value-type="float">
            <text:p>65.55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formula="of:=[.H519]-[.F519]" office:value-type="float" office:value="6.45" calcext:value-type="float">
            <text:p>6.45</text:p>
          </table:table-cell>
          <table:table-cell table:formula="of:=ABS([.J519])" office:value-type="float" office:value="6.45" calcext:value-type="float">
            <text:p>6.45</text:p>
          </table:table-cell>
          <table:table-cell table:formula="of:=[.K519]/[.F519]*100" office:value-type="float" office:value="9.83981693363845" calcext:value-type="float">
            <text:p>9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.1115" calcext:value-type="float">
            <text:p>1.1115</text:p>
          </table:table-cell>
          <table:table-cell office:value-type="float" office:value="66.69" calcext:value-type="float">
            <text:p>66.69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formula="of:=[.H520]-[.F520]" office:value-type="float" office:value="5.31" calcext:value-type="float">
            <text:p>5.31</text:p>
          </table:table-cell>
          <table:table-cell table:formula="of:=ABS([.J520])" office:value-type="float" office:value="5.31" calcext:value-type="float">
            <text:p>5.31</text:p>
          </table:table-cell>
          <table:table-cell table:formula="of:=[.K520]/[.F520]*100" office:value-type="float" office:value="7.96221322537113" calcext:value-type="float">
            <text:p>8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.1274" calcext:value-type="float">
            <text:p>1.1274</text:p>
          </table:table-cell>
          <table:table-cell office:value-type="float" office:value="67.64" calcext:value-type="float">
            <text:p>67.64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formula="of:=[.H521]-[.F521]" office:value-type="float" office:value="4.36" calcext:value-type="float">
            <text:p>4.36</text:p>
          </table:table-cell>
          <table:table-cell table:formula="of:=ABS([.J521])" office:value-type="float" office:value="4.36" calcext:value-type="float">
            <text:p>4.36</text:p>
          </table:table-cell>
          <table:table-cell table:formula="of:=[.K521]/[.F521]*100" office:value-type="float" office:value="6.44589000591366" calcext:value-type="float">
            <text:p>6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.1554" calcext:value-type="float">
            <text:p>1.1554</text:p>
          </table:table-cell>
          <table:table-cell office:value-type="float" office:value="69.32" calcext:value-type="float">
            <text:p>69.32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[.H522]-[.F522]" office:value-type="float" office:value="2.68000000000001" calcext:value-type="float">
            <text:p>2.68000000000001</text:p>
          </table:table-cell>
          <table:table-cell table:formula="of:=ABS([.J522])" office:value-type="float" office:value="2.68000000000001" calcext:value-type="float">
            <text:p>2.68000000000001</text:p>
          </table:table-cell>
          <table:table-cell table:formula="of:=[.K522]/[.F522]*100" office:value-type="float" office:value="3.866128101558" calcext:value-type="float">
            <text:p>3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.1461" calcext:value-type="float">
            <text:p>1.1461</text:p>
          </table:table-cell>
          <table:table-cell office:value-type="float" office:value="68.76" calcext:value-type="float">
            <text:p>68.7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523]-[.F523]" office:value-type="float" office:value="3.24" calcext:value-type="float">
            <text:p>3.24</text:p>
          </table:table-cell>
          <table:table-cell table:formula="of:=ABS([.J523])" office:value-type="float" office:value="3.24" calcext:value-type="float">
            <text:p>3.24</text:p>
          </table:table-cell>
          <table:table-cell table:formula="of:=[.K523]/[.F523]*100" office:value-type="float" office:value="4.71204188481675" calcext:value-type="float">
            <text:p>4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.1549" calcext:value-type="float">
            <text:p>1.1549</text:p>
          </table:table-cell>
          <table:table-cell office:value-type="float" office:value="69.3" calcext:value-type="float">
            <text:p>69.3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table:formula="of:=[.H524]-[.F524]" office:value-type="float" office:value="2.7" calcext:value-type="float">
            <text:p>2.7</text:p>
          </table:table-cell>
          <table:table-cell table:formula="of:=ABS([.J524])" office:value-type="float" office:value="2.7" calcext:value-type="float">
            <text:p>2.7</text:p>
          </table:table-cell>
          <table:table-cell table:formula="of:=[.K524]/[.F524]*100" office:value-type="float" office:value="3.8961038961039" calcext:value-type="float">
            <text:p>3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.1699" calcext:value-type="float">
            <text:p>1.1699</text:p>
          </table:table-cell>
          <table:table-cell office:value-type="float" office:value="70.2" calcext:value-type="float">
            <text:p>70.2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formula="of:=[.H525]-[.F525]" office:value-type="float" office:value="1.8" calcext:value-type="float">
            <text:p>1.8</text:p>
          </table:table-cell>
          <table:table-cell table:formula="of:=ABS([.J525])" office:value-type="float" office:value="1.8" calcext:value-type="float">
            <text:p>1.8</text:p>
          </table:table-cell>
          <table:table-cell table:formula="of:=[.K525]/[.F525]*100" office:value-type="float" office:value="2.56410256410256" calcext:value-type="float">
            <text:p>2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.1549" calcext:value-type="float">
            <text:p>1.1549</text:p>
          </table:table-cell>
          <table:table-cell office:value-type="float" office:value="69.29" calcext:value-type="float">
            <text:p>69.29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formula="of:=[.H526]-[.F526]" office:value-type="float" office:value="2.70999999999999" calcext:value-type="float">
            <text:p>2.70999999999999</text:p>
          </table:table-cell>
          <table:table-cell table:formula="of:=ABS([.J526])" office:value-type="float" office:value="2.70999999999999" calcext:value-type="float">
            <text:p>2.70999999999999</text:p>
          </table:table-cell>
          <table:table-cell table:formula="of:=[.K526]/[.F526]*100" office:value-type="float" office:value="3.91109828258045" calcext:value-type="float">
            <text:p>3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.1754" calcext:value-type="float">
            <text:p>1.1754</text:p>
          </table:table-cell>
          <table:table-cell office:value-type="float" office:value="70.53" calcext:value-type="float">
            <text:p>70.53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formula="of:=[.H527]-[.F527]" office:value-type="float" office:value="1.47" calcext:value-type="float">
            <text:p>1.47</text:p>
          </table:table-cell>
          <table:table-cell table:formula="of:=ABS([.J527])" office:value-type="float" office:value="1.47" calcext:value-type="float">
            <text:p>1.47</text:p>
          </table:table-cell>
          <table:table-cell table:formula="of:=[.K527]/[.F527]*100" office:value-type="float" office:value="2.08421948107188" calcext:value-type="float">
            <text:p>2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.1795" calcext:value-type="float">
            <text:p>1.1795</text:p>
          </table:table-cell>
          <table:table-cell office:value-type="float" office:value="70.77" calcext:value-type="float">
            <text:p>70.77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formula="of:=[.H528]-[.F528]" office:value-type="float" office:value="7.23" calcext:value-type="float">
            <text:p>7.23</text:p>
          </table:table-cell>
          <table:table-cell table:formula="of:=ABS([.J528])" office:value-type="float" office:value="7.23" calcext:value-type="float">
            <text:p>7.23</text:p>
          </table:table-cell>
          <table:table-cell table:formula="of:=[.K528]/[.F528]*100" office:value-type="float" office:value="10.2161933022467" calcext:value-type="float">
            <text:p>10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.1683" calcext:value-type="float">
            <text:p>1.1683</text:p>
          </table:table-cell>
          <table:table-cell office:value-type="float" office:value="70.1" calcext:value-type="float">
            <text:p>70.1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formula="of:=[.H529]-[.F529]" office:value-type="float" office:value="7.90000000000001" calcext:value-type="float">
            <text:p>7.90000000000001</text:p>
          </table:table-cell>
          <table:table-cell table:formula="of:=ABS([.J529])" office:value-type="float" office:value="7.90000000000001" calcext:value-type="float">
            <text:p>7.90000000000001</text:p>
          </table:table-cell>
          <table:table-cell table:formula="of:=[.K529]/[.F529]*100" office:value-type="float" office:value="11.2696148359487" calcext:value-type="float">
            <text:p>1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.1564" calcext:value-type="float">
            <text:p>1.1564</text:p>
          </table:table-cell>
          <table:table-cell office:value-type="float" office:value="69.39" calcext:value-type="float">
            <text:p>69.3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530]-[.F530]" office:value-type="float" office:value="20.61" calcext:value-type="float">
            <text:p>20.61</text:p>
          </table:table-cell>
          <table:table-cell table:formula="of:=ABS([.J530])" office:value-type="float" office:value="20.61" calcext:value-type="float">
            <text:p>20.61</text:p>
          </table:table-cell>
          <table:table-cell table:formula="of:=[.K530]/[.F530]*100" office:value-type="float" office:value="29.7016861219196" calcext:value-type="float">
            <text:p>29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.1685" calcext:value-type="float">
            <text:p>1.1685</text:p>
          </table:table-cell>
          <table:table-cell office:value-type="float" office:value="70.11" calcext:value-type="float">
            <text:p>70.11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formula="of:=[.H531]-[.F531]" office:value-type="float" office:value="19.89" calcext:value-type="float">
            <text:p>19.89</text:p>
          </table:table-cell>
          <table:table-cell table:formula="of:=ABS([.J531])" office:value-type="float" office:value="19.89" calcext:value-type="float">
            <text:p>19.89</text:p>
          </table:table-cell>
          <table:table-cell table:formula="of:=[.K531]/[.F531]*100" office:value-type="float" office:value="28.3697047496791" calcext:value-type="float">
            <text:p>28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.1472" calcext:value-type="float">
            <text:p>1.1472</text:p>
          </table:table-cell>
          <table:table-cell office:value-type="float" office:value="68.83" calcext:value-type="float">
            <text:p>68.83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formula="of:=[.H532]-[.F532]" office:value-type="float" office:value="21.17" calcext:value-type="float">
            <text:p>21.17</text:p>
          </table:table-cell>
          <table:table-cell table:formula="of:=ABS([.J532])" office:value-type="float" office:value="21.17" calcext:value-type="float">
            <text:p>21.17</text:p>
          </table:table-cell>
          <table:table-cell table:formula="of:=[.K532]/[.F532]*100" office:value-type="float" office:value="30.7569373819555" calcext:value-type="float">
            <text:p>30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.13" calcext:value-type="float">
            <text:p>1.13</text:p>
          </table:table-cell>
          <table:table-cell office:value-type="float" office:value="67.8" calcext:value-type="float">
            <text:p>67.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533]-[.F533]" office:value-type="float" office:value="22.2" calcext:value-type="float">
            <text:p>22.2</text:p>
          </table:table-cell>
          <table:table-cell table:formula="of:=ABS([.J533])" office:value-type="float" office:value="22.2" calcext:value-type="float">
            <text:p>22.2</text:p>
          </table:table-cell>
          <table:table-cell table:formula="of:=[.K533]/[.F533]*100" office:value-type="float" office:value="32.7433628318584" calcext:value-type="float">
            <text:p>32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.1198" calcext:value-type="float">
            <text:p>1.1198</text:p>
          </table:table-cell>
          <table:table-cell office:value-type="float" office:value="67.19" calcext:value-type="float">
            <text:p>67.1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34]-[.F534]" office:value-type="float" office:value="-1.19" calcext:value-type="float">
            <text:p>-1.19</text:p>
          </table:table-cell>
          <table:table-cell table:formula="of:=ABS([.J534])" office:value-type="float" office:value="1.19" calcext:value-type="float">
            <text:p>1.19</text:p>
          </table:table-cell>
          <table:table-cell table:formula="of:=[.K534]/[.F534]*100" office:value-type="float" office:value="1.77109688941806" calcext:value-type="float">
            <text:p>1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.0839" calcext:value-type="float">
            <text:p>1.0839</text:p>
          </table:table-cell>
          <table:table-cell office:value-type="float" office:value="65.03" calcext:value-type="float">
            <text:p>65.03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35]-[.F535]" office:value-type="float" office:value="0.969999999999999" calcext:value-type="float">
            <text:p>0.969999999999999</text:p>
          </table:table-cell>
          <table:table-cell table:formula="of:=ABS([.J535])" office:value-type="float" office:value="0.969999999999999" calcext:value-type="float">
            <text:p>0.969999999999999</text:p>
          </table:table-cell>
          <table:table-cell table:formula="of:=[.K535]/[.F535]*100" office:value-type="float" office:value="1.49161925265262" calcext:value-type="float">
            <text:p>1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.0765" calcext:value-type="float">
            <text:p>1.0765</text:p>
          </table:table-cell>
          <table:table-cell office:value-type="float" office:value="64.59" calcext:value-type="float">
            <text:p>64.59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H536]-[.F536]" office:value-type="float" office:value="1.41" calcext:value-type="float">
            <text:p>1.41</text:p>
          </table:table-cell>
          <table:table-cell table:formula="of:=ABS([.J536])" office:value-type="float" office:value="1.41" calcext:value-type="float">
            <text:p>1.41</text:p>
          </table:table-cell>
          <table:table-cell table:formula="of:=[.K536]/[.F536]*100" office:value-type="float" office:value="2.18300046446818" calcext:value-type="float">
            <text:p>2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.0718" calcext:value-type="float">
            <text:p>1.0718</text:p>
          </table:table-cell>
          <table:table-cell office:value-type="float" office:value="64.31" calcext:value-type="float">
            <text:p>64.3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37]-[.F537]" office:value-type="float" office:value="1.69" calcext:value-type="float">
            <text:p>1.69</text:p>
          </table:table-cell>
          <table:table-cell table:formula="of:=ABS([.J537])" office:value-type="float" office:value="1.69" calcext:value-type="float">
            <text:p>1.69</text:p>
          </table:table-cell>
          <table:table-cell table:formula="of:=[.K537]/[.F537]*100" office:value-type="float" office:value="2.62789612812937" calcext:value-type="float">
            <text:p>2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1.0841" calcext:value-type="float">
            <text:p>1.0841</text:p>
          </table:table-cell>
          <table:table-cell office:value-type="float" office:value="65.05" calcext:value-type="float">
            <text:p>65.05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formula="of:=[.H538]-[.F538]" office:value-type="float" office:value="0.950000000000003" calcext:value-type="float">
            <text:p>0.950000000000003</text:p>
          </table:table-cell>
          <table:table-cell table:formula="of:=ABS([.J538])" office:value-type="float" office:value="0.950000000000003" calcext:value-type="float">
            <text:p>0.950000000000003</text:p>
          </table:table-cell>
          <table:table-cell table:formula="of:=[.K538]/[.F538]*100" office:value-type="float" office:value="1.46041506533436" calcext:value-type="float">
            <text:p>1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1.1014" calcext:value-type="float">
            <text:p>1.1014</text:p>
          </table:table-cell>
          <table:table-cell office:value-type="float" office:value="66.08" calcext:value-type="float">
            <text:p>66.08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H539]-[.F539]" office:value-type="float" office:value="8.92" calcext:value-type="float">
            <text:p>8.92</text:p>
          </table:table-cell>
          <table:table-cell table:formula="of:=ABS([.J539])" office:value-type="float" office:value="8.92" calcext:value-type="float">
            <text:p>8.92</text:p>
          </table:table-cell>
          <table:table-cell table:formula="of:=[.K539]/[.F539]*100" office:value-type="float" office:value="13.498789346247" calcext:value-type="float">
            <text:p>13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1.1049" calcext:value-type="float">
            <text:p>1.1049</text:p>
          </table:table-cell>
          <table:table-cell office:value-type="float" office:value="66.3" calcext:value-type="float">
            <text:p>66.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540]-[.F540]" office:value-type="float" office:value="8.7" calcext:value-type="float">
            <text:p>8.7</text:p>
          </table:table-cell>
          <table:table-cell table:formula="of:=ABS([.J540])" office:value-type="float" office:value="8.7" calcext:value-type="float">
            <text:p>8.7</text:p>
          </table:table-cell>
          <table:table-cell table:formula="of:=[.K540]/[.F540]*100" office:value-type="float" office:value="13.1221719457014" calcext:value-type="float">
            <text:p>13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.1047" calcext:value-type="float">
            <text:p>1.1047</text:p>
          </table:table-cell>
          <table:table-cell office:value-type="float" office:value="66.28" calcext:value-type="float">
            <text:p>66.28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formula="of:=[.H541]-[.F541]" office:value-type="float" office:value="8.72" calcext:value-type="float">
            <text:p>8.72</text:p>
          </table:table-cell>
          <table:table-cell table:formula="of:=ABS([.J541])" office:value-type="float" office:value="8.72" calcext:value-type="float">
            <text:p>8.72</text:p>
          </table:table-cell>
          <table:table-cell table:formula="of:=[.K541]/[.F541]*100" office:value-type="float" office:value="13.1563065781533" calcext:value-type="float">
            <text:p>13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1.1081" calcext:value-type="float">
            <text:p>1.1081</text:p>
          </table:table-cell>
          <table:table-cell office:value-type="float" office:value="66.49" calcext:value-type="float">
            <text:p>66.49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H542]-[.F542]" office:value-type="float" office:value="-0.489999999999995" calcext:value-type="float">
            <text:p>-0.489999999999995</text:p>
          </table:table-cell>
          <table:table-cell table:formula="of:=ABS([.J542])" office:value-type="float" office:value="0.489999999999995" calcext:value-type="float">
            <text:p>0.489999999999995</text:p>
          </table:table-cell>
          <table:table-cell table:formula="of:=[.K542]/[.F542]*100" office:value-type="float" office:value="0.73695292525191" calcext:value-type="float">
            <text:p>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.1039" calcext:value-type="float">
            <text:p>1.1039</text:p>
          </table:table-cell>
          <table:table-cell office:value-type="float" office:value="66.24" calcext:value-type="float">
            <text:p>66.2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43]-[.F543]" office:value-type="float" office:value="-0.239999999999995" calcext:value-type="float">
            <text:p>-0.239999999999995</text:p>
          </table:table-cell>
          <table:table-cell table:formula="of:=ABS([.J543])" office:value-type="float" office:value="0.239999999999995" calcext:value-type="float">
            <text:p>0.239999999999995</text:p>
          </table:table-cell>
          <table:table-cell table:formula="of:=[.K543]/[.F543]*100" office:value-type="float" office:value="0.362318840579702" calcext:value-type="float">
            <text:p>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.0983" calcext:value-type="float">
            <text:p>1.0983</text:p>
          </table:table-cell>
          <table:table-cell office:value-type="float" office:value="65.9" calcext:value-type="float">
            <text:p>65.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44]-[.F544]" office:value-type="float" office:value="0.0999999999999943" calcext:value-type="float">
            <text:p>0.0999999999999943</text:p>
          </table:table-cell>
          <table:table-cell table:formula="of:=ABS([.J544])" office:value-type="float" office:value="0.0999999999999943" calcext:value-type="float">
            <text:p>0.0999999999999943</text:p>
          </table:table-cell>
          <table:table-cell table:formula="of:=[.K544]/[.F544]*100" office:value-type="float" office:value="0.151745068285272" calcext:value-type="float">
            <text:p>0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.0884" calcext:value-type="float">
            <text:p>1.0884</text:p>
          </table:table-cell>
          <table:table-cell office:value-type="float" office:value="65.3" calcext:value-type="float">
            <text:p>65.3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formula="of:=[.H545]-[.F545]" office:value-type="float" office:value="0.700000000000003" calcext:value-type="float">
            <text:p>0.700000000000003</text:p>
          </table:table-cell>
          <table:table-cell table:formula="of:=ABS([.J545])" office:value-type="float" office:value="0.700000000000003" calcext:value-type="float">
            <text:p>0.700000000000003</text:p>
          </table:table-cell>
          <table:table-cell table:formula="of:=[.K545]/[.F545]*100" office:value-type="float" office:value="1.07197549770291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1.071" calcext:value-type="float">
            <text:p>1.071</text:p>
          </table:table-cell>
          <table:table-cell office:value-type="float" office:value="64.26" calcext:value-type="float">
            <text:p>64.26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formula="of:=[.H546]-[.F546]" office:value-type="float" office:value="10.74" calcext:value-type="float">
            <text:p>10.74</text:p>
          </table:table-cell>
          <table:table-cell table:formula="of:=ABS([.J546])" office:value-type="float" office:value="10.74" calcext:value-type="float">
            <text:p>10.74</text:p>
          </table:table-cell>
          <table:table-cell table:formula="of:=[.K546]/[.F546]*100" office:value-type="float" office:value="16.7133520074696" calcext:value-type="float">
            <text:p>16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1.0609" calcext:value-type="float">
            <text:p>1.0609</text:p>
          </table:table-cell>
          <table:table-cell office:value-type="float" office:value="63.65" calcext:value-type="float">
            <text:p>63.6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547]-[.F547]" office:value-type="float" office:value="11.35" calcext:value-type="float">
            <text:p>11.35</text:p>
          </table:table-cell>
          <table:table-cell table:formula="of:=ABS([.J547])" office:value-type="float" office:value="11.35" calcext:value-type="float">
            <text:p>11.35</text:p>
          </table:table-cell>
          <table:table-cell table:formula="of:=[.K547]/[.F547]*100" office:value-type="float" office:value="17.8318931657502" calcext:value-type="float">
            <text:p>17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1.0667" calcext:value-type="float">
            <text:p>1.066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formula="of:=[.H548]-[.F548]" office:value-type="float" office:value="-4" calcext:value-type="float">
            <text:p>-4</text:p>
          </table:table-cell>
          <table:table-cell table:formula="of:=ABS([.J548])" office:value-type="float" office:value="4" calcext:value-type="float">
            <text:p>4</text:p>
          </table:table-cell>
          <table:table-cell table:formula="of:=[.K548]/[.F548]*100" office:value-type="float" office:value="6.25" calcext:value-type="float">
            <text:p>6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office:value-type="float" office:value="1.0807" calcext:value-type="float">
            <text:p>1.0807</text:p>
          </table:table-cell>
          <table:table-cell office:value-type="float" office:value="64.84" calcext:value-type="float">
            <text:p>64.84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[.H549]-[.F549]" office:value-type="float" office:value="10.16" calcext:value-type="float">
            <text:p>10.16</text:p>
          </table:table-cell>
          <table:table-cell table:formula="of:=ABS([.J549])" office:value-type="float" office:value="10.16" calcext:value-type="float">
            <text:p>10.16</text:p>
          </table:table-cell>
          <table:table-cell table:formula="of:=[.K549]/[.F549]*100" office:value-type="float" office:value="15.6693399136336" calcext:value-type="float">
            <text:p>15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1.093" calcext:value-type="float">
            <text:p>1.093</text:p>
          </table:table-cell>
          <table:table-cell office:value-type="float" office:value="65.58" calcext:value-type="float">
            <text:p>65.58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[.H550]-[.F550]" office:value-type="float" office:value="0.420000000000002" calcext:value-type="float">
            <text:p>0.420000000000002</text:p>
          </table:table-cell>
          <table:table-cell table:formula="of:=ABS([.J550])" office:value-type="float" office:value="0.420000000000002" calcext:value-type="float">
            <text:p>0.420000000000002</text:p>
          </table:table-cell>
          <table:table-cell table:formula="of:=[.K550]/[.F550]*100" office:value-type="float" office:value="0.640439158279966" calcext:value-type="float">
            <text:p>0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1.1016" calcext:value-type="float">
            <text:p>1.1016</text:p>
          </table:table-cell>
          <table:table-cell office:value-type="float" office:value="66.1" calcext:value-type="float">
            <text:p>66.1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formula="of:=[.H551]-[.F551]" office:value-type="float" office:value="-0.0999999999999943" calcext:value-type="float">
            <text:p>-0.0999999999999943</text:p>
          </table:table-cell>
          <table:table-cell table:formula="of:=ABS([.J551])" office:value-type="float" office:value="0.0999999999999943" calcext:value-type="float">
            <text:p>0.0999999999999943</text:p>
          </table:table-cell>
          <table:table-cell table:formula="of:=[.K551]/[.F551]*100" office:value-type="float" office:value="0.151285930408463" calcext:value-type="float">
            <text:p>0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1.0978" calcext:value-type="float">
            <text:p>1.0978</text:p>
          </table:table-cell>
          <table:table-cell office:value-type="float" office:value="65.87" calcext:value-type="float">
            <text:p>65.87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52]-[.F552]" office:value-type="float" office:value="0.129999999999995" calcext:value-type="float">
            <text:p>0.129999999999995</text:p>
          </table:table-cell>
          <table:table-cell table:formula="of:=ABS([.J552])" office:value-type="float" office:value="0.129999999999995" calcext:value-type="float">
            <text:p>0.129999999999995</text:p>
          </table:table-cell>
          <table:table-cell table:formula="of:=[.K552]/[.F552]*100" office:value-type="float" office:value="0.197358433277661" calcext:value-type="float">
            <text:p>0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1.0779" calcext:value-type="float">
            <text:p>1.0779</text:p>
          </table:table-cell>
          <table:table-cell office:value-type="float" office:value="64.68" calcext:value-type="float">
            <text:p>64.68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53]-[.F553]" office:value-type="float" office:value="1.31999999999999" calcext:value-type="float">
            <text:p>1.31999999999999</text:p>
          </table:table-cell>
          <table:table-cell table:formula="of:=ABS([.J553])" office:value-type="float" office:value="1.31999999999999" calcext:value-type="float">
            <text:p>1.31999999999999</text:p>
          </table:table-cell>
          <table:table-cell table:formula="of:=[.K553]/[.F553]*100" office:value-type="float" office:value="2.0408163265306" calcext:value-type="float">
            <text:p>2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57" calcext:value-type="float">
            <text:p>57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1.0671" calcext:value-type="float">
            <text:p>1.0671</text:p>
          </table:table-cell>
          <table:table-cell office:value-type="float" office:value="64.03" calcext:value-type="float">
            <text:p>64.03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54]-[.F554]" office:value-type="float" office:value="-1.03" calcext:value-type="float">
            <text:p>-1.03</text:p>
          </table:table-cell>
          <table:table-cell table:formula="of:=ABS([.J554])" office:value-type="float" office:value="1.03" calcext:value-type="float">
            <text:p>1.03</text:p>
          </table:table-cell>
          <table:table-cell table:formula="of:=[.K554]/[.F554]*100" office:value-type="float" office:value="1.60862095892551" calcext:value-type="float">
            <text:p>1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58" calcext:value-type="float">
            <text:p>58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1.0497" calcext:value-type="float">
            <text:p>1.0497</text:p>
          </table:table-cell>
          <table:table-cell office:value-type="float" office:value="62.98" calcext:value-type="float">
            <text:p>62.98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55]-[.F555]" office:value-type="float" office:value="0.0200000000000031" calcext:value-type="float">
            <text:p>0.0200000000000031</text:p>
          </table:table-cell>
          <table:table-cell table:formula="of:=ABS([.J555])" office:value-type="float" office:value="0.0200000000000031" calcext:value-type="float">
            <text:p>0.0200000000000031</text:p>
          </table:table-cell>
          <table:table-cell table:formula="of:=[.K555]/[.F555]*100" office:value-type="float" office:value="0.0317561130517674" calcext:value-type="float">
            <text:p>0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59" calcext:value-type="float">
            <text:p>59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1.0431" calcext:value-type="float">
            <text:p>1.0431</text:p>
          </table:table-cell>
          <table:table-cell office:value-type="float" office:value="62.59" calcext:value-type="float">
            <text:p>62.59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56]-[.F556]" office:value-type="float" office:value="0.409999999999997" calcext:value-type="float">
            <text:p>0.409999999999997</text:p>
          </table:table-cell>
          <table:table-cell table:formula="of:=ABS([.J556])" office:value-type="float" office:value="0.409999999999997" calcext:value-type="float">
            <text:p>0.409999999999997</text:p>
          </table:table-cell>
          <table:table-cell table:formula="of:=[.K556]/[.F556]*100" office:value-type="float" office:value="0.655056718325606" calcext:value-type="float">
            <text:p>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.04" calcext:value-type="float">
            <text:p>1.04</text:p>
          </table:table-cell>
          <table:table-cell office:value-type="float" office:value="62.4" calcext:value-type="float">
            <text:p>62.4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57]-[.F557]" office:value-type="float" office:value="0.600000000000001" calcext:value-type="float">
            <text:p>0.600000000000001</text:p>
          </table:table-cell>
          <table:table-cell table:formula="of:=ABS([.J557])" office:value-type="float" office:value="0.600000000000001" calcext:value-type="float">
            <text:p>0.600000000000001</text:p>
          </table:table-cell>
          <table:table-cell table:formula="of:=[.K557]/[.F557]*100" office:value-type="float" office:value="0.961538461538464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1.0314" calcext:value-type="float">
            <text:p>1.0314</text:p>
          </table:table-cell>
          <table:table-cell office:value-type="float" office:value="61.88" calcext:value-type="float">
            <text:p>61.88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58]-[.F558]" office:value-type="float" office:value="1.12" calcext:value-type="float">
            <text:p>1.12</text:p>
          </table:table-cell>
          <table:table-cell table:formula="of:=ABS([.J558])" office:value-type="float" office:value="1.12" calcext:value-type="float">
            <text:p>1.12</text:p>
          </table:table-cell>
          <table:table-cell table:formula="of:=[.K558]/[.F558]*100" office:value-type="float" office:value="1.80995475113122" calcext:value-type="float">
            <text:p>1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62" calcext:value-type="float">
            <text:p>62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1.0383" calcext:value-type="float">
            <text:p>1.0383</text:p>
          </table:table-cell>
          <table:table-cell office:value-type="float" office:value="62.3" calcext:value-type="float">
            <text:p>62.3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59]-[.F559]" office:value-type="float" office:value="0.700000000000003" calcext:value-type="float">
            <text:p>0.700000000000003</text:p>
          </table:table-cell>
          <table:table-cell table:formula="of:=ABS([.J559])" office:value-type="float" office:value="0.700000000000003" calcext:value-type="float">
            <text:p>0.700000000000003</text:p>
          </table:table-cell>
          <table:table-cell table:formula="of:=[.K559]/[.F559]*100" office:value-type="float" office:value="1.12359550561798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.0474" calcext:value-type="float">
            <text:p>1.0474</text:p>
          </table:table-cell>
          <table:table-cell office:value-type="float" office:value="62.84" calcext:value-type="float">
            <text:p>62.84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60]-[.F560]" office:value-type="float" office:value="0.159999999999997" calcext:value-type="float">
            <text:p>0.159999999999997</text:p>
          </table:table-cell>
          <table:table-cell table:formula="of:=ABS([.J560])" office:value-type="float" office:value="0.159999999999997" calcext:value-type="float">
            <text:p>0.159999999999997</text:p>
          </table:table-cell>
          <table:table-cell table:formula="of:=[.K560]/[.F560]*100" office:value-type="float" office:value="0.25461489497135" calcext:value-type="float">
            <text:p>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.065" calcext:value-type="float">
            <text:p>1.065</text:p>
          </table:table-cell>
          <table:table-cell office:value-type="float" office:value="63.9" calcext:value-type="float">
            <text:p>63.9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61]-[.F561]" office:value-type="float" office:value="-0.899999999999999" calcext:value-type="float">
            <text:p>-0.899999999999999</text:p>
          </table:table-cell>
          <table:table-cell table:formula="of:=ABS([.J561])" office:value-type="float" office:value="0.899999999999999" calcext:value-type="float">
            <text:p>0.899999999999999</text:p>
          </table:table-cell>
          <table:table-cell table:formula="of:=[.K561]/[.F561]*100" office:value-type="float" office:value="1.40845070422535" calcext:value-type="float">
            <text:p>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.0711" calcext:value-type="float">
            <text:p>1.0711</text:p>
          </table:table-cell>
          <table:table-cell office:value-type="float" office:value="64.27" calcext:value-type="float">
            <text:p>64.27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62]-[.F562]" office:value-type="float" office:value="1.73" calcext:value-type="float">
            <text:p>1.73</text:p>
          </table:table-cell>
          <table:table-cell table:formula="of:=ABS([.J562])" office:value-type="float" office:value="1.73" calcext:value-type="float">
            <text:p>1.73</text:p>
          </table:table-cell>
          <table:table-cell table:formula="of:=[.K562]/[.F562]*100" office:value-type="float" office:value="2.69176909911312" calcext:value-type="float">
            <text:p>2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66" calcext:value-type="float">
            <text:p>66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1.0742" calcext:value-type="float">
            <text:p>1.0742</text:p>
          </table:table-cell>
          <table:table-cell office:value-type="float" office:value="64.45" calcext:value-type="float">
            <text:p>64.45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63]-[.F563]" office:value-type="float" office:value="1.55" calcext:value-type="float">
            <text:p>1.55</text:p>
          </table:table-cell>
          <table:table-cell table:formula="of:=ABS([.J563])" office:value-type="float" office:value="1.55" calcext:value-type="float">
            <text:p>1.55</text:p>
          </table:table-cell>
          <table:table-cell table:formula="of:=[.K563]/[.F563]*100" office:value-type="float" office:value="2.40496508921644" calcext:value-type="float">
            <text:p>2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1.0654" calcext:value-type="float">
            <text:p>1.0654</text:p>
          </table:table-cell>
          <table:table-cell office:value-type="float" office:value="63.92" calcext:value-type="float">
            <text:p>63.9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564]-[.F564]" office:value-type="float" office:value="2.08" calcext:value-type="float">
            <text:p>2.08</text:p>
          </table:table-cell>
          <table:table-cell table:formula="of:=ABS([.J564])" office:value-type="float" office:value="2.08" calcext:value-type="float">
            <text:p>2.08</text:p>
          </table:table-cell>
          <table:table-cell table:formula="of:=[.K564]/[.F564]*100" office:value-type="float" office:value="3.2540675844806" calcext:value-type="float">
            <text:p>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68" calcext:value-type="float">
            <text:p>68</text:p>
          </table:table-cell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office:value-type="float" office:value="1.0452" calcext:value-type="float">
            <text:p>1.0452</text:p>
          </table:table-cell>
          <table:table-cell office:value-type="float" office:value="62.71" calcext:value-type="float">
            <text:p>62.71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formula="of:=[.H565]-[.F565]" office:value-type="float" office:value="3.29" calcext:value-type="float">
            <text:p>3.29</text:p>
          </table:table-cell>
          <table:table-cell table:formula="of:=ABS([.J565])" office:value-type="float" office:value="3.29" calcext:value-type="float">
            <text:p>3.29</text:p>
          </table:table-cell>
          <table:table-cell table:formula="of:=[.K565]/[.F565]*100" office:value-type="float" office:value="5.24637218944347" calcext:value-type="float">
            <text:p>5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1.0416" calcext:value-type="float">
            <text:p>1.0416</text:p>
          </table:table-cell>
          <table:table-cell office:value-type="float" office:value="62.49" calcext:value-type="float">
            <text:p>62.49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formula="of:=[.H566]-[.F566]" office:value-type="float" office:value="3.51" calcext:value-type="float">
            <text:p>3.51</text:p>
          </table:table-cell>
          <table:table-cell table:formula="of:=ABS([.J566])" office:value-type="float" office:value="3.51" calcext:value-type="float">
            <text:p>3.51</text:p>
          </table:table-cell>
          <table:table-cell table:formula="of:=[.K566]/[.F566]*100" office:value-type="float" office:value="5.6168987037926" calcext:value-type="float">
            <text:p>5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1.0392" calcext:value-type="float">
            <text:p>1.0392</text:p>
          </table:table-cell>
          <table:table-cell office:value-type="float" office:value="62.35" calcext:value-type="float">
            <text:p>62.35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67]-[.F567]" office:value-type="float" office:value="0.649999999999999" calcext:value-type="float">
            <text:p>0.649999999999999</text:p>
          </table:table-cell>
          <table:table-cell table:formula="of:=ABS([.J567])" office:value-type="float" office:value="0.649999999999999" calcext:value-type="float">
            <text:p>0.649999999999999</text:p>
          </table:table-cell>
          <table:table-cell table:formula="of:=[.K567]/[.F567]*100" office:value-type="float" office:value="1.04250200481155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1.0306" calcext:value-type="float">
            <text:p>1.0306</text:p>
          </table:table-cell>
          <table:table-cell office:value-type="float" office:value="61.83" calcext:value-type="float">
            <text:p>61.83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68]-[.F568]" office:value-type="float" office:value="1.17" calcext:value-type="float">
            <text:p>1.17</text:p>
          </table:table-cell>
          <table:table-cell table:formula="of:=ABS([.J568])" office:value-type="float" office:value="1.17" calcext:value-type="float">
            <text:p>1.17</text:p>
          </table:table-cell>
          <table:table-cell table:formula="of:=[.K568]/[.F568]*100" office:value-type="float" office:value="1.89228529839884" calcext:value-type="float">
            <text:p>1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1.0395" calcext:value-type="float">
            <text:p>1.0395</text:p>
          </table:table-cell>
          <table:table-cell office:value-type="float" office:value="62.37" calcext:value-type="float">
            <text:p>62.37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69]-[.F569]" office:value-type="float" office:value="0.630000000000003" calcext:value-type="float">
            <text:p>0.630000000000003</text:p>
          </table:table-cell>
          <table:table-cell table:formula="of:=ABS([.J569])" office:value-type="float" office:value="0.630000000000003" calcext:value-type="float">
            <text:p>0.630000000000003</text:p>
          </table:table-cell>
          <table:table-cell table:formula="of:=[.K569]/[.F569]*100" office:value-type="float" office:value="1.01010101010101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1.0386" calcext:value-type="float">
            <text:p>1.0386</text:p>
          </table:table-cell>
          <table:table-cell office:value-type="float" office:value="62.32" calcext:value-type="float">
            <text:p>62.32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H570]-[.F570]" office:value-type="float" office:value="0.68" calcext:value-type="float">
            <text:p>0.68</text:p>
          </table:table-cell>
          <table:table-cell table:formula="of:=ABS([.J570])" office:value-type="float" office:value="0.68" calcext:value-type="float">
            <text:p>0.68</text:p>
          </table:table-cell>
          <table:table-cell table:formula="of:=[.K570]/[.F570]*100" office:value-type="float" office:value="1.09114249037227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1.0317" calcext:value-type="float">
            <text:p>1.0317</text:p>
          </table:table-cell>
          <table:table-cell office:value-type="float" office:value="61.9" calcext:value-type="float">
            <text:p>61.9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71]-[.F571]" office:value-type="float" office:value="1.1" calcext:value-type="float">
            <text:p>1.1</text:p>
          </table:table-cell>
          <table:table-cell table:formula="of:=ABS([.J571])" office:value-type="float" office:value="1.1" calcext:value-type="float">
            <text:p>1.1</text:p>
          </table:table-cell>
          <table:table-cell table:formula="of:=[.K571]/[.F571]*100" office:value-type="float" office:value="1.77705977382876" calcext:value-type="float">
            <text:p>1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.0432" calcext:value-type="float">
            <text:p>1.0432</text:p>
          </table:table-cell>
          <table:table-cell office:value-type="float" office:value="62.59" calcext:value-type="float">
            <text:p>62.59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72]-[.F572]" office:value-type="float" office:value="0.409999999999997" calcext:value-type="float">
            <text:p>0.409999999999997</text:p>
          </table:table-cell>
          <table:table-cell table:formula="of:=ABS([.J572])" office:value-type="float" office:value="0.409999999999997" calcext:value-type="float">
            <text:p>0.409999999999997</text:p>
          </table:table-cell>
          <table:table-cell table:formula="of:=[.K572]/[.F572]*100" office:value-type="float" office:value="0.655056718325606" calcext:value-type="float">
            <text:p>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76" calcext:value-type="float">
            <text:p>76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1.0527" calcext:value-type="float">
            <text:p>1.0527</text:p>
          </table:table-cell>
          <table:table-cell office:value-type="float" office:value="63.16" calcext:value-type="float">
            <text:p>63.16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formula="of:=[.H573]-[.F573]" office:value-type="float" office:value="-0.159999999999997" calcext:value-type="float">
            <text:p>-0.159999999999997</text:p>
          </table:table-cell>
          <table:table-cell table:formula="of:=ABS([.J573])" office:value-type="float" office:value="0.159999999999997" calcext:value-type="float">
            <text:p>0.159999999999997</text:p>
          </table:table-cell>
          <table:table-cell table:formula="of:=[.K573]/[.F573]*100" office:value-type="float" office:value="0.253324889170356" calcext:value-type="float">
            <text:p>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77" calcext:value-type="float">
            <text:p>7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1.0547" calcext:value-type="float">
            <text:p>1.0547</text:p>
          </table:table-cell>
          <table:table-cell office:value-type="float" office:value="63.28" calcext:value-type="float">
            <text:p>63.28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formula="of:=[.H574]-[.F574]" office:value-type="float" office:value="-0.280000000000001" calcext:value-type="float">
            <text:p>-0.280000000000001</text:p>
          </table:table-cell>
          <table:table-cell table:formula="of:=ABS([.J574])" office:value-type="float" office:value="0.280000000000001" calcext:value-type="float">
            <text:p>0.280000000000001</text:p>
          </table:table-cell>
          <table:table-cell table:formula="of:=[.K574]/[.F574]*100" office:value-type="float" office:value="0.442477876106197" calcext:value-type="float">
            <text:p>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1.054" calcext:value-type="float">
            <text:p>1.054</text:p>
          </table:table-cell>
          <table:table-cell office:value-type="float" office:value="63.24" calcext:value-type="float">
            <text:p>63.24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75]-[.F575]" office:value-type="float" office:value="-0.240000000000002" calcext:value-type="float">
            <text:p>-0.240000000000002</text:p>
          </table:table-cell>
          <table:table-cell table:formula="of:=ABS([.J575])" office:value-type="float" office:value="0.240000000000002" calcext:value-type="float">
            <text:p>0.240000000000002</text:p>
          </table:table-cell>
          <table:table-cell table:formula="of:=[.K575]/[.F575]*100" office:value-type="float" office:value="0.379506641366227" calcext:value-type="float">
            <text:p>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79" calcext:value-type="float">
            <text:p>79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1.0513" calcext:value-type="float">
            <text:p>1.0513</text:p>
          </table:table-cell>
          <table:table-cell office:value-type="float" office:value="63.08" calcext:value-type="float">
            <text:p>63.08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76]-[.F576]" office:value-type="float" office:value="-0.0799999999999983" calcext:value-type="float">
            <text:p>-0.0799999999999983</text:p>
          </table:table-cell>
          <table:table-cell table:formula="of:=ABS([.J576])" office:value-type="float" office:value="0.0799999999999983" calcext:value-type="float">
            <text:p>0.0799999999999983</text:p>
          </table:table-cell>
          <table:table-cell table:formula="of:=[.K576]/[.F576]*100" office:value-type="float" office:value="0.126823081800885" calcext:value-type="float">
            <text:p>0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415" calcext:value-type="float">
            <text:p>415</text:p>
          </table:table-cell>
          <table:table-cell office:value-type="float" office:value="1.0414" calcext:value-type="float">
            <text:p>1.0414</text:p>
          </table:table-cell>
          <table:table-cell office:value-type="float" office:value="62.49" calcext:value-type="float">
            <text:p>62.49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77]-[.F577]" office:value-type="float" office:value="0.509999999999998" calcext:value-type="float">
            <text:p>0.509999999999998</text:p>
          </table:table-cell>
          <table:table-cell table:formula="of:=ABS([.J577])" office:value-type="float" office:value="0.509999999999998" calcext:value-type="float">
            <text:p>0.509999999999998</text:p>
          </table:table-cell>
          <table:table-cell table:formula="of:=[.K577]/[.F577]*100" office:value-type="float" office:value="0.81613058089294" calcext:value-type="float">
            <text:p>0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1.0389" calcext:value-type="float">
            <text:p>1.0389</text:p>
          </table:table-cell>
          <table:table-cell office:value-type="float" office:value="62.33" calcext:value-type="float">
            <text:p>62.33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78]-[.F578]" office:value-type="float" office:value="0.670000000000002" calcext:value-type="float">
            <text:p>0.670000000000002</text:p>
          </table:table-cell>
          <table:table-cell table:formula="of:=ABS([.J578])" office:value-type="float" office:value="0.670000000000002" calcext:value-type="float">
            <text:p>0.670000000000002</text:p>
          </table:table-cell>
          <table:table-cell table:formula="of:=[.K578]/[.F578]*100" office:value-type="float" office:value="1.07492379271619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82" calcext:value-type="float">
            <text:p>82</text:p>
          </table:table-cell>
          <table:table-cell office:value-type="float" office:value="405" calcext:value-type="float">
            <text:p>405</text:p>
          </table:table-cell>
          <table:table-cell office:value-type="float" office:value="425" calcext:value-type="float">
            <text:p>425</text:p>
          </table:table-cell>
          <table:table-cell office:value-type="float" office:value="1.0447" calcext:value-type="float">
            <text:p>1.0447</text:p>
          </table:table-cell>
          <table:table-cell office:value-type="float" office:value="62.68" calcext:value-type="float">
            <text:p>62.68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79]-[.F579]" office:value-type="float" office:value="0.32" calcext:value-type="float">
            <text:p>0.32</text:p>
          </table:table-cell>
          <table:table-cell table:formula="of:=ABS([.J579])" office:value-type="float" office:value="0.32" calcext:value-type="float">
            <text:p>0.32</text:p>
          </table:table-cell>
          <table:table-cell table:formula="of:=[.K579]/[.F579]*100" office:value-type="float" office:value="0.510529674537333" calcext:value-type="float">
            <text:p>0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83" calcext:value-type="float">
            <text:p>83</text:p>
          </table:table-cell>
          <table:table-cell office:value-type="float" office:value="410" calcext:value-type="float">
            <text:p>410</text:p>
          </table:table-cell>
          <table:table-cell office:value-type="float" office:value="430" calcext:value-type="float">
            <text:p>430</text:p>
          </table:table-cell>
          <table:table-cell office:value-type="float" office:value="1.0554" calcext:value-type="float">
            <text:p>1.0554</text:p>
          </table:table-cell>
          <table:table-cell office:value-type="float" office:value="63.33" calcext:value-type="float">
            <text:p>63.33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80]-[.F580]" office:value-type="float" office:value="-0.329999999999998" calcext:value-type="float">
            <text:p>-0.329999999999998</text:p>
          </table:table-cell>
          <table:table-cell table:formula="of:=ABS([.J580])" office:value-type="float" office:value="0.329999999999998" calcext:value-type="float">
            <text:p>0.329999999999998</text:p>
          </table:table-cell>
          <table:table-cell table:formula="of:=[.K580]/[.F580]*100" office:value-type="float" office:value="0.521080056845094" calcext:value-type="float">
            <text:p>0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7</text:p>
          </table:table-cell>
          <table:table-cell office:value-type="float" office:value="84" calcext:value-type="float">
            <text:p>84</text:p>
          </table:table-cell>
          <table:table-cell office:value-type="float" office:value="415" calcext:value-type="float">
            <text:p>415</text:p>
          </table:table-cell>
          <table:table-cell office:value-type="float" office:value="435" calcext:value-type="float">
            <text:p>435</text:p>
          </table:table-cell>
          <table:table-cell office:value-type="float" office:value="1.054" calcext:value-type="float">
            <text:p>1.054</text:p>
          </table:table-cell>
          <table:table-cell office:value-type="float" office:value="63.24" calcext:value-type="float">
            <text:p>63.24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581]-[.F581]" office:value-type="float" office:value="-0.240000000000002" calcext:value-type="float">
            <text:p>-0.240000000000002</text:p>
          </table:table-cell>
          <table:table-cell table:formula="of:=ABS([.J581])" office:value-type="float" office:value="0.240000000000002" calcext:value-type="float">
            <text:p>0.240000000000002</text:p>
          </table:table-cell>
          <table:table-cell table:formula="of:=[.K581]/[.F581]*100" office:value-type="float" office:value="0.379506641366227" calcext:value-type="float">
            <text:p>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2173" calcext:value-type="float">
            <text:p>1.2173</text:p>
          </table:table-cell>
          <table:table-cell office:value-type="float" office:value="73.04" calcext:value-type="float">
            <text:p>73.04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[.H582]-[.F582]" office:value-type="float" office:value="-4.04000000000001" calcext:value-type="float">
            <text:p>-4.04000000000001</text:p>
          </table:table-cell>
          <table:table-cell table:formula="of:=ABS([.J582])" office:value-type="float" office:value="4.04000000000001" calcext:value-type="float">
            <text:p>4.04000000000001</text:p>
          </table:table-cell>
          <table:table-cell table:formula="of:=[.K582]/[.F582]*100" office:value-type="float" office:value="5.53121577217964" calcext:value-type="float">
            <text:p>5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1924" calcext:value-type="float">
            <text:p>1.1924</text:p>
          </table:table-cell>
          <table:table-cell office:value-type="float" office:value="71.54" calcext:value-type="float">
            <text:p>71.54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583]-[.F583]" office:value-type="float" office:value="-2.54000000000001" calcext:value-type="float">
            <text:p>-2.54000000000001</text:p>
          </table:table-cell>
          <table:table-cell table:formula="of:=ABS([.J583])" office:value-type="float" office:value="2.54000000000001" calcext:value-type="float">
            <text:p>2.54000000000001</text:p>
          </table:table-cell>
          <table:table-cell table:formula="of:=[.K583]/[.F583]*100" office:value-type="float" office:value="3.55046128040258" calcext:value-type="float">
            <text:p>3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1907" calcext:value-type="float">
            <text:p>1.1907</text:p>
          </table:table-cell>
          <table:table-cell office:value-type="float" office:value="71.44" calcext:value-type="float">
            <text:p>71.44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formula="of:=[.H584]-[.F584]" office:value-type="float" office:value="0.560000000000002" calcext:value-type="float">
            <text:p>0.560000000000002</text:p>
          </table:table-cell>
          <table:table-cell table:formula="of:=ABS([.J584])" office:value-type="float" office:value="0.560000000000002" calcext:value-type="float">
            <text:p>0.560000000000002</text:p>
          </table:table-cell>
          <table:table-cell table:formula="of:=[.K584]/[.F584]*100" office:value-type="float" office:value="0.783874580067192" calcext:value-type="float">
            <text:p>0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193" calcext:value-type="float">
            <text:p>1.193</text:p>
          </table:table-cell>
          <table:table-cell office:value-type="float" office:value="71.58" calcext:value-type="float">
            <text:p>71.5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585]-[.F585]" office:value-type="float" office:value="0.420000000000002" calcext:value-type="float">
            <text:p>0.420000000000002</text:p>
          </table:table-cell>
          <table:table-cell table:formula="of:=ABS([.J585])" office:value-type="float" office:value="0.420000000000002" calcext:value-type="float">
            <text:p>0.420000000000002</text:p>
          </table:table-cell>
          <table:table-cell table:formula="of:=[.K585]/[.F585]*100" office:value-type="float" office:value="0.586756077116516" calcext:value-type="float">
            <text:p>0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.2076" calcext:value-type="float">
            <text:p>1.2076</text:p>
          </table:table-cell>
          <table:table-cell office:value-type="float" office:value="72.45" calcext:value-type="float">
            <text:p>72.45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table:formula="of:=[.H586]-[.F586]" office:value-type="float" office:value="-0.450000000000003" calcext:value-type="float">
            <text:p>-0.450000000000003</text:p>
          </table:table-cell>
          <table:table-cell table:formula="of:=ABS([.J586])" office:value-type="float" office:value="0.450000000000003" calcext:value-type="float">
            <text:p>0.450000000000003</text:p>
          </table:table-cell>
          <table:table-cell table:formula="of:=[.K586]/[.F586]*100" office:value-type="float" office:value="0.621118012422364" calcext:value-type="float">
            <text:p>0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202" calcext:value-type="float">
            <text:p>1.202</text:p>
          </table:table-cell>
          <table:table-cell office:value-type="float" office:value="72.12" calcext:value-type="float">
            <text:p>72.12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[.H587]-[.F587]" office:value-type="float" office:value="-0.120000000000005" calcext:value-type="float">
            <text:p>-0.120000000000005</text:p>
          </table:table-cell>
          <table:table-cell table:formula="of:=ABS([.J587])" office:value-type="float" office:value="0.120000000000005" calcext:value-type="float">
            <text:p>0.120000000000005</text:p>
          </table:table-cell>
          <table:table-cell table:formula="of:=[.K587]/[.F587]*100" office:value-type="float" office:value="0.166389351081537" calcext:value-type="float">
            <text:p>0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206" calcext:value-type="float">
            <text:p>1.206</text:p>
          </table:table-cell>
          <table:table-cell office:value-type="float" office:value="72.36" calcext:value-type="float">
            <text:p>72.3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588]-[.F588]" office:value-type="float" office:value="-0.359999999999999" calcext:value-type="float">
            <text:p>-0.359999999999999</text:p>
          </table:table-cell>
          <table:table-cell table:formula="of:=ABS([.J588])" office:value-type="float" office:value="0.359999999999999" calcext:value-type="float">
            <text:p>0.359999999999999</text:p>
          </table:table-cell>
          <table:table-cell table:formula="of:=[.K588]/[.F588]*100" office:value-type="float" office:value="0.497512437810945" calcext:value-type="float">
            <text:p>0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.2123" calcext:value-type="float">
            <text:p>1.2123</text:p>
          </table:table-cell>
          <table:table-cell office:value-type="float" office:value="72.74" calcext:value-type="float">
            <text:p>72.74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formula="of:=[.H589]-[.F589]" office:value-type="float" office:value="-0.739999999999995" calcext:value-type="float">
            <text:p>-0.739999999999995</text:p>
          </table:table-cell>
          <table:table-cell table:formula="of:=ABS([.J589])" office:value-type="float" office:value="0.739999999999995" calcext:value-type="float">
            <text:p>0.739999999999995</text:p>
          </table:table-cell>
          <table:table-cell table:formula="of:=[.K589]/[.F589]*100" office:value-type="float" office:value="1.01732196865548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.2297" calcext:value-type="float">
            <text:p>1.2297</text:p>
          </table:table-cell>
          <table:table-cell office:value-type="float" office:value="73.78" calcext:value-type="float">
            <text:p>73.78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[.H590]-[.F590]" office:value-type="float" office:value="-4.78" calcext:value-type="float">
            <text:p>-4.78</text:p>
          </table:table-cell>
          <table:table-cell table:formula="of:=ABS([.J590])" office:value-type="float" office:value="4.78" calcext:value-type="float">
            <text:p>4.78</text:p>
          </table:table-cell>
          <table:table-cell table:formula="of:=[.K590]/[.F590]*100" office:value-type="float" office:value="6.47872052046625" calcext:value-type="float">
            <text:p>6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.2388" calcext:value-type="float">
            <text:p>1.2388</text:p>
          </table:table-cell>
          <table:table-cell office:value-type="float" office:value="74.33" calcext:value-type="float">
            <text:p>74.33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591]-[.F591]" office:value-type="float" office:value="-5.33" calcext:value-type="float">
            <text:p>-5.33</text:p>
          </table:table-cell>
          <table:table-cell table:formula="of:=ABS([.J591])" office:value-type="float" office:value="5.33" calcext:value-type="float">
            <text:p>5.33</text:p>
          </table:table-cell>
          <table:table-cell table:formula="of:=[.K591]/[.F591]*100" office:value-type="float" office:value="7.17072514462532" calcext:value-type="float">
            <text:p>7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245" calcext:value-type="float">
            <text:p>1.245</text:p>
          </table:table-cell>
          <table:table-cell office:value-type="float" office:value="74.7" calcext:value-type="float">
            <text:p>74.7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formula="of:=[.H592]-[.F592]" office:value-type="float" office:value="-2.7" calcext:value-type="float">
            <text:p>-2.7</text:p>
          </table:table-cell>
          <table:table-cell table:formula="of:=ABS([.J592])" office:value-type="float" office:value="2.7" calcext:value-type="float">
            <text:p>2.7</text:p>
          </table:table-cell>
          <table:table-cell table:formula="of:=[.K592]/[.F592]*100" office:value-type="float" office:value="3.61445783132531" calcext:value-type="float">
            <text:p>3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.2475" calcext:value-type="float">
            <text:p>1.2475</text:p>
          </table:table-cell>
          <table:table-cell office:value-type="float" office:value="74.85" calcext:value-type="float">
            <text:p>74.8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593]-[.F593]" office:value-type="float" office:value="0.150000000000006" calcext:value-type="float">
            <text:p>0.150000000000006</text:p>
          </table:table-cell>
          <table:table-cell table:formula="of:=ABS([.J593])" office:value-type="float" office:value="0.150000000000006" calcext:value-type="float">
            <text:p>0.150000000000006</text:p>
          </table:table-cell>
          <table:table-cell table:formula="of:=[.K593]/[.F593]*100" office:value-type="float" office:value="0.200400801603214" calcext:value-type="float">
            <text:p>0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2355" calcext:value-type="float">
            <text:p>1.2355</text:p>
          </table:table-cell>
          <table:table-cell office:value-type="float" office:value="74.13" calcext:value-type="float">
            <text:p>74.1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594]-[.F594]" office:value-type="float" office:value="0.870000000000005" calcext:value-type="float">
            <text:p>0.870000000000005</text:p>
          </table:table-cell>
          <table:table-cell table:formula="of:=ABS([.J594])" office:value-type="float" office:value="0.870000000000005" calcext:value-type="float">
            <text:p>0.870000000000005</text:p>
          </table:table-cell>
          <table:table-cell table:formula="of:=[.K594]/[.F594]*100" office:value-type="float" office:value="1.17361392148928" calcext:value-type="float">
            <text:p>1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.2271" calcext:value-type="float">
            <text:p>1.2271</text:p>
          </table:table-cell>
          <table:table-cell office:value-type="float" office:value="73.63" calcext:value-type="float">
            <text:p>73.63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table:formula="of:=[.H595]-[.F595]" office:value-type="float" office:value="1.37" calcext:value-type="float">
            <text:p>1.37</text:p>
          </table:table-cell>
          <table:table-cell table:formula="of:=ABS([.J595])" office:value-type="float" office:value="1.37" calcext:value-type="float">
            <text:p>1.37</text:p>
          </table:table-cell>
          <table:table-cell table:formula="of:=[.K595]/[.F595]*100" office:value-type="float" office:value="1.86065462447373" calcext:value-type="float">
            <text:p>1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.2378" calcext:value-type="float">
            <text:p>1.2378</text:p>
          </table:table-cell>
          <table:table-cell office:value-type="float" office:value="74.27" calcext:value-type="float">
            <text:p>74.27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596]-[.F596]" office:value-type="float" office:value="0.730000000000004" calcext:value-type="float">
            <text:p>0.730000000000004</text:p>
          </table:table-cell>
          <table:table-cell table:formula="of:=ABS([.J596])" office:value-type="float" office:value="0.730000000000004" calcext:value-type="float">
            <text:p>0.730000000000004</text:p>
          </table:table-cell>
          <table:table-cell table:formula="of:=[.K596]/[.F596]*100" office:value-type="float" office:value="0.982900228894579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.235" calcext:value-type="float">
            <text:p>1.235</text:p>
          </table:table-cell>
          <table:table-cell office:value-type="float" office:value="74.1" calcext:value-type="float">
            <text:p>74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597]-[.F597]" office:value-type="float" office:value="0.900000000000006" calcext:value-type="float">
            <text:p>0.900000000000006</text:p>
          </table:table-cell>
          <table:table-cell table:formula="of:=ABS([.J597])" office:value-type="float" office:value="0.900000000000006" calcext:value-type="float">
            <text:p>0.900000000000006</text:p>
          </table:table-cell>
          <table:table-cell table:formula="of:=[.K597]/[.F597]*100" office:value-type="float" office:value="1.21457489878543" calcext:value-type="float">
            <text:p>1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2275" calcext:value-type="float">
            <text:p>1.2275</text:p>
          </table:table-cell>
          <table:table-cell office:value-type="float" office:value="73.65" calcext:value-type="float">
            <text:p>73.6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598]-[.F598]" office:value-type="float" office:value="1.34999999999999" calcext:value-type="float">
            <text:p>1.34999999999999</text:p>
          </table:table-cell>
          <table:table-cell table:formula="of:=ABS([.J598])" office:value-type="float" office:value="1.34999999999999" calcext:value-type="float">
            <text:p>1.34999999999999</text:p>
          </table:table-cell>
          <table:table-cell table:formula="of:=[.K598]/[.F598]*100" office:value-type="float" office:value="1.83299389002036" calcext:value-type="float">
            <text:p>1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.2356" calcext:value-type="float">
            <text:p>1.2356</text:p>
          </table:table-cell>
          <table:table-cell office:value-type="float" office:value="74.14" calcext:value-type="float">
            <text:p>74.14</text:p>
          </table:table-cell>
          <table:table-cell office:value-type="float" office:value="1.6" calcext:value-type="float">
            <text:p>1.6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formula="of:=[.H599]-[.F599]" office:value-type="float" office:value="21.86" calcext:value-type="float">
            <text:p>21.86</text:p>
          </table:table-cell>
          <table:table-cell table:formula="of:=ABS([.J599])" office:value-type="float" office:value="21.86" calcext:value-type="float">
            <text:p>21.86</text:p>
          </table:table-cell>
          <table:table-cell table:formula="of:=[.K599]/[.F599]*100" office:value-type="float" office:value="29.4847585648773" calcext:value-type="float">
            <text:p>29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.2622" calcext:value-type="float">
            <text:p>1.2622</text:p>
          </table:table-cell>
          <table:table-cell office:value-type="float" office:value="75.73" calcext:value-type="float">
            <text:p>75.73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[.H600]-[.F600]" office:value-type="float" office:value="20.27" calcext:value-type="float">
            <text:p>20.27</text:p>
          </table:table-cell>
          <table:table-cell table:formula="of:=ABS([.J600])" office:value-type="float" office:value="20.27" calcext:value-type="float">
            <text:p>20.27</text:p>
          </table:table-cell>
          <table:table-cell table:formula="of:=[.K600]/[.F600]*100" office:value-type="float" office:value="26.7661428760069" calcext:value-type="float">
            <text:p>26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.2896" calcext:value-type="float">
            <text:p>1.2896</text:p>
          </table:table-cell>
          <table:table-cell office:value-type="float" office:value="77.37" calcext:value-type="float">
            <text:p>77.37</text:p>
          </table:table-cell>
          <table:table-cell office:value-type="float" office:value="1.6" calcext:value-type="float">
            <text:p>1.6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formula="of:=[.H601]-[.F601]" office:value-type="float" office:value="18.63" calcext:value-type="float">
            <text:p>18.63</text:p>
          </table:table-cell>
          <table:table-cell table:formula="of:=ABS([.J601])" office:value-type="float" office:value="18.63" calcext:value-type="float">
            <text:p>18.63</text:p>
          </table:table-cell>
          <table:table-cell table:formula="of:=[.K601]/[.F601]*100" office:value-type="float" office:value="24.0791004265219" calcext:value-type="float">
            <text:p>24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.3028" calcext:value-type="float">
            <text:p>1.3028</text:p>
          </table:table-cell>
          <table:table-cell office:value-type="float" office:value="78.17" calcext:value-type="float">
            <text:p>78.17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02]-[.F602]" office:value-type="float" office:value="-3.17" calcext:value-type="float">
            <text:p>-3.17</text:p>
          </table:table-cell>
          <table:table-cell table:formula="of:=ABS([.J602])" office:value-type="float" office:value="3.17" calcext:value-type="float">
            <text:p>3.17</text:p>
          </table:table-cell>
          <table:table-cell table:formula="of:=[.K602]/[.F602]*100" office:value-type="float" office:value="4.05526416783933" calcext:value-type="float">
            <text:p>4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.3044" calcext:value-type="float">
            <text:p>1.3044</text:p>
          </table:table-cell>
          <table:table-cell office:value-type="float" office:value="78.26" calcext:value-type="float">
            <text:p>78.26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formula="of:=[.H603]-[.F603]" office:value-type="float" office:value="-9.26000000000001" calcext:value-type="float">
            <text:p>-9.26000000000001</text:p>
          </table:table-cell>
          <table:table-cell table:formula="of:=ABS([.J603])" office:value-type="float" office:value="9.26000000000001" calcext:value-type="float">
            <text:p>9.26000000000001</text:p>
          </table:table-cell>
          <table:table-cell table:formula="of:=[.K603]/[.F603]*100" office:value-type="float" office:value="11.8323536928188" calcext:value-type="float">
            <text:p>11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.2616" calcext:value-type="float">
            <text:p>1.2616</text:p>
          </table:table-cell>
          <table:table-cell office:value-type="float" office:value="75.7" calcext:value-type="float">
            <text:p>75.7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formula="of:=[.H604]-[.F604]" office:value-type="float" office:value="-6.7" calcext:value-type="float">
            <text:p>-6.7</text:p>
          </table:table-cell>
          <table:table-cell table:formula="of:=ABS([.J604])" office:value-type="float" office:value="6.7" calcext:value-type="float">
            <text:p>6.7</text:p>
          </table:table-cell>
          <table:table-cell table:formula="of:=[.K604]/[.F604]*100" office:value-type="float" office:value="8.85072655217966" calcext:value-type="float">
            <text:p>8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.2502" calcext:value-type="float">
            <text:p>1.2502</text:p>
          </table:table-cell>
          <table:table-cell office:value-type="float" office:value="75.01" calcext:value-type="float">
            <text:p>75.01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605]-[.F605]" office:value-type="float" office:value="-6.01000000000001" calcext:value-type="float">
            <text:p>-6.01000000000001</text:p>
          </table:table-cell>
          <table:table-cell table:formula="of:=ABS([.J605])" office:value-type="float" office:value="6.01000000000001" calcext:value-type="float">
            <text:p>6.01000000000001</text:p>
          </table:table-cell>
          <table:table-cell table:formula="of:=[.K605]/[.F605]*100" office:value-type="float" office:value="8.01226503132916" calcext:value-type="float">
            <text:p>8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.248" calcext:value-type="float">
            <text:p>1.248</text:p>
          </table:table-cell>
          <table:table-cell office:value-type="float" office:value="74.88" calcext:value-type="float">
            <text:p>74.88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606]-[.F606]" office:value-type="float" office:value="-5.88" calcext:value-type="float">
            <text:p>-5.88</text:p>
          </table:table-cell>
          <table:table-cell table:formula="of:=ABS([.J606])" office:value-type="float" office:value="5.88" calcext:value-type="float">
            <text:p>5.88</text:p>
          </table:table-cell>
          <table:table-cell table:formula="of:=[.K606]/[.F606]*100" office:value-type="float" office:value="7.8525641025641" calcext:value-type="float">
            <text:p>7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.2458" calcext:value-type="float">
            <text:p>1.2458</text:p>
          </table:table-cell>
          <table:table-cell office:value-type="float" office:value="74.75" calcext:value-type="float">
            <text:p>74.7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07]-[.F607]" office:value-type="float" office:value="0.25" calcext:value-type="float">
            <text:p>0.25</text:p>
          </table:table-cell>
          <table:table-cell table:formula="of:=ABS([.J607])" office:value-type="float" office:value="0.25" calcext:value-type="float">
            <text:p>0.25</text:p>
          </table:table-cell>
          <table:table-cell table:formula="of:=[.K607]/[.F607]*100" office:value-type="float" office:value="0.334448160535117" calcext:value-type="float">
            <text:p>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.2651" calcext:value-type="float">
            <text:p>1.2651</text:p>
          </table:table-cell>
          <table:table-cell office:value-type="float" office:value="75.91" calcext:value-type="float">
            <text:p>75.9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08]-[.F608]" office:value-type="float" office:value="-0.909999999999997" calcext:value-type="float">
            <text:p>-0.909999999999997</text:p>
          </table:table-cell>
          <table:table-cell table:formula="of:=ABS([.J608])" office:value-type="float" office:value="0.909999999999997" calcext:value-type="float">
            <text:p>0.909999999999997</text:p>
          </table:table-cell>
          <table:table-cell table:formula="of:=[.K608]/[.F608]*100" office:value-type="float" office:value="1.1987880384666" calcext:value-type="float">
            <text:p>1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.2541" calcext:value-type="float">
            <text:p>1.2541</text:p>
          </table:table-cell>
          <table:table-cell office:value-type="float" office:value="75.25" calcext:value-type="float">
            <text:p>75.2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09]-[.F609]" office:value-type="float" office:value="-0.25" calcext:value-type="float">
            <text:p>-0.25</text:p>
          </table:table-cell>
          <table:table-cell table:formula="of:=ABS([.J609])" office:value-type="float" office:value="0.25" calcext:value-type="float">
            <text:p>0.25</text:p>
          </table:table-cell>
          <table:table-cell table:formula="of:=[.K609]/[.F609]*100" office:value-type="float" office:value="0.332225913621262" calcext:value-type="float">
            <text:p>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.2754" calcext:value-type="float">
            <text:p>1.2754</text:p>
          </table:table-cell>
          <table:table-cell office:value-type="float" office:value="76.52" calcext:value-type="float">
            <text:p>76.5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10]-[.F610]" office:value-type="float" office:value="-1.52" calcext:value-type="float">
            <text:p>-1.52</text:p>
          </table:table-cell>
          <table:table-cell table:formula="of:=ABS([.J610])" office:value-type="float" office:value="1.52" calcext:value-type="float">
            <text:p>1.52</text:p>
          </table:table-cell>
          <table:table-cell table:formula="of:=[.K610]/[.F610]*100" office:value-type="float" office:value="1.98640878201777" calcext:value-type="float">
            <text:p>2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.3074" calcext:value-type="float">
            <text:p>1.3074</text:p>
          </table:table-cell>
          <table:table-cell office:value-type="float" office:value="78.44" calcext:value-type="float">
            <text:p>78.44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[.H611]-[.F611]" office:value-type="float" office:value="-3.44" calcext:value-type="float">
            <text:p>-3.44</text:p>
          </table:table-cell>
          <table:table-cell table:formula="of:=ABS([.J611])" office:value-type="float" office:value="3.44" calcext:value-type="float">
            <text:p>3.44</text:p>
          </table:table-cell>
          <table:table-cell table:formula="of:=[.K611]/[.F611]*100" office:value-type="float" office:value="4.38551759306476" calcext:value-type="float">
            <text:p>4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.3087" calcext:value-type="float">
            <text:p>1.3087</text:p>
          </table:table-cell>
          <table:table-cell office:value-type="float" office:value="78.52" calcext:value-type="float">
            <text:p>78.52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[.H612]-[.F612]" office:value-type="float" office:value="-3.52" calcext:value-type="float">
            <text:p>-3.52</text:p>
          </table:table-cell>
          <table:table-cell table:formula="of:=ABS([.J612])" office:value-type="float" office:value="3.52" calcext:value-type="float">
            <text:p>3.52</text:p>
          </table:table-cell>
          <table:table-cell table:formula="of:=[.K612]/[.F612]*100" office:value-type="float" office:value="4.48293428425878" calcext:value-type="float">
            <text:p>4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.3345" calcext:value-type="float">
            <text:p>1.3345</text:p>
          </table:table-cell>
          <table:table-cell office:value-type="float" office:value="80.07" calcext:value-type="float">
            <text:p>80.07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613]-[.F613]" office:value-type="float" office:value="-17.07" calcext:value-type="float">
            <text:p>-17.07</text:p>
          </table:table-cell>
          <table:table-cell table:formula="of:=ABS([.J613])" office:value-type="float" office:value="17.07" calcext:value-type="float">
            <text:p>17.07</text:p>
          </table:table-cell>
          <table:table-cell table:formula="of:=[.K613]/[.F613]*100" office:value-type="float" office:value="21.3188460097415" calcext:value-type="float">
            <text:p>2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.3204" calcext:value-type="float">
            <text:p>1.3204</text:p>
          </table:table-cell>
          <table:table-cell office:value-type="float" office:value="79.22" calcext:value-type="float">
            <text:p>79.2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614]-[.F614]" office:value-type="float" office:value="-16.22" calcext:value-type="float">
            <text:p>-16.22</text:p>
          </table:table-cell>
          <table:table-cell table:formula="of:=ABS([.J614])" office:value-type="float" office:value="16.22" calcext:value-type="float">
            <text:p>16.22</text:p>
          </table:table-cell>
          <table:table-cell table:formula="of:=[.K614]/[.F614]*100" office:value-type="float" office:value="20.4746276192881" calcext:value-type="float">
            <text:p>20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.3062" calcext:value-type="float">
            <text:p>1.3062</text:p>
          </table:table-cell>
          <table:table-cell office:value-type="float" office:value="78.37" calcext:value-type="float">
            <text:p>78.37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H615]-[.F615]" office:value-type="float" office:value="-15.37" calcext:value-type="float">
            <text:p>-15.37</text:p>
          </table:table-cell>
          <table:table-cell table:formula="of:=ABS([.J615])" office:value-type="float" office:value="15.37" calcext:value-type="float">
            <text:p>15.37</text:p>
          </table:table-cell>
          <table:table-cell table:formula="of:=[.K615]/[.F615]*100" office:value-type="float" office:value="19.6120964654842" calcext:value-type="float">
            <text:p>19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.3028" calcext:value-type="float">
            <text:p>1.3028</text:p>
          </table:table-cell>
          <table:table-cell office:value-type="float" office:value="78.17" calcext:value-type="float">
            <text:p>78.1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H616]-[.F616]" office:value-type="float" office:value="11.83" calcext:value-type="float">
            <text:p>11.83</text:p>
          </table:table-cell>
          <table:table-cell table:formula="of:=ABS([.J616])" office:value-type="float" office:value="11.83" calcext:value-type="float">
            <text:p>11.83</text:p>
          </table:table-cell>
          <table:table-cell table:formula="of:=[.K616]/[.F616]*100" office:value-type="float" office:value="15.1336829985928" calcext:value-type="float">
            <text:p>15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.2967" calcext:value-type="float">
            <text:p>1.2967</text:p>
          </table:table-cell>
          <table:table-cell office:value-type="float" office:value="77.8" calcext:value-type="float">
            <text:p>77.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H617]-[.F617]" office:value-type="float" office:value="12.2" calcext:value-type="float">
            <text:p>12.2</text:p>
          </table:table-cell>
          <table:table-cell table:formula="of:=ABS([.J617])" office:value-type="float" office:value="12.2" calcext:value-type="float">
            <text:p>12.2</text:p>
          </table:table-cell>
          <table:table-cell table:formula="of:=[.K617]/[.F617]*100" office:value-type="float" office:value="15.681233933162" calcext:value-type="float">
            <text:p>15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.303" calcext:value-type="float">
            <text:p>1.303</text:p>
          </table:table-cell>
          <table:table-cell office:value-type="float" office:value="78.18" calcext:value-type="float">
            <text:p>78.1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H618]-[.F618]" office:value-type="float" office:value="11.82" calcext:value-type="float">
            <text:p>11.82</text:p>
          </table:table-cell>
          <table:table-cell table:formula="of:=ABS([.J618])" office:value-type="float" office:value="11.82" calcext:value-type="float">
            <text:p>11.82</text:p>
          </table:table-cell>
          <table:table-cell table:formula="of:=[.K618]/[.F618]*100" office:value-type="float" office:value="15.1189562547966" calcext:value-type="float">
            <text:p>15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.2821" calcext:value-type="float">
            <text:p>1.2821</text:p>
          </table:table-cell>
          <table:table-cell office:value-type="float" office:value="76.93" calcext:value-type="float">
            <text:p>76.93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619]-[.F619]" office:value-type="float" office:value="1.06999999999999" calcext:value-type="float">
            <text:p>1.06999999999999</text:p>
          </table:table-cell>
          <table:table-cell table:formula="of:=ABS([.J619])" office:value-type="float" office:value="1.06999999999999" calcext:value-type="float">
            <text:p>1.06999999999999</text:p>
          </table:table-cell>
          <table:table-cell table:formula="of:=[.K619]/[.F619]*100" office:value-type="float" office:value="1.39087482126608" calcext:value-type="float">
            <text:p>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.2404" calcext:value-type="float">
            <text:p>1.2404</text:p>
          </table:table-cell>
          <table:table-cell office:value-type="float" office:value="74.43" calcext:value-type="float">
            <text:p>74.4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20]-[.F620]" office:value-type="float" office:value="0.569999999999993" calcext:value-type="float">
            <text:p>0.569999999999993</text:p>
          </table:table-cell>
          <table:table-cell table:formula="of:=ABS([.J620])" office:value-type="float" office:value="0.569999999999993" calcext:value-type="float">
            <text:p>0.569999999999993</text:p>
          </table:table-cell>
          <table:table-cell table:formula="of:=[.K620]/[.F620]*100" office:value-type="float" office:value="0.765820233776694" calcext:value-type="float">
            <text:p>0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.223" calcext:value-type="float">
            <text:p>1.223</text:p>
          </table:table-cell>
          <table:table-cell office:value-type="float" office:value="73.38" calcext:value-type="float">
            <text:p>73.3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621]-[.F621]" office:value-type="float" office:value="-1.38" calcext:value-type="float">
            <text:p>-1.38</text:p>
          </table:table-cell>
          <table:table-cell table:formula="of:=ABS([.J621])" office:value-type="float" office:value="1.38" calcext:value-type="float">
            <text:p>1.38</text:p>
          </table:table-cell>
          <table:table-cell table:formula="of:=[.K621]/[.F621]*100" office:value-type="float" office:value="1.88062142273098" calcext:value-type="float">
            <text:p>1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1.1955" calcext:value-type="float">
            <text:p>1.1955</text:p>
          </table:table-cell>
          <table:table-cell office:value-type="float" office:value="71.73" calcext:value-type="float">
            <text:p>71.7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622]-[.F622]" office:value-type="float" office:value="0.269999999999996" calcext:value-type="float">
            <text:p>0.269999999999996</text:p>
          </table:table-cell>
          <table:table-cell table:formula="of:=ABS([.J622])" office:value-type="float" office:value="0.269999999999996" calcext:value-type="float">
            <text:p>0.269999999999996</text:p>
          </table:table-cell>
          <table:table-cell table:formula="of:=[.K622]/[.F622]*100" office:value-type="float" office:value="0.376411543287322" calcext:value-type="float">
            <text:p>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1.1848" calcext:value-type="float">
            <text:p>1.1848</text:p>
          </table:table-cell>
          <table:table-cell office:value-type="float" office:value="71.09" calcext:value-type="float">
            <text:p>71.09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formula="of:=[.H623]-[.F623]" office:value-type="float" office:value="0.909999999999997" calcext:value-type="float">
            <text:p>0.909999999999997</text:p>
          </table:table-cell>
          <table:table-cell table:formula="of:=ABS([.J623])" office:value-type="float" office:value="0.909999999999997" calcext:value-type="float">
            <text:p>0.909999999999997</text:p>
          </table:table-cell>
          <table:table-cell table:formula="of:=[.K623]/[.F623]*100" office:value-type="float" office:value="1.28006752004501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1.198" calcext:value-type="float">
            <text:p>1.198</text:p>
          </table:table-cell>
          <table:table-cell office:value-type="float" office:value="71.88" calcext:value-type="float">
            <text:p>71.8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624]-[.F624]" office:value-type="float" office:value="9.12000000000001" calcext:value-type="float">
            <text:p>9.12000000000001</text:p>
          </table:table-cell>
          <table:table-cell table:formula="of:=ABS([.J624])" office:value-type="float" office:value="9.12000000000001" calcext:value-type="float">
            <text:p>9.12000000000001</text:p>
          </table:table-cell>
          <table:table-cell table:formula="of:=[.K624]/[.F624]*100" office:value-type="float" office:value="12.6878130217028" calcext:value-type="float">
            <text:p>12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.1856" calcext:value-type="float">
            <text:p>1.1856</text:p>
          </table:table-cell>
          <table:table-cell office:value-type="float" office:value="71.14" calcext:value-type="float">
            <text:p>71.14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formula="of:=[.H625]-[.F625]" office:value-type="float" office:value="9.86" calcext:value-type="float">
            <text:p>9.86</text:p>
          </table:table-cell>
          <table:table-cell table:formula="of:=ABS([.J625])" office:value-type="float" office:value="9.86" calcext:value-type="float">
            <text:p>9.86</text:p>
          </table:table-cell>
          <table:table-cell table:formula="of:=[.K625]/[.F625]*100" office:value-type="float" office:value="13.8599943772842" calcext:value-type="float">
            <text:p>13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1.1834" calcext:value-type="float">
            <text:p>1.1834</text:p>
          </table:table-cell>
          <table:table-cell office:value-type="float" office:value="71.01" calcext:value-type="float">
            <text:p>71.01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table:formula="of:=[.H626]-[.F626]" office:value-type="float" office:value="9.99" calcext:value-type="float">
            <text:p>9.99</text:p>
          </table:table-cell>
          <table:table-cell table:formula="of:=ABS([.J626])" office:value-type="float" office:value="9.99" calcext:value-type="float">
            <text:p>9.99</text:p>
          </table:table-cell>
          <table:table-cell table:formula="of:=[.K626]/[.F626]*100" office:value-type="float" office:value="14.0684410646388" calcext:value-type="float">
            <text:p>14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.1956" calcext:value-type="float">
            <text:p>1.1956</text:p>
          </table:table-cell>
          <table:table-cell office:value-type="float" office:value="71.74" calcext:value-type="float">
            <text:p>71.7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627]-[.F627]" office:value-type="float" office:value="0.260000000000005" calcext:value-type="float">
            <text:p>0.260000000000005</text:p>
          </table:table-cell>
          <table:table-cell table:formula="of:=ABS([.J627])" office:value-type="float" office:value="0.260000000000005" calcext:value-type="float">
            <text:p>0.260000000000005</text:p>
          </table:table-cell>
          <table:table-cell table:formula="of:=[.K627]/[.F627]*100" office:value-type="float" office:value="0.362419849456377" calcext:value-type="float">
            <text:p>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.2137" calcext:value-type="float">
            <text:p>1.2137</text:p>
          </table:table-cell>
          <table:table-cell office:value-type="float" office:value="72.82" calcext:value-type="float">
            <text:p>72.8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628]-[.F628]" office:value-type="float" office:value="-0.819999999999993" calcext:value-type="float">
            <text:p>-0.819999999999993</text:p>
          </table:table-cell>
          <table:table-cell table:formula="of:=ABS([.J628])" office:value-type="float" office:value="0.819999999999993" calcext:value-type="float">
            <text:p>0.819999999999993</text:p>
          </table:table-cell>
          <table:table-cell table:formula="of:=[.K628]/[.F628]*100" office:value-type="float" office:value="1.12606426805822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.2239" calcext:value-type="float">
            <text:p>1.2239</text:p>
          </table:table-cell>
          <table:table-cell office:value-type="float" office:value="73.44" calcext:value-type="float">
            <text:p>73.4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629]-[.F629]" office:value-type="float" office:value="-1.44" calcext:value-type="float">
            <text:p>-1.44</text:p>
          </table:table-cell>
          <table:table-cell table:formula="of:=ABS([.J629])" office:value-type="float" office:value="1.44" calcext:value-type="float">
            <text:p>1.44</text:p>
          </table:table-cell>
          <table:table-cell table:formula="of:=[.K629]/[.F629]*100" office:value-type="float" office:value="1.96078431372549" calcext:value-type="float">
            <text:p>2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1.2286" calcext:value-type="float">
            <text:p>1.2286</text:p>
          </table:table-cell>
          <table:table-cell office:value-type="float" office:value="73.72" calcext:value-type="float">
            <text:p>73.72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[.H630]-[.F630]" office:value-type="float" office:value="-1.72" calcext:value-type="float">
            <text:p>-1.72</text:p>
          </table:table-cell>
          <table:table-cell table:formula="of:=ABS([.J630])" office:value-type="float" office:value="1.72" calcext:value-type="float">
            <text:p>1.72</text:p>
          </table:table-cell>
          <table:table-cell table:formula="of:=[.K630]/[.F630]*100" office:value-type="float" office:value="2.33315246880087" calcext:value-type="float">
            <text:p>2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1.2149" calcext:value-type="float">
            <text:p>1.2149</text:p>
          </table:table-cell>
          <table:table-cell office:value-type="float" office:value="72.9" calcext:value-type="float">
            <text:p>72.9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[.H631]-[.F631]" office:value-type="float" office:value="-0.900000000000006" calcext:value-type="float">
            <text:p>-0.900000000000006</text:p>
          </table:table-cell>
          <table:table-cell table:formula="of:=ABS([.J631])" office:value-type="float" office:value="0.900000000000006" calcext:value-type="float">
            <text:p>0.900000000000006</text:p>
          </table:table-cell>
          <table:table-cell table:formula="of:=[.K631]/[.F631]*100" office:value-type="float" office:value="1.23456790123458" calcext:value-type="float">
            <text:p>1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1.2055" calcext:value-type="float">
            <text:p>1.2055</text:p>
          </table:table-cell>
          <table:table-cell office:value-type="float" office:value="72.33" calcext:value-type="float">
            <text:p>72.33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[.H632]-[.F632]" office:value-type="float" office:value="2.67" calcext:value-type="float">
            <text:p>2.67</text:p>
          </table:table-cell>
          <table:table-cell table:formula="of:=ABS([.J632])" office:value-type="float" office:value="2.67" calcext:value-type="float">
            <text:p>2.67</text:p>
          </table:table-cell>
          <table:table-cell table:formula="of:=[.K632]/[.F632]*100" office:value-type="float" office:value="3.69141435089175" calcext:value-type="float">
            <text:p>3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office:value-type="float" office:value="1.1994" calcext:value-type="float">
            <text:p>1.1994</text:p>
          </table:table-cell>
          <table:table-cell office:value-type="float" office:value="71.96" calcext:value-type="float">
            <text:p>71.96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[.H633]-[.F633]" office:value-type="float" office:value="3.04000000000001" calcext:value-type="float">
            <text:p>3.04000000000001</text:p>
          </table:table-cell>
          <table:table-cell table:formula="of:=ABS([.J633])" office:value-type="float" office:value="3.04000000000001" calcext:value-type="float">
            <text:p>3.04000000000001</text:p>
          </table:table-cell>
          <table:table-cell table:formula="of:=[.K633]/[.F633]*100" office:value-type="float" office:value="4.22456920511396" calcext:value-type="float">
            <text:p>4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1.1911" calcext:value-type="float">
            <text:p>1.1911</text:p>
          </table:table-cell>
          <table:table-cell office:value-type="float" office:value="71.47" calcext:value-type="float">
            <text:p>71.47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[.H634]-[.F634]" office:value-type="float" office:value="0.530000000000001" calcext:value-type="float">
            <text:p>0.530000000000001</text:p>
          </table:table-cell>
          <table:table-cell table:formula="of:=ABS([.J634])" office:value-type="float" office:value="0.530000000000001" calcext:value-type="float">
            <text:p>0.530000000000001</text:p>
          </table:table-cell>
          <table:table-cell table:formula="of:=[.K634]/[.F634]*100" office:value-type="float" office:value="0.741569889464112" calcext:value-type="float">
            <text:p>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1.1966" calcext:value-type="float">
            <text:p>1.1966</text:p>
          </table:table-cell>
          <table:table-cell office:value-type="float" office:value="71.8" calcext:value-type="float">
            <text:p>71.8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[.H635]-[.F635]" office:value-type="float" office:value="0.200000000000003" calcext:value-type="float">
            <text:p>0.200000000000003</text:p>
          </table:table-cell>
          <table:table-cell table:formula="of:=ABS([.J635])" office:value-type="float" office:value="0.200000000000003" calcext:value-type="float">
            <text:p>0.200000000000003</text:p>
          </table:table-cell>
          <table:table-cell table:formula="of:=[.K635]/[.F635]*100" office:value-type="float" office:value="0.27855153203343" calcext:value-type="float">
            <text:p>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1.2113" calcext:value-type="float">
            <text:p>1.2113</text:p>
          </table:table-cell>
          <table:table-cell office:value-type="float" office:value="72.68" calcext:value-type="float">
            <text:p>72.68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[.H636]-[.F636]" office:value-type="float" office:value="2.31999999999999" calcext:value-type="float">
            <text:p>2.31999999999999</text:p>
          </table:table-cell>
          <table:table-cell table:formula="of:=ABS([.J636])" office:value-type="float" office:value="2.31999999999999" calcext:value-type="float">
            <text:p>2.31999999999999</text:p>
          </table:table-cell>
          <table:table-cell table:formula="of:=[.K636]/[.F636]*100" office:value-type="float" office:value="3.19207484865161" calcext:value-type="float">
            <text:p>3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1.2066" calcext:value-type="float">
            <text:p>1.2066</text:p>
          </table:table-cell>
          <table:table-cell office:value-type="float" office:value="72.4" calcext:value-type="float">
            <text:p>72.4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[.H637]-[.F637]" office:value-type="float" office:value="2.59999999999999" calcext:value-type="float">
            <text:p>2.59999999999999</text:p>
          </table:table-cell>
          <table:table-cell table:formula="of:=ABS([.J637])" office:value-type="float" office:value="2.59999999999999" calcext:value-type="float">
            <text:p>2.59999999999999</text:p>
          </table:table-cell>
          <table:table-cell table:formula="of:=[.K637]/[.F637]*100" office:value-type="float" office:value="3.59116022099447" calcext:value-type="float">
            <text:p>3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57" calcext:value-type="float">
            <text:p>57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1.2322" calcext:value-type="float">
            <text:p>1.2322</text:p>
          </table:table-cell>
          <table:table-cell office:value-type="float" office:value="73.93" calcext:value-type="float">
            <text:p>73.9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38]-[.F638]" office:value-type="float" office:value="1.06999999999999" calcext:value-type="float">
            <text:p>1.06999999999999</text:p>
          </table:table-cell>
          <table:table-cell table:formula="of:=ABS([.J638])" office:value-type="float" office:value="1.06999999999999" calcext:value-type="float">
            <text:p>1.06999999999999</text:p>
          </table:table-cell>
          <table:table-cell table:formula="of:=[.K638]/[.F638]*100" office:value-type="float" office:value="1.44731502772892" calcext:value-type="float">
            <text:p>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58" calcext:value-type="float">
            <text:p>58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1.2444" calcext:value-type="float">
            <text:p>1.2444</text:p>
          </table:table-cell>
          <table:table-cell office:value-type="float" office:value="74.67" calcext:value-type="float">
            <text:p>74.67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39]-[.F639]" office:value-type="float" office:value="0.329999999999998" calcext:value-type="float">
            <text:p>0.329999999999998</text:p>
          </table:table-cell>
          <table:table-cell table:formula="of:=ABS([.J639])" office:value-type="float" office:value="0.329999999999998" calcext:value-type="float">
            <text:p>0.329999999999998</text:p>
          </table:table-cell>
          <table:table-cell table:formula="of:=[.K639]/[.F639]*100" office:value-type="float" office:value="0.441944556046603" calcext:value-type="float">
            <text:p>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59" calcext:value-type="float">
            <text:p>59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1.2411" calcext:value-type="float">
            <text:p>1.2411</text:p>
          </table:table-cell>
          <table:table-cell office:value-type="float" office:value="74.46" calcext:value-type="float">
            <text:p>74.46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40]-[.F640]" office:value-type="float" office:value="0.540000000000006" calcext:value-type="float">
            <text:p>0.540000000000006</text:p>
          </table:table-cell>
          <table:table-cell table:formula="of:=ABS([.J640])" office:value-type="float" office:value="0.540000000000006" calcext:value-type="float">
            <text:p>0.540000000000006</text:p>
          </table:table-cell>
          <table:table-cell table:formula="of:=[.K640]/[.F640]*100" office:value-type="float" office:value="0.725221595487519" calcext:value-type="float">
            <text:p>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.2523" calcext:value-type="float">
            <text:p>1.2523</text:p>
          </table:table-cell>
          <table:table-cell office:value-type="float" office:value="75.14" calcext:value-type="float">
            <text:p>75.1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41]-[.F641]" office:value-type="float" office:value="-0.140000000000001" calcext:value-type="float">
            <text:p>-0.140000000000001</text:p>
          </table:table-cell>
          <table:table-cell table:formula="of:=ABS([.J641])" office:value-type="float" office:value="0.140000000000001" calcext:value-type="float">
            <text:p>0.140000000000001</text:p>
          </table:table-cell>
          <table:table-cell table:formula="of:=[.K641]/[.F641]*100" office:value-type="float" office:value="0.186318871439979" calcext:value-type="float">
            <text:p>0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1.2463" calcext:value-type="float">
            <text:p>1.2463</text:p>
          </table:table-cell>
          <table:table-cell office:value-type="float" office:value="74.78" calcext:value-type="float">
            <text:p>74.7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42]-[.F642]" office:value-type="float" office:value="0.219999999999999" calcext:value-type="float">
            <text:p>0.219999999999999</text:p>
          </table:table-cell>
          <table:table-cell table:formula="of:=ABS([.J642])" office:value-type="float" office:value="0.219999999999999" calcext:value-type="float">
            <text:p>0.219999999999999</text:p>
          </table:table-cell>
          <table:table-cell table:formula="of:=[.K642]/[.F642]*100" office:value-type="float" office:value="0.294196309173574" calcext:value-type="float">
            <text:p>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62" calcext:value-type="float">
            <text:p>62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1.2565" calcext:value-type="float">
            <text:p>1.2565</text:p>
          </table:table-cell>
          <table:table-cell office:value-type="float" office:value="75.39" calcext:value-type="float">
            <text:p>75.39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43]-[.F643]" office:value-type="float" office:value="-0.390000000000001" calcext:value-type="float">
            <text:p>-0.390000000000001</text:p>
          </table:table-cell>
          <table:table-cell table:formula="of:=ABS([.J643])" office:value-type="float" office:value="0.390000000000001" calcext:value-type="float">
            <text:p>0.390000000000001</text:p>
          </table:table-cell>
          <table:table-cell table:formula="of:=[.K643]/[.F643]*100" office:value-type="float" office:value="0.517309988062078" calcext:value-type="float">
            <text:p>0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.2766" calcext:value-type="float">
            <text:p>1.2766</text:p>
          </table:table-cell>
          <table:table-cell office:value-type="float" office:value="76.6" calcext:value-type="float">
            <text:p>76.6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44]-[.F644]" office:value-type="float" office:value="-1.59999999999999" calcext:value-type="float">
            <text:p>-1.59999999999999</text:p>
          </table:table-cell>
          <table:table-cell table:formula="of:=ABS([.J644])" office:value-type="float" office:value="1.59999999999999" calcext:value-type="float">
            <text:p>1.59999999999999</text:p>
          </table:table-cell>
          <table:table-cell table:formula="of:=[.K644]/[.F644]*100" office:value-type="float" office:value="2.088772845953" calcext:value-type="float">
            <text:p>2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.2836" calcext:value-type="float">
            <text:p>1.2836</text:p>
          </table:table-cell>
          <table:table-cell office:value-type="float" office:value="77.02" calcext:value-type="float">
            <text:p>77.0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645]-[.F645]" office:value-type="float" office:value="0.980000000000004" calcext:value-type="float">
            <text:p>0.980000000000004</text:p>
          </table:table-cell>
          <table:table-cell table:formula="of:=ABS([.J645])" office:value-type="float" office:value="0.980000000000004" calcext:value-type="float">
            <text:p>0.980000000000004</text:p>
          </table:table-cell>
          <table:table-cell table:formula="of:=[.K645]/[.F645]*100" office:value-type="float" office:value="1.27239678005713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.3014" calcext:value-type="float">
            <text:p>1.3014</text:p>
          </table:table-cell>
          <table:table-cell office:value-type="float" office:value="78.08" calcext:value-type="float">
            <text:p>78.0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646]-[.F646]" office:value-type="float" office:value="-0.0799999999999983" calcext:value-type="float">
            <text:p>-0.0799999999999983</text:p>
          </table:table-cell>
          <table:table-cell table:formula="of:=ABS([.J646])" office:value-type="float" office:value="0.0799999999999983" calcext:value-type="float">
            <text:p>0.0799999999999983</text:p>
          </table:table-cell>
          <table:table-cell table:formula="of:=[.K646]/[.F646]*100" office:value-type="float" office:value="0.10245901639344" calcext:value-type="float">
            <text:p>0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66" calcext:value-type="float">
            <text:p>66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1.2985" calcext:value-type="float">
            <text:p>1.2985</text:p>
          </table:table-cell>
          <table:table-cell office:value-type="float" office:value="77.91" calcext:value-type="float">
            <text:p>77.9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647]-[.F647]" office:value-type="float" office:value="0.0900000000000034" calcext:value-type="float">
            <text:p>0.0900000000000034</text:p>
          </table:table-cell>
          <table:table-cell table:formula="of:=ABS([.J647])" office:value-type="float" office:value="0.0900000000000034" calcext:value-type="float">
            <text:p>0.0900000000000034</text:p>
          </table:table-cell>
          <table:table-cell table:formula="of:=[.K647]/[.F647]*100" office:value-type="float" office:value="0.115517905275322" calcext:value-type="float">
            <text:p>0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1.2926" calcext:value-type="float">
            <text:p>1.2926</text:p>
          </table:table-cell>
          <table:table-cell office:value-type="float" office:value="77.55" calcext:value-type="float">
            <text:p>77.5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648]-[.F648]" office:value-type="float" office:value="0.450000000000003" calcext:value-type="float">
            <text:p>0.450000000000003</text:p>
          </table:table-cell>
          <table:table-cell table:formula="of:=ABS([.J648])" office:value-type="float" office:value="0.450000000000003" calcext:value-type="float">
            <text:p>0.450000000000003</text:p>
          </table:table-cell>
          <table:table-cell table:formula="of:=[.K648]/[.F648]*100" office:value-type="float" office:value="0.580270793036754" calcext:value-type="float">
            <text:p>0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68" calcext:value-type="float">
            <text:p>68</text:p>
          </table:table-cell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office:value-type="float" office:value="1.2827" calcext:value-type="float">
            <text:p>1.2827</text:p>
          </table:table-cell>
          <table:table-cell office:value-type="float" office:value="76.96" calcext:value-type="float">
            <text:p>76.96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649]-[.F649]" office:value-type="float" office:value="1.04000000000001" calcext:value-type="float">
            <text:p>1.04000000000001</text:p>
          </table:table-cell>
          <table:table-cell table:formula="of:=ABS([.J649])" office:value-type="float" office:value="1.04000000000001" calcext:value-type="float">
            <text:p>1.04000000000001</text:p>
          </table:table-cell>
          <table:table-cell table:formula="of:=[.K649]/[.F649]*100" office:value-type="float" office:value="1.35135135135136" calcext:value-type="float">
            <text:p>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1.2795" calcext:value-type="float">
            <text:p>1.2795</text:p>
          </table:table-cell>
          <table:table-cell office:value-type="float" office:value="76.77" calcext:value-type="float">
            <text:p>76.77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formula="of:=[.H650]-[.F650]" office:value-type="float" office:value="1.23" calcext:value-type="float">
            <text:p>1.23</text:p>
          </table:table-cell>
          <table:table-cell table:formula="of:=ABS([.J650])" office:value-type="float" office:value="1.23" calcext:value-type="float">
            <text:p>1.23</text:p>
          </table:table-cell>
          <table:table-cell table:formula="of:=[.K650]/[.F650]*100" office:value-type="float" office:value="1.60218835482611" calcext:value-type="float">
            <text:p>1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1.2939" calcext:value-type="float">
            <text:p>1.2939</text:p>
          </table:table-cell>
          <table:table-cell office:value-type="float" office:value="77.63" calcext:value-type="float">
            <text:p>77.63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formula="of:=[.H651]-[.F651]" office:value-type="float" office:value="0.370000000000005" calcext:value-type="float">
            <text:p>0.370000000000005</text:p>
          </table:table-cell>
          <table:table-cell table:formula="of:=ABS([.J651])" office:value-type="float" office:value="0.370000000000005" calcext:value-type="float">
            <text:p>0.370000000000005</text:p>
          </table:table-cell>
          <table:table-cell table:formula="of:=[.K651]/[.F651]*100" office:value-type="float" office:value="0.476619863454856" calcext:value-type="float">
            <text:p>0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1.2953" calcext:value-type="float">
            <text:p>1.2953</text:p>
          </table:table-cell>
          <table:table-cell office:value-type="float" office:value="77.72" calcext:value-type="float">
            <text:p>77.72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formula="of:=[.H652]-[.F652]" office:value-type="float" office:value="-2.72" calcext:value-type="float">
            <text:p>-2.72</text:p>
          </table:table-cell>
          <table:table-cell table:formula="of:=ABS([.J652])" office:value-type="float" office:value="2.72" calcext:value-type="float">
            <text:p>2.72</text:p>
          </table:table-cell>
          <table:table-cell table:formula="of:=[.K652]/[.F652]*100" office:value-type="float" office:value="3.49974266598044" calcext:value-type="float">
            <text:p>3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1.3223" calcext:value-type="float">
            <text:p>1.3223</text:p>
          </table:table-cell>
          <table:table-cell office:value-type="float" office:value="79.34" calcext:value-type="float">
            <text:p>79.34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formula="of:=[.H653]-[.F653]" office:value-type="float" office:value="1.66" calcext:value-type="float">
            <text:p>1.66</text:p>
          </table:table-cell>
          <table:table-cell table:formula="of:=ABS([.J653])" office:value-type="float" office:value="1.66" calcext:value-type="float">
            <text:p>1.66</text:p>
          </table:table-cell>
          <table:table-cell table:formula="of:=[.K653]/[.F653]*100" office:value-type="float" office:value="2.09226115452483" calcext:value-type="float">
            <text:p>2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1.327" calcext:value-type="float">
            <text:p>1.327</text:p>
          </table:table-cell>
          <table:table-cell office:value-type="float" office:value="79.62" calcext:value-type="float">
            <text:p>79.62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table:formula="of:=[.H654]-[.F654]" office:value-type="float" office:value="1.38" calcext:value-type="float">
            <text:p>1.38</text:p>
          </table:table-cell>
          <table:table-cell table:formula="of:=ABS([.J654])" office:value-type="float" office:value="1.38" calcext:value-type="float">
            <text:p>1.38</text:p>
          </table:table-cell>
          <table:table-cell table:formula="of:=[.K654]/[.F654]*100" office:value-type="float" office:value="1.73323285606631" calcext:value-type="float">
            <text:p>1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1.3303" calcext:value-type="float">
            <text:p>1.3303</text:p>
          </table:table-cell>
          <table:table-cell office:value-type="float" office:value="79.82" calcext:value-type="float">
            <text:p>79.82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[.H655]-[.F655]" office:value-type="float" office:value="-1.81999999999999" calcext:value-type="float">
            <text:p>-1.81999999999999</text:p>
          </table:table-cell>
          <table:table-cell table:formula="of:=ABS([.J655])" office:value-type="float" office:value="1.81999999999999" calcext:value-type="float">
            <text:p>1.81999999999999</text:p>
          </table:table-cell>
          <table:table-cell table:formula="of:=[.K655]/[.F655]*100" office:value-type="float" office:value="2.2801302931596" calcext:value-type="float">
            <text:p>2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.321" calcext:value-type="float">
            <text:p>1.321</text:p>
          </table:table-cell>
          <table:table-cell office:value-type="float" office:value="79.26" calcext:value-type="float">
            <text:p>79.26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[.H656]-[.F656]" office:value-type="float" office:value="-1.26000000000001" calcext:value-type="float">
            <text:p>-1.26000000000001</text:p>
          </table:table-cell>
          <table:table-cell table:formula="of:=ABS([.J656])" office:value-type="float" office:value="1.26000000000001" calcext:value-type="float">
            <text:p>1.26000000000001</text:p>
          </table:table-cell>
          <table:table-cell table:formula="of:=[.K656]/[.F656]*100" office:value-type="float" office:value="1.58970476911431" calcext:value-type="float">
            <text:p>1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76" calcext:value-type="float">
            <text:p>76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1.294" calcext:value-type="float">
            <text:p>1.294</text:p>
          </table:table-cell>
          <table:table-cell office:value-type="float" office:value="77.64" calcext:value-type="float">
            <text:p>77.6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657]-[.F657]" office:value-type="float" office:value="0.359999999999999" calcext:value-type="float">
            <text:p>0.359999999999999</text:p>
          </table:table-cell>
          <table:table-cell table:formula="of:=ABS([.J657])" office:value-type="float" office:value="0.359999999999999" calcext:value-type="float">
            <text:p>0.359999999999999</text:p>
          </table:table-cell>
          <table:table-cell table:formula="of:=[.K657]/[.F657]*100" office:value-type="float" office:value="0.463678516228747" calcext:value-type="float">
            <text:p>0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77" calcext:value-type="float">
            <text:p>7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1.2749" calcext:value-type="float">
            <text:p>1.2749</text:p>
          </table:table-cell>
          <table:table-cell office:value-type="float" office:value="76.49" calcext:value-type="float">
            <text:p>76.49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58]-[.F658]" office:value-type="float" office:value="-1.48999999999999" calcext:value-type="float">
            <text:p>-1.48999999999999</text:p>
          </table:table-cell>
          <table:table-cell table:formula="of:=ABS([.J658])" office:value-type="float" office:value="1.48999999999999" calcext:value-type="float">
            <text:p>1.48999999999999</text:p>
          </table:table-cell>
          <table:table-cell table:formula="of:=[.K658]/[.F658]*100" office:value-type="float" office:value="1.94796705451692" calcext:value-type="float">
            <text:p>1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1.2608" calcext:value-type="float">
            <text:p>1.2608</text:p>
          </table:table-cell>
          <table:table-cell office:value-type="float" office:value="75.65" calcext:value-type="float">
            <text:p>75.6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59]-[.F659]" office:value-type="float" office:value="-0.650000000000006" calcext:value-type="float">
            <text:p>-0.650000000000006</text:p>
          </table:table-cell>
          <table:table-cell table:formula="of:=ABS([.J659])" office:value-type="float" office:value="0.650000000000006" calcext:value-type="float">
            <text:p>0.650000000000006</text:p>
          </table:table-cell>
          <table:table-cell table:formula="of:=[.K659]/[.F659]*100" office:value-type="float" office:value="0.859220092531402" calcext:value-type="float">
            <text:p>0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79" calcext:value-type="float">
            <text:p>79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1.2532" calcext:value-type="float">
            <text:p>1.2532</text:p>
          </table:table-cell>
          <table:table-cell office:value-type="float" office:value="75.19" calcext:value-type="float">
            <text:p>75.19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60]-[.F660]" office:value-type="float" office:value="-0.189999999999998" calcext:value-type="float">
            <text:p>-0.189999999999998</text:p>
          </table:table-cell>
          <table:table-cell table:formula="of:=ABS([.J660])" office:value-type="float" office:value="0.189999999999998" calcext:value-type="float">
            <text:p>0.189999999999998</text:p>
          </table:table-cell>
          <table:table-cell table:formula="of:=[.K660]/[.F660]*100" office:value-type="float" office:value="0.25269317728421" calcext:value-type="float">
            <text:p>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415" calcext:value-type="float">
            <text:p>415</text:p>
          </table:table-cell>
          <table:table-cell office:value-type="float" office:value="1.26" calcext:value-type="float">
            <text:p>1.26</text:p>
          </table:table-cell>
          <table:table-cell office:value-type="float" office:value="75.6" calcext:value-type="float">
            <text:p>75.6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61]-[.F661]" office:value-type="float" office:value="-0.599999999999994" calcext:value-type="float">
            <text:p>-0.599999999999994</text:p>
          </table:table-cell>
          <table:table-cell table:formula="of:=ABS([.J661])" office:value-type="float" office:value="0.599999999999994" calcext:value-type="float">
            <text:p>0.599999999999994</text:p>
          </table:table-cell>
          <table:table-cell table:formula="of:=[.K661]/[.F661]*100" office:value-type="float" office:value="0.793650793650786" calcext:value-type="float">
            <text:p>0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8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1.2751" calcext:value-type="float">
            <text:p>1.2751</text:p>
          </table:table-cell>
          <table:table-cell office:value-type="float" office:value="76.51" calcext:value-type="float">
            <text:p>76.51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662]-[.F662]" office:value-type="float" office:value="-7.51000000000001" calcext:value-type="float">
            <text:p>-7.51000000000001</text:p>
          </table:table-cell>
          <table:table-cell table:formula="of:=ABS([.J662])" office:value-type="float" office:value="7.51000000000001" calcext:value-type="float">
            <text:p>7.51000000000001</text:p>
          </table:table-cell>
          <table:table-cell table:formula="of:=[.K662]/[.F662]*100" office:value-type="float" office:value="9.81571036465822" calcext:value-type="float">
            <text:p>9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4811" calcext:value-type="float">
            <text:p>1.4811</text:p>
          </table:table-cell>
          <table:table-cell office:value-type="float" office:value="88.87" calcext:value-type="float">
            <text:p>88.87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63]-[.F663]" office:value-type="float" office:value="-13.87" calcext:value-type="float">
            <text:p>-13.87</text:p>
          </table:table-cell>
          <table:table-cell table:formula="of:=ABS([.J663])" office:value-type="float" office:value="13.87" calcext:value-type="float">
            <text:p>13.87</text:p>
          </table:table-cell>
          <table:table-cell table:formula="of:=[.K663]/[.F663]*100" office:value-type="float" office:value="15.6070665016316" calcext:value-type="float">
            <text:p>15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4527" calcext:value-type="float">
            <text:p>1.4527</text:p>
          </table:table-cell>
          <table:table-cell office:value-type="float" office:value="87.16" calcext:value-type="float">
            <text:p>87.16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64]-[.F664]" office:value-type="float" office:value="-12.16" calcext:value-type="float">
            <text:p>-12.16</text:p>
          </table:table-cell>
          <table:table-cell table:formula="of:=ABS([.J664])" office:value-type="float" office:value="12.16" calcext:value-type="float">
            <text:p>12.16</text:p>
          </table:table-cell>
          <table:table-cell table:formula="of:=[.K664]/[.F664]*100" office:value-type="float" office:value="13.951353832033" calcext:value-type="float">
            <text:p>14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4079" calcext:value-type="float">
            <text:p>1.4079</text:p>
          </table:table-cell>
          <table:table-cell office:value-type="float" office:value="84.47" calcext:value-type="float">
            <text:p>84.47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formula="of:=[.H665]-[.F665]" office:value-type="float" office:value="-3.47" calcext:value-type="float">
            <text:p>-3.47</text:p>
          </table:table-cell>
          <table:table-cell table:formula="of:=ABS([.J665])" office:value-type="float" office:value="3.47" calcext:value-type="float">
            <text:p>3.47</text:p>
          </table:table-cell>
          <table:table-cell table:formula="of:=[.K665]/[.F665]*100" office:value-type="float" office:value="4.10796732567775" calcext:value-type="float">
            <text:p>4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3985" calcext:value-type="float">
            <text:p>1.3985</text:p>
          </table:table-cell>
          <table:table-cell office:value-type="float" office:value="83.91" calcext:value-type="float">
            <text:p>83.91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[.H666]-[.F666]" office:value-type="float" office:value="-2.91" calcext:value-type="float">
            <text:p>-2.91</text:p>
          </table:table-cell>
          <table:table-cell table:formula="of:=ABS([.J666])" office:value-type="float" office:value="2.91" calcext:value-type="float">
            <text:p>2.91</text:p>
          </table:table-cell>
          <table:table-cell table:formula="of:=[.K666]/[.F666]*100" office:value-type="float" office:value="3.46800143010368" calcext:value-type="float">
            <text:p>3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.3681" calcext:value-type="float">
            <text:p>1.3681</text:p>
          </table:table-cell>
          <table:table-cell office:value-type="float" office:value="82.09" calcext:value-type="float">
            <text:p>82.09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H667]-[.F667]" office:value-type="float" office:value="1.91" calcext:value-type="float">
            <text:p>1.91</text:p>
          </table:table-cell>
          <table:table-cell table:formula="of:=ABS([.J667])" office:value-type="float" office:value="1.91" calcext:value-type="float">
            <text:p>1.91</text:p>
          </table:table-cell>
          <table:table-cell table:formula="of:=[.K667]/[.F667]*100" office:value-type="float" office:value="2.32671458155682" calcext:value-type="float">
            <text:p>2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3737" calcext:value-type="float">
            <text:p>1.3737</text:p>
          </table:table-cell>
          <table:table-cell office:value-type="float" office:value="82.42" calcext:value-type="float">
            <text:p>82.42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formula="of:=[.H668]-[.F668]" office:value-type="float" office:value="-1.42" calcext:value-type="float">
            <text:p>-1.42</text:p>
          </table:table-cell>
          <table:table-cell table:formula="of:=ABS([.J668])" office:value-type="float" office:value="1.42" calcext:value-type="float">
            <text:p>1.42</text:p>
          </table:table-cell>
          <table:table-cell table:formula="of:=[.K668]/[.F668]*100" office:value-type="float" office:value="1.722882795438" calcext:value-type="float">
            <text:p>1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3751" calcext:value-type="float">
            <text:p>1.3751</text:p>
          </table:table-cell>
          <table:table-cell office:value-type="float" office:value="82.51" calcext:value-type="float">
            <text:p>82.51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[.H669]-[.F669]" office:value-type="float" office:value="-1.51000000000001" calcext:value-type="float">
            <text:p>-1.51000000000001</text:p>
          </table:table-cell>
          <table:table-cell table:formula="of:=ABS([.J669])" office:value-type="float" office:value="1.51000000000001" calcext:value-type="float">
            <text:p>1.51000000000001</text:p>
          </table:table-cell>
          <table:table-cell table:formula="of:=[.K669]/[.F669]*100" office:value-type="float" office:value="1.83008120227852" calcext:value-type="float">
            <text:p>1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.3576" calcext:value-type="float">
            <text:p>1.3576</text:p>
          </table:table-cell>
          <table:table-cell office:value-type="float" office:value="81.46" calcext:value-type="float">
            <text:p>81.46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670]-[.F670]" office:value-type="float" office:value="-0.459999999999994" calcext:value-type="float">
            <text:p>-0.459999999999994</text:p>
          </table:table-cell>
          <table:table-cell table:formula="of:=ABS([.J670])" office:value-type="float" office:value="0.459999999999994" calcext:value-type="float">
            <text:p>0.459999999999994</text:p>
          </table:table-cell>
          <table:table-cell table:formula="of:=[.K670]/[.F670]*100" office:value-type="float" office:value="0.56469432850478" calcext:value-type="float">
            <text:p>0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.3845" calcext:value-type="float">
            <text:p>1.3845</text:p>
          </table:table-cell>
          <table:table-cell office:value-type="float" office:value="83.07" calcext:value-type="float">
            <text:p>83.07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H671]-[.F671]" office:value-type="float" office:value="0.930000000000007" calcext:value-type="float">
            <text:p>0.930000000000007</text:p>
          </table:table-cell>
          <table:table-cell table:formula="of:=ABS([.J671])" office:value-type="float" office:value="0.930000000000007" calcext:value-type="float">
            <text:p>0.930000000000007</text:p>
          </table:table-cell>
          <table:table-cell table:formula="of:=[.K671]/[.F671]*100" office:value-type="float" office:value="1.11953773925606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.3738" calcext:value-type="float">
            <text:p>1.3738</text:p>
          </table:table-cell>
          <table:table-cell office:value-type="float" office:value="82.43" calcext:value-type="float">
            <text:p>82.43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formula="of:=[.H672]-[.F672]" office:value-type="float" office:value="1.56999999999999" calcext:value-type="float">
            <text:p>1.56999999999999</text:p>
          </table:table-cell>
          <table:table-cell table:formula="of:=ABS([.J672])" office:value-type="float" office:value="1.56999999999999" calcext:value-type="float">
            <text:p>1.56999999999999</text:p>
          </table:table-cell>
          <table:table-cell table:formula="of:=[.K672]/[.F672]*100" office:value-type="float" office:value="1.90464636661409" calcext:value-type="float">
            <text:p>1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3822" calcext:value-type="float">
            <text:p>1.3822</text:p>
          </table:table-cell>
          <table:table-cell office:value-type="float" office:value="82.93" calcext:value-type="float">
            <text:p>82.93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formula="of:=[.H673]-[.F673]" office:value-type="float" office:value="1.06999999999999" calcext:value-type="float">
            <text:p>1.06999999999999</text:p>
          </table:table-cell>
          <table:table-cell table:formula="of:=ABS([.J673])" office:value-type="float" office:value="1.06999999999999" calcext:value-type="float">
            <text:p>1.06999999999999</text:p>
          </table:table-cell>
          <table:table-cell table:formula="of:=[.K673]/[.F673]*100" office:value-type="float" office:value="1.29024478475822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.3853" calcext:value-type="float">
            <text:p>1.3853</text:p>
          </table:table-cell>
          <table:table-cell office:value-type="float" office:value="83.12" calcext:value-type="float">
            <text:p>83.1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74]-[.F674]" office:value-type="float" office:value="0.879999999999996" calcext:value-type="float">
            <text:p>0.879999999999996</text:p>
          </table:table-cell>
          <table:table-cell table:formula="of:=ABS([.J674])" office:value-type="float" office:value="0.879999999999996" calcext:value-type="float">
            <text:p>0.879999999999996</text:p>
          </table:table-cell>
          <table:table-cell table:formula="of:=[.K674]/[.F674]*100" office:value-type="float" office:value="1.05871029836381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3648" calcext:value-type="float">
            <text:p>1.3648</text:p>
          </table:table-cell>
          <table:table-cell office:value-type="float" office:value="81.89" calcext:value-type="float">
            <text:p>81.89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75]-[.F675]" office:value-type="float" office:value="2.11" calcext:value-type="float">
            <text:p>2.11</text:p>
          </table:table-cell>
          <table:table-cell table:formula="of:=ABS([.J675])" office:value-type="float" office:value="2.11" calcext:value-type="float">
            <text:p>2.11</text:p>
          </table:table-cell>
          <table:table-cell table:formula="of:=[.K675]/[.F675]*100" office:value-type="float" office:value="2.5766271828062" calcext:value-type="float">
            <text:p>2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.3774" calcext:value-type="float">
            <text:p>1.3774</text:p>
          </table:table-cell>
          <table:table-cell office:value-type="float" office:value="82.65" calcext:value-type="float">
            <text:p>82.65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H676]-[.F676]" office:value-type="float" office:value="1.34999999999999" calcext:value-type="float">
            <text:p>1.34999999999999</text:p>
          </table:table-cell>
          <table:table-cell table:formula="of:=ABS([.J676])" office:value-type="float" office:value="1.34999999999999" calcext:value-type="float">
            <text:p>1.34999999999999</text:p>
          </table:table-cell>
          <table:table-cell table:formula="of:=[.K676]/[.F676]*100" office:value-type="float" office:value="1.63339382940108" calcext:value-type="float">
            <text:p>1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.3852" calcext:value-type="float">
            <text:p>1.3852</text:p>
          </table:table-cell>
          <table:table-cell office:value-type="float" office:value="83.11" calcext:value-type="float">
            <text:p>83.1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77]-[.F677]" office:value-type="float" office:value="0.890000000000001" calcext:value-type="float">
            <text:p>0.890000000000001</text:p>
          </table:table-cell>
          <table:table-cell table:formula="of:=ABS([.J677])" office:value-type="float" office:value="0.890000000000001" calcext:value-type="float">
            <text:p>0.890000000000001</text:p>
          </table:table-cell>
          <table:table-cell table:formula="of:=[.K677]/[.F677]*100" office:value-type="float" office:value="1.0708699314162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.3827" calcext:value-type="float">
            <text:p>1.3827</text:p>
          </table:table-cell>
          <table:table-cell office:value-type="float" office:value="82.96" calcext:value-type="float">
            <text:p>82.96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678]-[.F678]" office:value-type="float" office:value="-1.95999999999999" calcext:value-type="float">
            <text:p>-1.95999999999999</text:p>
          </table:table-cell>
          <table:table-cell table:formula="of:=ABS([.J678])" office:value-type="float" office:value="1.95999999999999" calcext:value-type="float">
            <text:p>1.95999999999999</text:p>
          </table:table-cell>
          <table:table-cell table:formula="of:=[.K678]/[.F678]*100" office:value-type="float" office:value="2.36258437801349" calcext:value-type="float">
            <text:p>2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3964" calcext:value-type="float">
            <text:p>1.3964</text:p>
          </table:table-cell>
          <table:table-cell office:value-type="float" office:value="83.78" calcext:value-type="float">
            <text:p>83.78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[.H679]-[.F679]" office:value-type="float" office:value="-2.78" calcext:value-type="float">
            <text:p>-2.78</text:p>
          </table:table-cell>
          <table:table-cell table:formula="of:=ABS([.J679])" office:value-type="float" office:value="2.78" calcext:value-type="float">
            <text:p>2.78</text:p>
          </table:table-cell>
          <table:table-cell table:formula="of:=[.K679]/[.F679]*100" office:value-type="float" office:value="3.31821437097159" calcext:value-type="float">
            <text:p>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.3826" calcext:value-type="float">
            <text:p>1.3826</text:p>
          </table:table-cell>
          <table:table-cell office:value-type="float" office:value="82.96" calcext:value-type="float">
            <text:p>82.96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formula="of:=[.H680]-[.F680]" office:value-type="float" office:value="-1.95999999999999" calcext:value-type="float">
            <text:p>-1.95999999999999</text:p>
          </table:table-cell>
          <table:table-cell table:formula="of:=ABS([.J680])" office:value-type="float" office:value="1.95999999999999" calcext:value-type="float">
            <text:p>1.95999999999999</text:p>
          </table:table-cell>
          <table:table-cell table:formula="of:=[.K680]/[.F680]*100" office:value-type="float" office:value="2.36258437801349" calcext:value-type="float">
            <text:p>2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.3762" calcext:value-type="float">
            <text:p>1.3762</text:p>
          </table:table-cell>
          <table:table-cell office:value-type="float" office:value="82.57" calcext:value-type="float">
            <text:p>82.57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formula="of:=[.H681]-[.F681]" office:value-type="float" office:value="-10.57" calcext:value-type="float">
            <text:p>-10.57</text:p>
          </table:table-cell>
          <table:table-cell table:formula="of:=ABS([.J681])" office:value-type="float" office:value="10.57" calcext:value-type="float">
            <text:p>10.57</text:p>
          </table:table-cell>
          <table:table-cell table:formula="of:=[.K681]/[.F681]*100" office:value-type="float" office:value="12.8012595373622" calcext:value-type="float">
            <text:p>12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.379" calcext:value-type="float">
            <text:p>1.379</text:p>
          </table:table-cell>
          <table:table-cell office:value-type="float" office:value="82.74" calcext:value-type="float">
            <text:p>82.7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682]-[.F682]" office:value-type="float" office:value="-10.74" calcext:value-type="float">
            <text:p>-10.74</text:p>
          </table:table-cell>
          <table:table-cell table:formula="of:=ABS([.J682])" office:value-type="float" office:value="10.74" calcext:value-type="float">
            <text:p>10.74</text:p>
          </table:table-cell>
          <table:table-cell table:formula="of:=[.K682]/[.F682]*100" office:value-type="float" office:value="12.9804205946338" calcext:value-type="float">
            <text:p>13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.3768" calcext:value-type="float">
            <text:p>1.3768</text:p>
          </table:table-cell>
          <table:table-cell office:value-type="float" office:value="82.61" calcext:value-type="float">
            <text:p>82.61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[.H683]-[.F683]" office:value-type="float" office:value="-7.61" calcext:value-type="float">
            <text:p>-7.61</text:p>
          </table:table-cell>
          <table:table-cell table:formula="of:=ABS([.J683])" office:value-type="float" office:value="7.61" calcext:value-type="float">
            <text:p>7.61</text:p>
          </table:table-cell>
          <table:table-cell table:formula="of:=[.K683]/[.F683]*100" office:value-type="float" office:value="9.21195981116088" calcext:value-type="float">
            <text:p>9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.3939" calcext:value-type="float">
            <text:p>1.3939</text:p>
          </table:table-cell>
          <table:table-cell office:value-type="float" office:value="83.64" calcext:value-type="float">
            <text:p>83.6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84]-[.F684]" office:value-type="float" office:value="-8.64" calcext:value-type="float">
            <text:p>-8.64</text:p>
          </table:table-cell>
          <table:table-cell table:formula="of:=ABS([.J684])" office:value-type="float" office:value="8.64" calcext:value-type="float">
            <text:p>8.64</text:p>
          </table:table-cell>
          <table:table-cell table:formula="of:=[.K684]/[.F684]*100" office:value-type="float" office:value="10.3299856527977" calcext:value-type="float">
            <text:p>1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.3909" calcext:value-type="float">
            <text:p>1.3909</text:p>
          </table:table-cell>
          <table:table-cell office:value-type="float" office:value="83.46" calcext:value-type="float">
            <text:p>83.46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685]-[.F685]" office:value-type="float" office:value="-8.45999999999999" calcext:value-type="float">
            <text:p>-8.45999999999999</text:p>
          </table:table-cell>
          <table:table-cell table:formula="of:=ABS([.J685])" office:value-type="float" office:value="8.45999999999999" calcext:value-type="float">
            <text:p>8.45999999999999</text:p>
          </table:table-cell>
          <table:table-cell table:formula="of:=[.K685]/[.F685]*100" office:value-type="float" office:value="10.136592379583" calcext:value-type="float">
            <text:p>10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.3932" calcext:value-type="float">
            <text:p>1.3932</text:p>
          </table:table-cell>
          <table:table-cell office:value-type="float" office:value="83.59" calcext:value-type="float">
            <text:p>83.59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86]-[.F686]" office:value-type="float" office:value="0.409999999999997" calcext:value-type="float">
            <text:p>0.409999999999997</text:p>
          </table:table-cell>
          <table:table-cell table:formula="of:=ABS([.J686])" office:value-type="float" office:value="0.409999999999997" calcext:value-type="float">
            <text:p>0.409999999999997</text:p>
          </table:table-cell>
          <table:table-cell table:formula="of:=[.K686]/[.F686]*100" office:value-type="float" office:value="0.490489292977625" calcext:value-type="float">
            <text:p>0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.3972" calcext:value-type="float">
            <text:p>1.3972</text:p>
          </table:table-cell>
          <table:table-cell office:value-type="float" office:value="83.83" calcext:value-type="float">
            <text:p>83.83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87]-[.F687]" office:value-type="float" office:value="0.170000000000002" calcext:value-type="float">
            <text:p>0.170000000000002</text:p>
          </table:table-cell>
          <table:table-cell table:formula="of:=ABS([.J687])" office:value-type="float" office:value="0.170000000000002" calcext:value-type="float">
            <text:p>0.170000000000002</text:p>
          </table:table-cell>
          <table:table-cell table:formula="of:=[.K687]/[.F687]*100" office:value-type="float" office:value="0.202791363473699" calcext:value-type="float">
            <text:p>0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.4006" calcext:value-type="float">
            <text:p>1.4006</text:p>
          </table:table-cell>
          <table:table-cell office:value-type="float" office:value="84.04" calcext:value-type="float">
            <text:p>84.04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88]-[.F688]" office:value-type="float" office:value="-0.0400000000000063" calcext:value-type="float">
            <text:p>-0.0400000000000063</text:p>
          </table:table-cell>
          <table:table-cell table:formula="of:=ABS([.J688])" office:value-type="float" office:value="0.0400000000000063" calcext:value-type="float">
            <text:p>0.0400000000000063</text:p>
          </table:table-cell>
          <table:table-cell table:formula="of:=[.K688]/[.F688]*100" office:value-type="float" office:value="0.0475963826749241" calcext:value-type="float">
            <text:p>0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.3897" calcext:value-type="float">
            <text:p>1.3897</text:p>
          </table:table-cell>
          <table:table-cell office:value-type="float" office:value="83.38" calcext:value-type="float">
            <text:p>83.3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89]-[.F689]" office:value-type="float" office:value="0.620000000000005" calcext:value-type="float">
            <text:p>0.620000000000005</text:p>
          </table:table-cell>
          <table:table-cell table:formula="of:=ABS([.J689])" office:value-type="float" office:value="0.620000000000005" calcext:value-type="float">
            <text:p>0.620000000000005</text:p>
          </table:table-cell>
          <table:table-cell table:formula="of:=[.K689]/[.F689]*100" office:value-type="float" office:value="0.74358359318782" calcext:value-type="float">
            <text:p>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.3905" calcext:value-type="float">
            <text:p>1.3905</text:p>
          </table:table-cell>
          <table:table-cell office:value-type="float" office:value="83.43" calcext:value-type="float">
            <text:p>83.43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90]-[.F690]" office:value-type="float" office:value="0.569999999999993" calcext:value-type="float">
            <text:p>0.569999999999993</text:p>
          </table:table-cell>
          <table:table-cell table:formula="of:=ABS([.J690])" office:value-type="float" office:value="0.569999999999993" calcext:value-type="float">
            <text:p>0.569999999999993</text:p>
          </table:table-cell>
          <table:table-cell table:formula="of:=[.K690]/[.F690]*100" office:value-type="float" office:value="0.683207479323976" calcext:value-type="float">
            <text:p>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.3939" calcext:value-type="float">
            <text:p>1.3939</text:p>
          </table:table-cell>
          <table:table-cell office:value-type="float" office:value="83.63" calcext:value-type="float">
            <text:p>83.63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H691]-[.F691]" office:value-type="float" office:value="0.370000000000005" calcext:value-type="float">
            <text:p>0.370000000000005</text:p>
          </table:table-cell>
          <table:table-cell table:formula="of:=ABS([.J691])" office:value-type="float" office:value="0.370000000000005" calcext:value-type="float">
            <text:p>0.370000000000005</text:p>
          </table:table-cell>
          <table:table-cell table:formula="of:=[.K691]/[.F691]*100" office:value-type="float" office:value="0.442424967117069" calcext:value-type="float">
            <text:p>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.3827" calcext:value-type="float">
            <text:p>1.3827</text:p>
          </table:table-cell>
          <table:table-cell office:value-type="float" office:value="82.96" calcext:value-type="float">
            <text:p>82.9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92]-[.F692]" office:value-type="float" office:value="1.04000000000001" calcext:value-type="float">
            <text:p>1.04000000000001</text:p>
          </table:table-cell>
          <table:table-cell table:formula="of:=ABS([.J692])" office:value-type="float" office:value="1.04000000000001" calcext:value-type="float">
            <text:p>1.04000000000001</text:p>
          </table:table-cell>
          <table:table-cell table:formula="of:=[.K692]/[.F692]*100" office:value-type="float" office:value="1.2536162005786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.3949" calcext:value-type="float">
            <text:p>1.3949</text:p>
          </table:table-cell>
          <table:table-cell office:value-type="float" office:value="83.69" calcext:value-type="float">
            <text:p>83.69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93]-[.F693]" office:value-type="float" office:value="0.310000000000002" calcext:value-type="float">
            <text:p>0.310000000000002</text:p>
          </table:table-cell>
          <table:table-cell table:formula="of:=ABS([.J693])" office:value-type="float" office:value="0.310000000000002" calcext:value-type="float">
            <text:p>0.310000000000002</text:p>
          </table:table-cell>
          <table:table-cell table:formula="of:=[.K693]/[.F693]*100" office:value-type="float" office:value="0.370414625403277" calcext:value-type="float">
            <text:p>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.3839" calcext:value-type="float">
            <text:p>1.3839</text:p>
          </table:table-cell>
          <table:table-cell office:value-type="float" office:value="83.04" calcext:value-type="float">
            <text:p>83.04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94]-[.F694]" office:value-type="float" office:value="0.959999999999994" calcext:value-type="float">
            <text:p>0.959999999999994</text:p>
          </table:table-cell>
          <table:table-cell table:formula="of:=ABS([.J694])" office:value-type="float" office:value="0.959999999999994" calcext:value-type="float">
            <text:p>0.959999999999994</text:p>
          </table:table-cell>
          <table:table-cell table:formula="of:=[.K694]/[.F694]*100" office:value-type="float" office:value="1.15606936416184" calcext:value-type="float">
            <text:p>1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.3842" calcext:value-type="float">
            <text:p>1.3842</text:p>
          </table:table-cell>
          <table:table-cell office:value-type="float" office:value="83.05" calcext:value-type="float">
            <text:p>83.05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95]-[.F695]" office:value-type="float" office:value="0.950000000000003" calcext:value-type="float">
            <text:p>0.950000000000003</text:p>
          </table:table-cell>
          <table:table-cell table:formula="of:=ABS([.J695])" office:value-type="float" office:value="0.950000000000003" calcext:value-type="float">
            <text:p>0.950000000000003</text:p>
          </table:table-cell>
          <table:table-cell table:formula="of:=[.K695]/[.F695]*100" office:value-type="float" office:value="1.14388922335943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.3749" calcext:value-type="float">
            <text:p>1.3749</text:p>
          </table:table-cell>
          <table:table-cell office:value-type="float" office:value="82.49" calcext:value-type="float">
            <text:p>82.49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96]-[.F696]" office:value-type="float" office:value="1.51000000000001" calcext:value-type="float">
            <text:p>1.51000000000001</text:p>
          </table:table-cell>
          <table:table-cell table:formula="of:=ABS([.J696])" office:value-type="float" office:value="1.51000000000001" calcext:value-type="float">
            <text:p>1.51000000000001</text:p>
          </table:table-cell>
          <table:table-cell table:formula="of:=[.K696]/[.F696]*100" office:value-type="float" office:value="1.83052491211057" calcext:value-type="float">
            <text:p>1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.3726" calcext:value-type="float">
            <text:p>1.3726</text:p>
          </table:table-cell>
          <table:table-cell office:value-type="float" office:value="82.36" calcext:value-type="float">
            <text:p>82.3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97]-[.F697]" office:value-type="float" office:value="1.64" calcext:value-type="float">
            <text:p>1.64</text:p>
          </table:table-cell>
          <table:table-cell table:formula="of:=ABS([.J697])" office:value-type="float" office:value="1.64" calcext:value-type="float">
            <text:p>1.64</text:p>
          </table:table-cell>
          <table:table-cell table:formula="of:=[.K697]/[.F697]*100" office:value-type="float" office:value="1.99125789218067" calcext:value-type="float">
            <text:p>2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.3848" calcext:value-type="float">
            <text:p>1.3848</text:p>
          </table:table-cell>
          <table:table-cell office:value-type="float" office:value="83.09" calcext:value-type="float">
            <text:p>83.09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H698]-[.F698]" office:value-type="float" office:value="0.909999999999997" calcext:value-type="float">
            <text:p>0.909999999999997</text:p>
          </table:table-cell>
          <table:table-cell table:formula="of:=ABS([.J698])" office:value-type="float" office:value="0.909999999999997" calcext:value-type="float">
            <text:p>0.909999999999997</text:p>
          </table:table-cell>
          <table:table-cell table:formula="of:=[.K698]/[.F698]*100" office:value-type="float" office:value="1.09519797809604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.3783" calcext:value-type="float">
            <text:p>1.3783</text:p>
          </table:table-cell>
          <table:table-cell office:value-type="float" office:value="82.7" calcext:value-type="float">
            <text:p>82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699]-[.F699]" office:value-type="float" office:value="1.3" calcext:value-type="float">
            <text:p>1.3</text:p>
          </table:table-cell>
          <table:table-cell table:formula="of:=ABS([.J699])" office:value-type="float" office:value="1.3" calcext:value-type="float">
            <text:p>1.3</text:p>
          </table:table-cell>
          <table:table-cell table:formula="of:=[.K699]/[.F699]*100" office:value-type="float" office:value="1.57194679564691" calcext:value-type="float">
            <text:p>1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.41" calcext:value-type="float">
            <text:p>1.41</text:p>
          </table:table-cell>
          <table:table-cell office:value-type="float" office:value="84.6" calcext:value-type="float">
            <text:p>84.6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H700]-[.F700]" office:value-type="float" office:value="-0.599999999999994" calcext:value-type="float">
            <text:p>-0.599999999999994</text:p>
          </table:table-cell>
          <table:table-cell table:formula="of:=ABS([.J700])" office:value-type="float" office:value="0.599999999999994" calcext:value-type="float">
            <text:p>0.599999999999994</text:p>
          </table:table-cell>
          <table:table-cell table:formula="of:=[.K700]/[.F700]*100" office:value-type="float" office:value="0.709219858156022" calcext:value-type="float">
            <text:p>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.4159" calcext:value-type="float">
            <text:p>1.4159</text:p>
          </table:table-cell>
          <table:table-cell office:value-type="float" office:value="84.95" calcext:value-type="float">
            <text:p>84.95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701]-[.F701]" office:value-type="float" office:value="2.05" calcext:value-type="float">
            <text:p>2.05</text:p>
          </table:table-cell>
          <table:table-cell table:formula="of:=ABS([.J701])" office:value-type="float" office:value="2.05" calcext:value-type="float">
            <text:p>2.05</text:p>
          </table:table-cell>
          <table:table-cell table:formula="of:=[.K701]/[.F701]*100" office:value-type="float" office:value="2.4131842260153" calcext:value-type="float">
            <text:p>2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.4262" calcext:value-type="float">
            <text:p>1.4262</text:p>
          </table:table-cell>
          <table:table-cell office:value-type="float" office:value="85.57" calcext:value-type="float">
            <text:p>85.57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702]-[.F702]" office:value-type="float" office:value="1.43000000000001" calcext:value-type="float">
            <text:p>1.43000000000001</text:p>
          </table:table-cell>
          <table:table-cell table:formula="of:=ABS([.J702])" office:value-type="float" office:value="1.43000000000001" calcext:value-type="float">
            <text:p>1.43000000000001</text:p>
          </table:table-cell>
          <table:table-cell table:formula="of:=[.K702]/[.F702]*100" office:value-type="float" office:value="1.67114642982354" calcext:value-type="float">
            <text:p>1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1.4569" calcext:value-type="float">
            <text:p>1.4569</text:p>
          </table:table-cell>
          <table:table-cell office:value-type="float" office:value="87.41" calcext:value-type="float">
            <text:p>87.41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703]-[.F703]" office:value-type="float" office:value="-0.409999999999997" calcext:value-type="float">
            <text:p>-0.409999999999997</text:p>
          </table:table-cell>
          <table:table-cell table:formula="of:=ABS([.J703])" office:value-type="float" office:value="0.409999999999997" calcext:value-type="float">
            <text:p>0.409999999999997</text:p>
          </table:table-cell>
          <table:table-cell table:formula="of:=[.K703]/[.F703]*100" office:value-type="float" office:value="0.469053883994962" calcext:value-type="float">
            <text:p>0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1.4476" calcext:value-type="float">
            <text:p>1.4476</text:p>
          </table:table-cell>
          <table:table-cell office:value-type="float" office:value="86.86" calcext:value-type="float">
            <text:p>86.86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H704]-[.F704]" office:value-type="float" office:value="0.140000000000001" calcext:value-type="float">
            <text:p>0.140000000000001</text:p>
          </table:table-cell>
          <table:table-cell table:formula="of:=ABS([.J704])" office:value-type="float" office:value="0.140000000000001" calcext:value-type="float">
            <text:p>0.140000000000001</text:p>
          </table:table-cell>
          <table:table-cell table:formula="of:=[.K704]/[.F704]*100" office:value-type="float" office:value="0.161178908588534" calcext:value-type="float">
            <text:p>0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1.4686" calcext:value-type="float">
            <text:p>1.4686</text:p>
          </table:table-cell>
          <table:table-cell office:value-type="float" office:value="88.12" calcext:value-type="float">
            <text:p>88.12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705]-[.F705]" office:value-type="float" office:value="-1.12" calcext:value-type="float">
            <text:p>-1.12</text:p>
          </table:table-cell>
          <table:table-cell table:formula="of:=ABS([.J705])" office:value-type="float" office:value="1.12" calcext:value-type="float">
            <text:p>1.12</text:p>
          </table:table-cell>
          <table:table-cell table:formula="of:=[.K705]/[.F705]*100" office:value-type="float" office:value="1.27099409895597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.4589" calcext:value-type="float">
            <text:p>1.4589</text:p>
          </table:table-cell>
          <table:table-cell office:value-type="float" office:value="87.54" calcext:value-type="float">
            <text:p>87.54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706]-[.F706]" office:value-type="float" office:value="-0.540000000000006" calcext:value-type="float">
            <text:p>-0.540000000000006</text:p>
          </table:table-cell>
          <table:table-cell table:formula="of:=ABS([.J706])" office:value-type="float" office:value="0.540000000000006" calcext:value-type="float">
            <text:p>0.540000000000006</text:p>
          </table:table-cell>
          <table:table-cell table:formula="of:=[.K706]/[.F706]*100" office:value-type="float" office:value="0.616860863605216" calcext:value-type="float">
            <text:p>0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1.4455" calcext:value-type="float">
            <text:p>1.4455</text:p>
          </table:table-cell>
          <table:table-cell office:value-type="float" office:value="86.73" calcext:value-type="float">
            <text:p>86.73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707]-[.F707]" office:value-type="float" office:value="0.269999999999996" calcext:value-type="float">
            <text:p>0.269999999999996</text:p>
          </table:table-cell>
          <table:table-cell table:formula="of:=ABS([.J707])" office:value-type="float" office:value="0.269999999999996" calcext:value-type="float">
            <text:p>0.269999999999996</text:p>
          </table:table-cell>
          <table:table-cell table:formula="of:=[.K707]/[.F707]*100" office:value-type="float" office:value="0.311310965063987" calcext:value-type="float">
            <text:p>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.4369" calcext:value-type="float">
            <text:p>1.4369</text:p>
          </table:table-cell>
          <table:table-cell office:value-type="float" office:value="86.22" calcext:value-type="float">
            <text:p>86.22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708]-[.F708]" office:value-type="float" office:value="6.78" calcext:value-type="float">
            <text:p>6.78</text:p>
          </table:table-cell>
          <table:table-cell table:formula="of:=ABS([.J708])" office:value-type="float" office:value="6.78" calcext:value-type="float">
            <text:p>6.78</text:p>
          </table:table-cell>
          <table:table-cell table:formula="of:=[.K708]/[.F708]*100" office:value-type="float" office:value="7.86360473208073" calcext:value-type="float">
            <text:p>7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.4052" calcext:value-type="float">
            <text:p>1.4052</text:p>
          </table:table-cell>
          <table:table-cell office:value-type="float" office:value="84.31" calcext:value-type="float">
            <text:p>84.31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709]-[.F709]" office:value-type="float" office:value="8.69" calcext:value-type="float">
            <text:p>8.69</text:p>
          </table:table-cell>
          <table:table-cell table:formula="of:=ABS([.J709])" office:value-type="float" office:value="8.69" calcext:value-type="float">
            <text:p>8.69</text:p>
          </table:table-cell>
          <table:table-cell table:formula="of:=[.K709]/[.F709]*100" office:value-type="float" office:value="10.3071996204483" calcext:value-type="float">
            <text:p>1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.4035" calcext:value-type="float">
            <text:p>1.4035</text:p>
          </table:table-cell>
          <table:table-cell office:value-type="float" office:value="84.21" calcext:value-type="float">
            <text:p>84.21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710]-[.F710]" office:value-type="float" office:value="8.79000000000001" calcext:value-type="float">
            <text:p>8.79000000000001</text:p>
          </table:table-cell>
          <table:table-cell table:formula="of:=ABS([.J710])" office:value-type="float" office:value="8.79000000000001" calcext:value-type="float">
            <text:p>8.79000000000001</text:p>
          </table:table-cell>
          <table:table-cell table:formula="of:=[.K710]/[.F710]*100" office:value-type="float" office:value="10.438190238689" calcext:value-type="float">
            <text:p>1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1.384" calcext:value-type="float">
            <text:p>1.384</text:p>
          </table:table-cell>
          <table:table-cell office:value-type="float" office:value="83.04" calcext:value-type="float">
            <text:p>83.04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formula="of:=[.H711]-[.F711]" office:value-type="float" office:value="3.95999999999999" calcext:value-type="float">
            <text:p>3.95999999999999</text:p>
          </table:table-cell>
          <table:table-cell table:formula="of:=ABS([.J711])" office:value-type="float" office:value="3.95999999999999" calcext:value-type="float">
            <text:p>3.95999999999999</text:p>
          </table:table-cell>
          <table:table-cell table:formula="of:=[.K711]/[.F711]*100" office:value-type="float" office:value="4.76878612716762" calcext:value-type="float">
            <text:p>4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1.392" calcext:value-type="float">
            <text:p>1.392</text:p>
          </table:table-cell>
          <table:table-cell office:value-type="float" office:value="83.52" calcext:value-type="float">
            <text:p>83.52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formula="of:=[.H712]-[.F712]" office:value-type="float" office:value="3.48" calcext:value-type="float">
            <text:p>3.48</text:p>
          </table:table-cell>
          <table:table-cell table:formula="of:=ABS([.J712])" office:value-type="float" office:value="3.48" calcext:value-type="float">
            <text:p>3.48</text:p>
          </table:table-cell>
          <table:table-cell table:formula="of:=[.K712]/[.F712]*100" office:value-type="float" office:value="4.16666666666667" calcext:value-type="float">
            <text:p>4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1.414" calcext:value-type="float">
            <text:p>1.414</text:p>
          </table:table-cell>
          <table:table-cell office:value-type="float" office:value="84.84" calcext:value-type="float">
            <text:p>84.84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713]-[.F713]" office:value-type="float" office:value="2.16" calcext:value-type="float">
            <text:p>2.16</text:p>
          </table:table-cell>
          <table:table-cell table:formula="of:=ABS([.J713])" office:value-type="float" office:value="2.16" calcext:value-type="float">
            <text:p>2.16</text:p>
          </table:table-cell>
          <table:table-cell table:formula="of:=[.K713]/[.F713]*100" office:value-type="float" office:value="2.54596888260254" calcext:value-type="float">
            <text:p>2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office:value-type="float" office:value="1.425" calcext:value-type="float">
            <text:p>1.425</text:p>
          </table:table-cell>
          <table:table-cell office:value-type="float" office:value="85.5" calcext:value-type="float">
            <text:p>85.5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714]-[.F714]" office:value-type="float" office:value="1.5" calcext:value-type="float">
            <text:p>1.5</text:p>
          </table:table-cell>
          <table:table-cell table:formula="of:=ABS([.J714])" office:value-type="float" office:value="1.5" calcext:value-type="float">
            <text:p>1.5</text:p>
          </table:table-cell>
          <table:table-cell table:formula="of:=[.K714]/[.F714]*100" office:value-type="float" office:value="1.75438596491228" calcext:value-type="float">
            <text:p>1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1.438" calcext:value-type="float">
            <text:p>1.438</text:p>
          </table:table-cell>
          <table:table-cell office:value-type="float" office:value="86.28" calcext:value-type="float">
            <text:p>86.28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715]-[.F715]" office:value-type="float" office:value="0.719999999999999" calcext:value-type="float">
            <text:p>0.719999999999999</text:p>
          </table:table-cell>
          <table:table-cell table:formula="of:=ABS([.J715])" office:value-type="float" office:value="0.719999999999999" calcext:value-type="float">
            <text:p>0.719999999999999</text:p>
          </table:table-cell>
          <table:table-cell table:formula="of:=[.K715]/[.F715]*100" office:value-type="float" office:value="0.834492350486786" calcext:value-type="float">
            <text:p>0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1.4485" calcext:value-type="float">
            <text:p>1.4485</text:p>
          </table:table-cell>
          <table:table-cell office:value-type="float" office:value="86.91" calcext:value-type="float">
            <text:p>86.91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H716]-[.F716]" office:value-type="float" office:value="0.0900000000000034" calcext:value-type="float">
            <text:p>0.0900000000000034</text:p>
          </table:table-cell>
          <table:table-cell table:formula="of:=ABS([.J716])" office:value-type="float" office:value="0.0900000000000034" calcext:value-type="float">
            <text:p>0.0900000000000034</text:p>
          </table:table-cell>
          <table:table-cell table:formula="of:=[.K716]/[.F716]*100" office:value-type="float" office:value="0.103555402140149" calcext:value-type="float">
            <text:p>0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1.4481" calcext:value-type="float">
            <text:p>1.4481</text:p>
          </table:table-cell>
          <table:table-cell office:value-type="float" office:value="86.89" calcext:value-type="float">
            <text:p>86.89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formula="of:=[.H717]-[.F717]" office:value-type="float" office:value="0.109999999999999" calcext:value-type="float">
            <text:p>0.109999999999999</text:p>
          </table:table-cell>
          <table:table-cell table:formula="of:=ABS([.J717])" office:value-type="float" office:value="0.109999999999999" calcext:value-type="float">
            <text:p>0.109999999999999</text:p>
          </table:table-cell>
          <table:table-cell table:formula="of:=[.K717]/[.F717]*100" office:value-type="float" office:value="0.126596846587639" calcext:value-type="float">
            <text:p>0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1.4463" calcext:value-type="float">
            <text:p>1.4463</text:p>
          </table:table-cell>
          <table:table-cell office:value-type="float" office:value="86.78" calcext:value-type="float">
            <text:p>86.78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[.H718]-[.F718]" office:value-type="float" office:value="-2.78" calcext:value-type="float">
            <text:p>-2.78</text:p>
          </table:table-cell>
          <table:table-cell table:formula="of:=ABS([.J718])" office:value-type="float" office:value="2.78" calcext:value-type="float">
            <text:p>2.78</text:p>
          </table:table-cell>
          <table:table-cell table:formula="of:=[.K718]/[.F718]*100" office:value-type="float" office:value="3.20350311131597" calcext:value-type="float">
            <text:p>3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57" calcext:value-type="float">
            <text:p>57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1.4457" calcext:value-type="float">
            <text:p>1.4457</text:p>
          </table:table-cell>
          <table:table-cell office:value-type="float" office:value="86.74" calcext:value-type="float">
            <text:p>86.74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19]-[.F719]" office:value-type="float" office:value="-2.74" calcext:value-type="float">
            <text:p>-2.74</text:p>
          </table:table-cell>
          <table:table-cell table:formula="of:=ABS([.J719])" office:value-type="float" office:value="2.74" calcext:value-type="float">
            <text:p>2.74</text:p>
          </table:table-cell>
          <table:table-cell table:formula="of:=[.K719]/[.F719]*100" office:value-type="float" office:value="3.15886557528245" calcext:value-type="float">
            <text:p>3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58" calcext:value-type="float">
            <text:p>58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1.4223" calcext:value-type="float">
            <text:p>1.4223</text:p>
          </table:table-cell>
          <table:table-cell office:value-type="float" office:value="85.34" calcext:value-type="float">
            <text:p>85.34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20]-[.F720]" office:value-type="float" office:value="-1.34" calcext:value-type="float">
            <text:p>-1.34</text:p>
          </table:table-cell>
          <table:table-cell table:formula="of:=ABS([.J720])" office:value-type="float" office:value="1.34" calcext:value-type="float">
            <text:p>1.34</text:p>
          </table:table-cell>
          <table:table-cell table:formula="of:=[.K720]/[.F720]*100" office:value-type="float" office:value="1.57018982891962" calcext:value-type="float">
            <text:p>1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59" calcext:value-type="float">
            <text:p>59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1.4263" calcext:value-type="float">
            <text:p>1.4263</text:p>
          </table:table-cell>
          <table:table-cell office:value-type="float" office:value="85.58" calcext:value-type="float">
            <text:p>85.58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H721]-[.F721]" office:value-type="float" office:value="-1.58" calcext:value-type="float">
            <text:p>-1.58</text:p>
          </table:table-cell>
          <table:table-cell table:formula="of:=ABS([.J721])" office:value-type="float" office:value="1.58" calcext:value-type="float">
            <text:p>1.58</text:p>
          </table:table-cell>
          <table:table-cell table:formula="of:=[.K721]/[.F721]*100" office:value-type="float" office:value="1.84622575368076" calcext:value-type="float">
            <text:p>1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.4183" calcext:value-type="float">
            <text:p>1.4183</text:p>
          </table:table-cell>
          <table:table-cell office:value-type="float" office:value="85.1" calcext:value-type="float">
            <text:p>85.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22]-[.F722]" office:value-type="float" office:value="-1.09999999999999" calcext:value-type="float">
            <text:p>-1.09999999999999</text:p>
          </table:table-cell>
          <table:table-cell table:formula="of:=ABS([.J722])" office:value-type="float" office:value="1.09999999999999" calcext:value-type="float">
            <text:p>1.09999999999999</text:p>
          </table:table-cell>
          <table:table-cell table:formula="of:=[.K722]/[.F722]*100" office:value-type="float" office:value="1.29259694477085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1.4372" calcext:value-type="float">
            <text:p>1.4372</text:p>
          </table:table-cell>
          <table:table-cell office:value-type="float" office:value="86.23" calcext:value-type="float">
            <text:p>86.23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formula="of:=[.H723]-[.F723]" office:value-type="float" office:value="-8.23" calcext:value-type="float">
            <text:p>-8.23</text:p>
          </table:table-cell>
          <table:table-cell table:formula="of:=ABS([.J723])" office:value-type="float" office:value="8.23" calcext:value-type="float">
            <text:p>8.23</text:p>
          </table:table-cell>
          <table:table-cell table:formula="of:=[.K723]/[.F723]*100" office:value-type="float" office:value="9.54424214310565" calcext:value-type="float">
            <text:p>9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62" calcext:value-type="float">
            <text:p>62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1.4447" calcext:value-type="float">
            <text:p>1.4447</text:p>
          </table:table-cell>
          <table:table-cell office:value-type="float" office:value="86.68" calcext:value-type="float">
            <text:p>86.68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formula="of:=[.H724]-[.F724]" office:value-type="float" office:value="-2.68000000000001" calcext:value-type="float">
            <text:p>-2.68000000000001</text:p>
          </table:table-cell>
          <table:table-cell table:formula="of:=ABS([.J724])" office:value-type="float" office:value="2.68000000000001" calcext:value-type="float">
            <text:p>2.68000000000001</text:p>
          </table:table-cell>
          <table:table-cell table:formula="of:=[.K724]/[.F724]*100" office:value-type="float" office:value="3.09183202584219" calcext:value-type="float">
            <text:p>3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.4401" calcext:value-type="float">
            <text:p>1.4401</text:p>
          </table:table-cell>
          <table:table-cell office:value-type="float" office:value="86.41" calcext:value-type="float">
            <text:p>86.41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formula="of:=[.H725]-[.F725]" office:value-type="float" office:value="-2.41" calcext:value-type="float">
            <text:p>-2.41</text:p>
          </table:table-cell>
          <table:table-cell table:formula="of:=ABS([.J725])" office:value-type="float" office:value="2.41" calcext:value-type="float">
            <text:p>2.41</text:p>
          </table:table-cell>
          <table:table-cell table:formula="of:=[.K725]/[.F725]*100" office:value-type="float" office:value="2.78902904756394" calcext:value-type="float">
            <text:p>2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.4474" calcext:value-type="float">
            <text:p>1.4474</text:p>
          </table:table-cell>
          <table:table-cell office:value-type="float" office:value="86.85" calcext:value-type="float">
            <text:p>86.85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26]-[.F726]" office:value-type="float" office:value="-2.84999999999999" calcext:value-type="float">
            <text:p>-2.84999999999999</text:p>
          </table:table-cell>
          <table:table-cell table:formula="of:=ABS([.J726])" office:value-type="float" office:value="2.84999999999999" calcext:value-type="float">
            <text:p>2.84999999999999</text:p>
          </table:table-cell>
          <table:table-cell table:formula="of:=[.K726]/[.F726]*100" office:value-type="float" office:value="3.28151986183074" calcext:value-type="float">
            <text:p>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.4241" calcext:value-type="float">
            <text:p>1.4241</text:p>
          </table:table-cell>
          <table:table-cell office:value-type="float" office:value="85.44" calcext:value-type="float">
            <text:p>85.44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formula="of:=[.H727]-[.F727]" office:value-type="float" office:value="-1.44" calcext:value-type="float">
            <text:p>-1.44</text:p>
          </table:table-cell>
          <table:table-cell table:formula="of:=ABS([.J727])" office:value-type="float" office:value="1.44" calcext:value-type="float">
            <text:p>1.44</text:p>
          </table:table-cell>
          <table:table-cell table:formula="of:=[.K727]/[.F727]*100" office:value-type="float" office:value="1.68539325842696" calcext:value-type="float">
            <text:p>1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66" calcext:value-type="float">
            <text:p>66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1.4141" calcext:value-type="float">
            <text:p>1.4141</text:p>
          </table:table-cell>
          <table:table-cell office:value-type="float" office:value="84.84" calcext:value-type="float">
            <text:p>84.84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28]-[.F728]" office:value-type="float" office:value="-0.840000000000003" calcext:value-type="float">
            <text:p>-0.840000000000003</text:p>
          </table:table-cell>
          <table:table-cell table:formula="of:=ABS([.J728])" office:value-type="float" office:value="0.840000000000003" calcext:value-type="float">
            <text:p>0.840000000000003</text:p>
          </table:table-cell>
          <table:table-cell table:formula="of:=[.K728]/[.F728]*100" office:value-type="float" office:value="0.990099009900994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1.4195" calcext:value-type="float">
            <text:p>1.4195</text:p>
          </table:table-cell>
          <table:table-cell office:value-type="float" office:value="85.17" calcext:value-type="float">
            <text:p>85.1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29]-[.F729]" office:value-type="float" office:value="-1.17" calcext:value-type="float">
            <text:p>-1.17</text:p>
          </table:table-cell>
          <table:table-cell table:formula="of:=ABS([.J729])" office:value-type="float" office:value="1.17" calcext:value-type="float">
            <text:p>1.17</text:p>
          </table:table-cell>
          <table:table-cell table:formula="of:=[.K729]/[.F729]*100" office:value-type="float" office:value="1.37372314195139" calcext:value-type="float">
            <text:p>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68" calcext:value-type="float">
            <text:p>68</text:p>
          </table:table-cell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office:value-type="float" office:value="1.4137" calcext:value-type="float">
            <text:p>1.4137</text:p>
          </table:table-cell>
          <table:table-cell office:value-type="float" office:value="84.82" calcext:value-type="float">
            <text:p>84.8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30]-[.F730]" office:value-type="float" office:value="-0.819999999999993" calcext:value-type="float">
            <text:p>-0.819999999999993</text:p>
          </table:table-cell>
          <table:table-cell table:formula="of:=ABS([.J730])" office:value-type="float" office:value="0.819999999999993" calcext:value-type="float">
            <text:p>0.819999999999993</text:p>
          </table:table-cell>
          <table:table-cell table:formula="of:=[.K730]/[.F730]*100" office:value-type="float" office:value="0.966753124263138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1.4314" calcext:value-type="float">
            <text:p>1.4314</text:p>
          </table:table-cell>
          <table:table-cell office:value-type="float" office:value="85.88" calcext:value-type="float">
            <text:p>85.88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H731]-[.F731]" office:value-type="float" office:value="-1.88" calcext:value-type="float">
            <text:p>-1.88</text:p>
          </table:table-cell>
          <table:table-cell table:formula="of:=ABS([.J731])" office:value-type="float" office:value="1.88" calcext:value-type="float">
            <text:p>1.88</text:p>
          </table:table-cell>
          <table:table-cell table:formula="of:=[.K731]/[.F731]*100" office:value-type="float" office:value="2.18910107126222" calcext:value-type="float">
            <text:p>2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1.4385" calcext:value-type="float">
            <text:p>1.4385</text:p>
          </table:table-cell>
          <table:table-cell office:value-type="float" office:value="86.31" calcext:value-type="float">
            <text:p>86.31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H732]-[.F732]" office:value-type="float" office:value="-2.31" calcext:value-type="float">
            <text:p>-2.31</text:p>
          </table:table-cell>
          <table:table-cell table:formula="of:=ABS([.J732])" office:value-type="float" office:value="2.31" calcext:value-type="float">
            <text:p>2.31</text:p>
          </table:table-cell>
          <table:table-cell table:formula="of:=[.K732]/[.F732]*100" office:value-type="float" office:value="2.67639902676399" calcext:value-type="float">
            <text:p>2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1.4382" calcext:value-type="float">
            <text:p>1.4382</text:p>
          </table:table-cell>
          <table:table-cell office:value-type="float" office:value="86.29" calcext:value-type="float">
            <text:p>86.29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formula="of:=[.H733]-[.F733]" office:value-type="float" office:value="-2.29000000000001" calcext:value-type="float">
            <text:p>-2.29000000000001</text:p>
          </table:table-cell>
          <table:table-cell table:formula="of:=ABS([.J733])" office:value-type="float" office:value="2.29000000000001" calcext:value-type="float">
            <text:p>2.29000000000001</text:p>
          </table:table-cell>
          <table:table-cell table:formula="of:=[.K733]/[.F733]*100" office:value-type="float" office:value="2.65384169660448" calcext:value-type="float">
            <text:p>2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1.4273" calcext:value-type="float">
            <text:p>1.4273</text:p>
          </table:table-cell>
          <table:table-cell office:value-type="float" office:value="85.64" calcext:value-type="float">
            <text:p>85.64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formula="of:=[.H734]-[.F734]" office:value-type="float" office:value="-1.64" calcext:value-type="float">
            <text:p>-1.64</text:p>
          </table:table-cell>
          <table:table-cell table:formula="of:=ABS([.J734])" office:value-type="float" office:value="1.64" calcext:value-type="float">
            <text:p>1.64</text:p>
          </table:table-cell>
          <table:table-cell table:formula="of:=[.K734]/[.F734]*100" office:value-type="float" office:value="1.91499299392807" calcext:value-type="float">
            <text:p>1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1.394" calcext:value-type="float">
            <text:p>1.394</text:p>
          </table:table-cell>
          <table:table-cell office:value-type="float" office:value="83.64" calcext:value-type="float">
            <text:p>83.64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35]-[.F735]" office:value-type="float" office:value="0.359999999999999" calcext:value-type="float">
            <text:p>0.359999999999999</text:p>
          </table:table-cell>
          <table:table-cell table:formula="of:=ABS([.J735])" office:value-type="float" office:value="0.359999999999999" calcext:value-type="float">
            <text:p>0.359999999999999</text:p>
          </table:table-cell>
          <table:table-cell table:formula="of:=[.K735]/[.F735]*100" office:value-type="float" office:value="0.43041606886657" calcext:value-type="float">
            <text:p>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1.3996" calcext:value-type="float">
            <text:p>1.3996</text:p>
          </table:table-cell>
          <table:table-cell office:value-type="float" office:value="83.98" calcext:value-type="float">
            <text:p>83.9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736]-[.F736]" office:value-type="float" office:value="-2.98" calcext:value-type="float">
            <text:p>-2.98</text:p>
          </table:table-cell>
          <table:table-cell table:formula="of:=ABS([.J736])" office:value-type="float" office:value="2.98" calcext:value-type="float">
            <text:p>2.98</text:p>
          </table:table-cell>
          <table:table-cell table:formula="of:=[.K736]/[.F736]*100" office:value-type="float" office:value="3.54846391998095" calcext:value-type="float">
            <text:p>3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.3731" calcext:value-type="float">
            <text:p>1.3731</text:p>
          </table:table-cell>
          <table:table-cell office:value-type="float" office:value="82.39" calcext:value-type="float">
            <text:p>82.39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737]-[.F737]" office:value-type="float" office:value="-1.39" calcext:value-type="float">
            <text:p>-1.39</text:p>
          </table:table-cell>
          <table:table-cell table:formula="of:=ABS([.J737])" office:value-type="float" office:value="1.39" calcext:value-type="float">
            <text:p>1.39</text:p>
          </table:table-cell>
          <table:table-cell table:formula="of:=[.K737]/[.F737]*100" office:value-type="float" office:value="1.68709794878019" calcext:value-type="float">
            <text:p>1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76" calcext:value-type="float">
            <text:p>76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1.3834" calcext:value-type="float">
            <text:p>1.3834</text:p>
          </table:table-cell>
          <table:table-cell office:value-type="float" office:value="83" calcext:value-type="float">
            <text:p>83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formula="of:=[.H738]-[.F738]" office:value-type="float" office:value="-2" calcext:value-type="float">
            <text:p>-2</text:p>
          </table:table-cell>
          <table:table-cell table:formula="of:=ABS([.J738])" office:value-type="float" office:value="2" calcext:value-type="float">
            <text:p>2</text:p>
          </table:table-cell>
          <table:table-cell table:formula="of:=[.K738]/[.F738]*100" office:value-type="float" office:value="2.40963855421687" calcext:value-type="float">
            <text:p>2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77" calcext:value-type="float">
            <text:p>7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1.3924" calcext:value-type="float">
            <text:p>1.3924</text:p>
          </table:table-cell>
          <table:table-cell office:value-type="float" office:value="83.55" calcext:value-type="float">
            <text:p>83.55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39]-[.F739]" office:value-type="float" office:value="0.450000000000003" calcext:value-type="float">
            <text:p>0.450000000000003</text:p>
          </table:table-cell>
          <table:table-cell table:formula="of:=ABS([.J739])" office:value-type="float" office:value="0.450000000000003" calcext:value-type="float">
            <text:p>0.450000000000003</text:p>
          </table:table-cell>
          <table:table-cell table:formula="of:=[.K739]/[.F739]*100" office:value-type="float" office:value="0.538599640933576" calcext:value-type="float">
            <text:p>0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1.3817" calcext:value-type="float">
            <text:p>1.3817</text:p>
          </table:table-cell>
          <table:table-cell office:value-type="float" office:value="82.9" calcext:value-type="float">
            <text:p>82.9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40]-[.F740]" office:value-type="float" office:value="1.09999999999999" calcext:value-type="float">
            <text:p>1.09999999999999</text:p>
          </table:table-cell>
          <table:table-cell table:formula="of:=ABS([.J740])" office:value-type="float" office:value="1.09999999999999" calcext:value-type="float">
            <text:p>1.09999999999999</text:p>
          </table:table-cell>
          <table:table-cell table:formula="of:=[.K740]/[.F740]*100" office:value-type="float" office:value="1.32689987937273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79" calcext:value-type="float">
            <text:p>79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1.3853" calcext:value-type="float">
            <text:p>1.3853</text:p>
          </table:table-cell>
          <table:table-cell office:value-type="float" office:value="83.12" calcext:value-type="float">
            <text:p>83.12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formula="of:=[.H741]-[.F741]" office:value-type="float" office:value="0.879999999999996" calcext:value-type="float">
            <text:p>0.879999999999996</text:p>
          </table:table-cell>
          <table:table-cell table:formula="of:=ABS([.J741])" office:value-type="float" office:value="0.879999999999996" calcext:value-type="float">
            <text:p>0.879999999999996</text:p>
          </table:table-cell>
          <table:table-cell table:formula="of:=[.K741]/[.F741]*100" office:value-type="float" office:value="1.05871029836381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415" calcext:value-type="float">
            <text:p>415</text:p>
          </table:table-cell>
          <table:table-cell office:value-type="float" office:value="1.3863" calcext:value-type="float">
            <text:p>1.3863</text:p>
          </table:table-cell>
          <table:table-cell office:value-type="float" office:value="83.18" calcext:value-type="float">
            <text:p>83.1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42]-[.F742]" office:value-type="float" office:value="0.819999999999993" calcext:value-type="float">
            <text:p>0.819999999999993</text:p>
          </table:table-cell>
          <table:table-cell table:formula="of:=ABS([.J742])" office:value-type="float" office:value="0.819999999999993" calcext:value-type="float">
            <text:p>0.819999999999993</text:p>
          </table:table-cell>
          <table:table-cell table:formula="of:=[.K742]/[.F742]*100" office:value-type="float" office:value="0.985813897571523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1.388" calcext:value-type="float">
            <text:p>1.388</text:p>
          </table:table-cell>
          <table:table-cell office:value-type="float" office:value="83.28" calcext:value-type="float">
            <text:p>83.2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43]-[.F743]" office:value-type="float" office:value="0.719999999999999" calcext:value-type="float">
            <text:p>0.719999999999999</text:p>
          </table:table-cell>
          <table:table-cell table:formula="of:=ABS([.J743])" office:value-type="float" office:value="0.719999999999999" calcext:value-type="float">
            <text:p>0.719999999999999</text:p>
          </table:table-cell>
          <table:table-cell table:formula="of:=[.K743]/[.F743]*100" office:value-type="float" office:value="0.864553314121036" calcext:value-type="float">
            <text:p>0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82" calcext:value-type="float">
            <text:p>82</text:p>
          </table:table-cell>
          <table:table-cell office:value-type="float" office:value="405" calcext:value-type="float">
            <text:p>405</text:p>
          </table:table-cell>
          <table:table-cell office:value-type="float" office:value="425" calcext:value-type="float">
            <text:p>425</text:p>
          </table:table-cell>
          <table:table-cell office:value-type="float" office:value="1.3889" calcext:value-type="float">
            <text:p>1.3889</text:p>
          </table:table-cell>
          <table:table-cell office:value-type="float" office:value="83.33" calcext:value-type="float">
            <text:p>83.33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44]-[.F744]" office:value-type="float" office:value="0.670000000000002" calcext:value-type="float">
            <text:p>0.670000000000002</text:p>
          </table:table-cell>
          <table:table-cell table:formula="of:=ABS([.J744])" office:value-type="float" office:value="0.670000000000002" calcext:value-type="float">
            <text:p>0.670000000000002</text:p>
          </table:table-cell>
          <table:table-cell table:formula="of:=[.K744]/[.F744]*100" office:value-type="float" office:value="0.804032161286454" calcext:value-type="float">
            <text:p>0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83" calcext:value-type="float">
            <text:p>83</text:p>
          </table:table-cell>
          <table:table-cell office:value-type="float" office:value="410" calcext:value-type="float">
            <text:p>410</text:p>
          </table:table-cell>
          <table:table-cell office:value-type="float" office:value="430" calcext:value-type="float">
            <text:p>430</text:p>
          </table:table-cell>
          <table:table-cell office:value-type="float" office:value="1.3954" calcext:value-type="float">
            <text:p>1.3954</text:p>
          </table:table-cell>
          <table:table-cell office:value-type="float" office:value="83.73" calcext:value-type="float">
            <text:p>83.7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745]-[.F745]" office:value-type="float" office:value="-2.73" calcext:value-type="float">
            <text:p>-2.73</text:p>
          </table:table-cell>
          <table:table-cell table:formula="of:=ABS([.J745])" office:value-type="float" office:value="2.73" calcext:value-type="float">
            <text:p>2.73</text:p>
          </table:table-cell>
          <table:table-cell table:formula="of:=[.K745]/[.F745]*100" office:value-type="float" office:value="3.26048011465425" calcext:value-type="float">
            <text:p>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09</text:p>
          </table:table-cell>
          <table:table-cell office:value-type="float" office:value="84" calcext:value-type="float">
            <text:p>84</text:p>
          </table:table-cell>
          <table:table-cell office:value-type="float" office:value="415" calcext:value-type="float">
            <text:p>415</text:p>
          </table:table-cell>
          <table:table-cell office:value-type="float" office:value="435" calcext:value-type="float">
            <text:p>435</text:p>
          </table:table-cell>
          <table:table-cell office:value-type="float" office:value="1.3897" calcext:value-type="float">
            <text:p>1.3897</text:p>
          </table:table-cell>
          <table:table-cell office:value-type="float" office:value="83.38" calcext:value-type="float">
            <text:p>83.3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746]-[.F746]" office:value-type="float" office:value="-2.38" calcext:value-type="float">
            <text:p>-2.38</text:p>
          </table:table-cell>
          <table:table-cell table:formula="of:=ABS([.J746])" office:value-type="float" office:value="2.38" calcext:value-type="float">
            <text:p>2.38</text:p>
          </table:table-cell>
          <table:table-cell table:formula="of:=[.K746]/[.F746]*100" office:value-type="float" office:value="2.85440153514032" calcext:value-type="float">
            <text:p>2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0199" calcext:value-type="float">
            <text:p>1.0199</text:p>
          </table:table-cell>
          <table:table-cell office:value-type="float" office:value="61.2" calcext:value-type="float">
            <text:p>61.2</text:p>
          </table:table-cell>
          <table:table-cell office:value-type="float" office:value="0.85" calcext:value-type="float">
            <text:p>0.8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[.H747]-[.F747]" office:value-type="float" office:value="-10.2" calcext:value-type="float">
            <text:p>-10.2</text:p>
          </table:table-cell>
          <table:table-cell table:formula="of:=ABS([.J747])" office:value-type="float" office:value="10.2" calcext:value-type="float">
            <text:p>10.2</text:p>
          </table:table-cell>
          <table:table-cell table:formula="of:=[.K747]/[.F747]*100" office:value-type="float" office:value="16.6666666666667" calcext:value-type="float">
            <text:p>16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0326" calcext:value-type="float">
            <text:p>1.0326</text:p>
          </table:table-cell>
          <table:table-cell office:value-type="float" office:value="61.95" calcext:value-type="float">
            <text:p>61.9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H748]-[.F748]" office:value-type="float" office:value="-10.95" calcext:value-type="float">
            <text:p>-10.95</text:p>
          </table:table-cell>
          <table:table-cell table:formula="of:=ABS([.J748])" office:value-type="float" office:value="10.95" calcext:value-type="float">
            <text:p>10.95</text:p>
          </table:table-cell>
          <table:table-cell table:formula="of:=[.K748]/[.F748]*100" office:value-type="float" office:value="17.6755447941889" calcext:value-type="float">
            <text:p>17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0417" calcext:value-type="float">
            <text:p>1.0417</text:p>
          </table:table-cell>
          <table:table-cell office:value-type="float" office:value="62.5" calcext:value-type="float">
            <text:p>62.5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formula="of:=[.H749]-[.F749]" office:value-type="float" office:value="-5.5" calcext:value-type="float">
            <text:p>-5.5</text:p>
          </table:table-cell>
          <table:table-cell table:formula="of:=ABS([.J749])" office:value-type="float" office:value="5.5" calcext:value-type="float">
            <text:p>5.5</text:p>
          </table:table-cell>
          <table:table-cell table:formula="of:=[.K749]/[.F749]*100" office:value-type="float" office:value="8.8" calcext:value-type="float">
            <text:p>8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0591" calcext:value-type="float">
            <text:p>1.0591</text:p>
          </table:table-cell>
          <table:table-cell office:value-type="float" office:value="63.54" calcext:value-type="float">
            <text:p>63.54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formula="of:=[.H750]-[.F750]" office:value-type="float" office:value="8.46" calcext:value-type="float">
            <text:p>8.46</text:p>
          </table:table-cell>
          <table:table-cell table:formula="of:=ABS([.J750])" office:value-type="float" office:value="8.46" calcext:value-type="float">
            <text:p>8.46</text:p>
          </table:table-cell>
          <table:table-cell table:formula="of:=[.K750]/[.F750]*100" office:value-type="float" office:value="13.314447592068" calcext:value-type="float">
            <text:p>1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.0573" calcext:value-type="float">
            <text:p>1.0573</text:p>
          </table:table-cell>
          <table:table-cell office:value-type="float" office:value="63.44" calcext:value-type="float">
            <text:p>63.44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formula="of:=[.H751]-[.F751]" office:value-type="float" office:value="8.56" calcext:value-type="float">
            <text:p>8.56</text:p>
          </table:table-cell>
          <table:table-cell table:formula="of:=ABS([.J751])" office:value-type="float" office:value="8.56" calcext:value-type="float">
            <text:p>8.56</text:p>
          </table:table-cell>
          <table:table-cell table:formula="of:=[.K751]/[.F751]*100" office:value-type="float" office:value="13.4930643127364" calcext:value-type="float">
            <text:p>13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0559" calcext:value-type="float">
            <text:p>1.0559</text:p>
          </table:table-cell>
          <table:table-cell office:value-type="float" office:value="63.35" calcext:value-type="float">
            <text:p>63.35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formula="of:=[.H752]-[.F752]" office:value-type="float" office:value="20.65" calcext:value-type="float">
            <text:p>20.65</text:p>
          </table:table-cell>
          <table:table-cell table:formula="of:=ABS([.J752])" office:value-type="float" office:value="20.65" calcext:value-type="float">
            <text:p>20.65</text:p>
          </table:table-cell>
          <table:table-cell table:formula="of:=[.K752]/[.F752]*100" office:value-type="float" office:value="32.5966850828729" calcext:value-type="float">
            <text:p>32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072" calcext:value-type="float">
            <text:p>1.072</text:p>
          </table:table-cell>
          <table:table-cell office:value-type="float" office:value="64.32" calcext:value-type="float">
            <text:p>64.3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753]-[.F753]" office:value-type="float" office:value="7.68000000000001" calcext:value-type="float">
            <text:p>7.68000000000001</text:p>
          </table:table-cell>
          <table:table-cell table:formula="of:=ABS([.J753])" office:value-type="float" office:value="7.68000000000001" calcext:value-type="float">
            <text:p>7.68000000000001</text:p>
          </table:table-cell>
          <table:table-cell table:formula="of:=[.K753]/[.F753]*100" office:value-type="float" office:value="11.9402985074627" calcext:value-type="float">
            <text:p>11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.0834" calcext:value-type="float">
            <text:p>1.0834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formula="of:=[.H754]-[.F754]" office:value-type="float" office:value="7" calcext:value-type="float">
            <text:p>7</text:p>
          </table:table-cell>
          <table:table-cell table:formula="of:=ABS([.J754])" office:value-type="float" office:value="7" calcext:value-type="float">
            <text:p>7</text:p>
          </table:table-cell>
          <table:table-cell table:formula="of:=[.K754]/[.F754]*100" office:value-type="float" office:value="10.7692307692308" calcext:value-type="float">
            <text:p>10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.1045" calcext:value-type="float">
            <text:p>1.1045</text:p>
          </table:table-cell>
          <table:table-cell office:value-type="float" office:value="66.27" calcext:value-type="float">
            <text:p>66.27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formula="of:=[.H755]-[.F755]" office:value-type="float" office:value="2.73" calcext:value-type="float">
            <text:p>2.73</text:p>
          </table:table-cell>
          <table:table-cell table:formula="of:=ABS([.J755])" office:value-type="float" office:value="2.73" calcext:value-type="float">
            <text:p>2.73</text:p>
          </table:table-cell>
          <table:table-cell table:formula="of:=[.K755]/[.F755]*100" office:value-type="float" office:value="4.11951109099141" calcext:value-type="float">
            <text:p>4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.0855" calcext:value-type="float">
            <text:p>1.0855</text:p>
          </table:table-cell>
          <table:table-cell office:value-type="float" office:value="65.13" calcext:value-type="float">
            <text:p>65.13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H756]-[.F756]" office:value-type="float" office:value="3.87" calcext:value-type="float">
            <text:p>3.87</text:p>
          </table:table-cell>
          <table:table-cell table:formula="of:=ABS([.J756])" office:value-type="float" office:value="3.87" calcext:value-type="float">
            <text:p>3.87</text:p>
          </table:table-cell>
          <table:table-cell table:formula="of:=[.K756]/[.F756]*100" office:value-type="float" office:value="5.94196222938739" calcext:value-type="float">
            <text:p>5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0693" calcext:value-type="float">
            <text:p>1.0693</text:p>
          </table:table-cell>
          <table:table-cell office:value-type="float" office:value="64.16" calcext:value-type="float">
            <text:p>64.16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formula="of:=[.H757]-[.F757]" office:value-type="float" office:value="1.84" calcext:value-type="float">
            <text:p>1.84</text:p>
          </table:table-cell>
          <table:table-cell table:formula="of:=ABS([.J757])" office:value-type="float" office:value="1.84" calcext:value-type="float">
            <text:p>1.84</text:p>
          </table:table-cell>
          <table:table-cell table:formula="of:=[.K757]/[.F757]*100" office:value-type="float" office:value="2.86783042394016" calcext:value-type="float">
            <text:p>2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.0457" calcext:value-type="float">
            <text:p>1.0457</text:p>
          </table:table-cell>
          <table:table-cell office:value-type="float" office:value="62.74" calcext:value-type="float">
            <text:p>62.7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758]-[.F758]" office:value-type="float" office:value="3.26" calcext:value-type="float">
            <text:p>3.26</text:p>
          </table:table-cell>
          <table:table-cell table:formula="of:=ABS([.J758])" office:value-type="float" office:value="3.26" calcext:value-type="float">
            <text:p>3.26</text:p>
          </table:table-cell>
          <table:table-cell table:formula="of:=[.K758]/[.F758]*100" office:value-type="float" office:value="5.19604717883328" calcext:value-type="float">
            <text:p>5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0184" calcext:value-type="float">
            <text:p>1.0184</text:p>
          </table:table-cell>
          <table:table-cell office:value-type="float" office:value="61.11" calcext:value-type="float">
            <text:p>61.1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759]-[.F759]" office:value-type="float" office:value="1.89" calcext:value-type="float">
            <text:p>1.89</text:p>
          </table:table-cell>
          <table:table-cell table:formula="of:=ABS([.J759])" office:value-type="float" office:value="1.89" calcext:value-type="float">
            <text:p>1.89</text:p>
          </table:table-cell>
          <table:table-cell table:formula="of:=[.K759]/[.F759]*100" office:value-type="float" office:value="3.09278350515464" calcext:value-type="float">
            <text:p>3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.0104" calcext:value-type="float">
            <text:p>1.0104</text:p>
          </table:table-cell>
          <table:table-cell office:value-type="float" office:value="60.62" calcext:value-type="float">
            <text:p>60.6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760]-[.F760]" office:value-type="float" office:value="2.38" calcext:value-type="float">
            <text:p>2.38</text:p>
          </table:table-cell>
          <table:table-cell table:formula="of:=ABS([.J760])" office:value-type="float" office:value="2.38" calcext:value-type="float">
            <text:p>2.38</text:p>
          </table:table-cell>
          <table:table-cell table:formula="of:=[.K760]/[.F760]*100" office:value-type="float" office:value="3.92609699769054" calcext:value-type="float">
            <text:p>3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0.9831" calcext:value-type="float">
            <text:p>0.9831</text:p>
          </table:table-cell>
          <table:table-cell office:value-type="float" office:value="58.99" calcext:value-type="float">
            <text:p>58.9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H761]-[.F761]" office:value-type="float" office:value="1.01" calcext:value-type="float">
            <text:p>1.01</text:p>
          </table:table-cell>
          <table:table-cell table:formula="of:=ABS([.J761])" office:value-type="float" office:value="1.01" calcext:value-type="float">
            <text:p>1.01</text:p>
          </table:table-cell>
          <table:table-cell table:formula="of:=[.K761]/[.F761]*100" office:value-type="float" office:value="1.71215460247499" calcext:value-type="float">
            <text:p>1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.9805" calcext:value-type="float">
            <text:p>0.9805</text:p>
          </table:table-cell>
          <table:table-cell office:value-type="float" office:value="58.83" calcext:value-type="float">
            <text:p>58.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H762]-[.F762]" office:value-type="float" office:value="1.17" calcext:value-type="float">
            <text:p>1.17</text:p>
          </table:table-cell>
          <table:table-cell table:formula="of:=ABS([.J762])" office:value-type="float" office:value="1.17" calcext:value-type="float">
            <text:p>1.17</text:p>
          </table:table-cell>
          <table:table-cell table:formula="of:=[.K762]/[.F762]*100" office:value-type="float" office:value="1.98878123406426" calcext:value-type="float">
            <text:p>2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9853" calcext:value-type="float">
            <text:p>0.9853</text:p>
          </table:table-cell>
          <table:table-cell office:value-type="float" office:value="59.12" calcext:value-type="float">
            <text:p>59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763]-[.F763]" office:value-type="float" office:value="0.880000000000003" calcext:value-type="float">
            <text:p>0.880000000000003</text:p>
          </table:table-cell>
          <table:table-cell table:formula="of:=ABS([.J763])" office:value-type="float" office:value="0.880000000000003" calcext:value-type="float">
            <text:p>0.880000000000003</text:p>
          </table:table-cell>
          <table:table-cell table:formula="of:=[.K763]/[.F763]*100" office:value-type="float" office:value="1.48849797023005" calcext:value-type="float">
            <text:p>1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0.997" calcext:value-type="float">
            <text:p>0.997</text:p>
          </table:table-cell>
          <table:table-cell office:value-type="float" office:value="59.82" calcext:value-type="float">
            <text:p>59.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764]-[.F764]" office:value-type="float" office:value="0.18" calcext:value-type="float">
            <text:p>0.18</text:p>
          </table:table-cell>
          <table:table-cell table:formula="of:=ABS([.J764])" office:value-type="float" office:value="0.18" calcext:value-type="float">
            <text:p>0.18</text:p>
          </table:table-cell>
          <table:table-cell table:formula="of:=[.K764]/[.F764]*100" office:value-type="float" office:value="0.300902708124373" calcext:value-type="float">
            <text:p>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.0076" calcext:value-type="float">
            <text:p>1.0076</text:p>
          </table:table-cell>
          <table:table-cell office:value-type="float" office:value="60.45" calcext:value-type="float">
            <text:p>60.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765]-[.F765]" office:value-type="float" office:value="-0.450000000000003" calcext:value-type="float">
            <text:p>-0.450000000000003</text:p>
          </table:table-cell>
          <table:table-cell table:formula="of:=ABS([.J765])" office:value-type="float" office:value="0.450000000000003" calcext:value-type="float">
            <text:p>0.450000000000003</text:p>
          </table:table-cell>
          <table:table-cell table:formula="of:=[.K765]/[.F765]*100" office:value-type="float" office:value="0.744416873449136" calcext:value-type="float">
            <text:p>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.0013" calcext:value-type="float">
            <text:p>1.0013</text:p>
          </table:table-cell>
          <table:table-cell office:value-type="float" office:value="60.08" calcext:value-type="float">
            <text:p>60.0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formula="of:=[.H766]-[.F766]" office:value-type="float" office:value="-0.0799999999999983" calcext:value-type="float">
            <text:p>-0.0799999999999983</text:p>
          </table:table-cell>
          <table:table-cell table:formula="of:=ABS([.J766])" office:value-type="float" office:value="0.0799999999999983" calcext:value-type="float">
            <text:p>0.0799999999999983</text:p>
          </table:table-cell>
          <table:table-cell table:formula="of:=[.K766]/[.F766]*100" office:value-type="float" office:value="0.133155792276961" calcext:value-type="float">
            <text:p>0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0.9827" calcext:value-type="float">
            <text:p>0.9827</text:p>
          </table:table-cell>
          <table:table-cell office:value-type="float" office:value="58.96" calcext:value-type="float">
            <text:p>58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767]-[.F767]" office:value-type="float" office:value="1.04" calcext:value-type="float">
            <text:p>1.04</text:p>
          </table:table-cell>
          <table:table-cell table:formula="of:=ABS([.J767])" office:value-type="float" office:value="1.04" calcext:value-type="float">
            <text:p>1.04</text:p>
          </table:table-cell>
          <table:table-cell table:formula="of:=[.K767]/[.F767]*100" office:value-type="float" office:value="1.76390773405699" calcext:value-type="float">
            <text:p>1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0.9623" calcext:value-type="float">
            <text:p>0.9623</text:p>
          </table:table-cell>
          <table:table-cell office:value-type="float" office:value="57.74" calcext:value-type="float">
            <text:p>57.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768]-[.F768]" office:value-type="float" office:value="2.26" calcext:value-type="float">
            <text:p>2.26</text:p>
          </table:table-cell>
          <table:table-cell table:formula="of:=ABS([.J768])" office:value-type="float" office:value="2.26" calcext:value-type="float">
            <text:p>2.26</text:p>
          </table:table-cell>
          <table:table-cell table:formula="of:=[.K768]/[.F768]*100" office:value-type="float" office:value="3.91409767925181" calcext:value-type="float">
            <text:p>3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0.9543" calcext:value-type="float">
            <text:p>0.9543</text:p>
          </table:table-cell>
          <table:table-cell office:value-type="float" office:value="57.26" calcext:value-type="float">
            <text:p>57.2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H769]-[.F769]" office:value-type="float" office:value="2.74" calcext:value-type="float">
            <text:p>2.74</text:p>
          </table:table-cell>
          <table:table-cell table:formula="of:=ABS([.J769])" office:value-type="float" office:value="2.74" calcext:value-type="float">
            <text:p>2.74</text:p>
          </table:table-cell>
          <table:table-cell table:formula="of:=[.K769]/[.F769]*100" office:value-type="float" office:value="4.78519035976249" calcext:value-type="float">
            <text:p>4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0.9517" calcext:value-type="float">
            <text:p>0.9517</text:p>
          </table:table-cell>
          <table:table-cell office:value-type="float" office:value="57.1" calcext:value-type="float">
            <text:p>57.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H770]-[.F770]" office:value-type="float" office:value="2.9" calcext:value-type="float">
            <text:p>2.9</text:p>
          </table:table-cell>
          <table:table-cell table:formula="of:=ABS([.J770])" office:value-type="float" office:value="2.9" calcext:value-type="float">
            <text:p>2.9</text:p>
          </table:table-cell>
          <table:table-cell table:formula="of:=[.K770]/[.F770]*100" office:value-type="float" office:value="5.07880910683012" calcext:value-type="float">
            <text:p>5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0.9651" calcext:value-type="float">
            <text:p>0.9651</text:p>
          </table:table-cell>
          <table:table-cell office:value-type="float" office:value="57.91" calcext:value-type="float">
            <text:p>57.91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formula="of:=[.H771]-[.F771]" office:value-type="float" office:value="5.09" calcext:value-type="float">
            <text:p>5.09</text:p>
          </table:table-cell>
          <table:table-cell table:formula="of:=ABS([.J771])" office:value-type="float" office:value="5.09" calcext:value-type="float">
            <text:p>5.09</text:p>
          </table:table-cell>
          <table:table-cell table:formula="of:=[.K771]/[.F771]*100" office:value-type="float" office:value="8.78950094974962" calcext:value-type="float">
            <text:p>8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0.9868" calcext:value-type="float">
            <text:p>0.9868</text:p>
          </table:table-cell>
          <table:table-cell office:value-type="float" office:value="59.21" calcext:value-type="float">
            <text:p>59.21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H772]-[.F772]" office:value-type="float" office:value="6.79" calcext:value-type="float">
            <text:p>6.79</text:p>
          </table:table-cell>
          <table:table-cell table:formula="of:=ABS([.J772])" office:value-type="float" office:value="6.79" calcext:value-type="float">
            <text:p>6.79</text:p>
          </table:table-cell>
          <table:table-cell table:formula="of:=[.K772]/[.F772]*100" office:value-type="float" office:value="11.4676574902888" calcext:value-type="float">
            <text:p>11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.0005" calcext:value-type="float">
            <text:p>1.0005</text:p>
          </table:table-cell>
          <table:table-cell office:value-type="float" office:value="60.03" calcext:value-type="float">
            <text:p>60.03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table:formula="of:=[.H773]-[.F773]" office:value-type="float" office:value="14.97" calcext:value-type="float">
            <text:p>14.97</text:p>
          </table:table-cell>
          <table:table-cell table:formula="of:=ABS([.J773])" office:value-type="float" office:value="14.97" calcext:value-type="float">
            <text:p>14.97</text:p>
          </table:table-cell>
          <table:table-cell table:formula="of:=[.K773]/[.F773]*100" office:value-type="float" office:value="24.9375312343828" calcext:value-type="float">
            <text:p>24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.0069" calcext:value-type="float">
            <text:p>1.0069</text:p>
          </table:table-cell>
          <table:table-cell office:value-type="float" office:value="60.42" calcext:value-type="float">
            <text:p>60.42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table:formula="of:=[.H774]-[.F774]" office:value-type="float" office:value="5.58" calcext:value-type="float">
            <text:p>5.58</text:p>
          </table:table-cell>
          <table:table-cell table:formula="of:=ABS([.J774])" office:value-type="float" office:value="5.58" calcext:value-type="float">
            <text:p>5.58</text:p>
          </table:table-cell>
          <table:table-cell table:formula="of:=[.K774]/[.F774]*100" office:value-type="float" office:value="9.23535253227408" calcext:value-type="float">
            <text:p>9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0.9972" calcext:value-type="float">
            <text:p>0.9972</text:p>
          </table:table-cell>
          <table:table-cell office:value-type="float" office:value="59.83" calcext:value-type="float">
            <text:p>59.83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775]-[.F775]" office:value-type="float" office:value="27.17" calcext:value-type="float">
            <text:p>27.17</text:p>
          </table:table-cell>
          <table:table-cell table:formula="of:=ABS([.J775])" office:value-type="float" office:value="27.17" calcext:value-type="float">
            <text:p>27.17</text:p>
          </table:table-cell>
          <table:table-cell table:formula="of:=[.K775]/[.F775]*100" office:value-type="float" office:value="45.4120006685609" calcext:value-type="float">
            <text:p>45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0.9783" calcext:value-type="float">
            <text:p>0.9783</text:p>
          </table:table-cell>
          <table:table-cell office:value-type="float" office:value="58.7" calcext:value-type="float">
            <text:p>58.7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formula="of:=[.H776]-[.F776]" office:value-type="float" office:value="28.3" calcext:value-type="float">
            <text:p>28.3</text:p>
          </table:table-cell>
          <table:table-cell table:formula="of:=ABS([.J776])" office:value-type="float" office:value="28.3" calcext:value-type="float">
            <text:p>28.3</text:p>
          </table:table-cell>
          <table:table-cell table:formula="of:=[.K776]/[.F776]*100" office:value-type="float" office:value="48.2112436115843" calcext:value-type="float">
            <text:p>48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0.9637" calcext:value-type="float">
            <text:p>0.9637</text:p>
          </table:table-cell>
          <table:table-cell office:value-type="float" office:value="57.82" calcext:value-type="float">
            <text:p>57.82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777]-[.F777]" office:value-type="float" office:value="35.18" calcext:value-type="float">
            <text:p>35.18</text:p>
          </table:table-cell>
          <table:table-cell table:formula="of:=ABS([.J777])" office:value-type="float" office:value="35.18" calcext:value-type="float">
            <text:p>35.18</text:p>
          </table:table-cell>
          <table:table-cell table:formula="of:=[.K777]/[.F777]*100" office:value-type="float" office:value="60.8439986163957" calcext:value-type="float">
            <text:p>60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0.9605" calcext:value-type="float">
            <text:p>0.9605</text:p>
          </table:table-cell>
          <table:table-cell office:value-type="float" office:value="57.63" calcext:value-type="float">
            <text:p>57.63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formula="of:=[.H778]-[.F778]" office:value-type="float" office:value="35.37" calcext:value-type="float">
            <text:p>35.37</text:p>
          </table:table-cell>
          <table:table-cell table:formula="of:=ABS([.J778])" office:value-type="float" office:value="35.37" calcext:value-type="float">
            <text:p>35.37</text:p>
          </table:table-cell>
          <table:table-cell table:formula="of:=[.K778]/[.F778]*100" office:value-type="float" office:value="61.3742842269651" calcext:value-type="float">
            <text:p>6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0.9733" calcext:value-type="float">
            <text:p>0.9733</text:p>
          </table:table-cell>
          <table:table-cell office:value-type="float" office:value="58.4" calcext:value-type="float">
            <text:p>58.4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formula="of:=[.H779]-[.F779]" office:value-type="float" office:value="34.6" calcext:value-type="float">
            <text:p>34.6</text:p>
          </table:table-cell>
          <table:table-cell table:formula="of:=ABS([.J779])" office:value-type="float" office:value="34.6" calcext:value-type="float">
            <text:p>34.6</text:p>
          </table:table-cell>
          <table:table-cell table:formula="of:=[.K779]/[.F779]*100" office:value-type="float" office:value="59.2465753424658" calcext:value-type="float">
            <text:p>59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0.981" calcext:value-type="float">
            <text:p>0.981</text:p>
          </table:table-cell>
          <table:table-cell office:value-type="float" office:value="58.86" calcext:value-type="float">
            <text:p>58.86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table:formula="of:=[.H780]-[.F780]" office:value-type="float" office:value="34.14" calcext:value-type="float">
            <text:p>34.14</text:p>
          </table:table-cell>
          <table:table-cell table:formula="of:=ABS([.J780])" office:value-type="float" office:value="34.14" calcext:value-type="float">
            <text:p>34.14</text:p>
          </table:table-cell>
          <table:table-cell table:formula="of:=[.K780]/[.F780]*100" office:value-type="float" office:value="58.0020387359837" calcext:value-type="float">
            <text:p>58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.0082" calcext:value-type="float">
            <text:p>1.0082</text:p>
          </table:table-cell>
          <table:table-cell office:value-type="float" office:value="60.49" calcext:value-type="float">
            <text:p>60.49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formula="of:=[.H781]-[.F781]" office:value-type="float" office:value="29.51" calcext:value-type="float">
            <text:p>29.51</text:p>
          </table:table-cell>
          <table:table-cell table:formula="of:=ABS([.J781])" office:value-type="float" office:value="29.51" calcext:value-type="float">
            <text:p>29.51</text:p>
          </table:table-cell>
          <table:table-cell table:formula="of:=[.K781]/[.F781]*100" office:value-type="float" office:value="48.7849231277897" calcext:value-type="float">
            <text:p>48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.0159" calcext:value-type="float">
            <text:p>1.0159</text:p>
          </table:table-cell>
          <table:table-cell office:value-type="float" office:value="60.96" calcext:value-type="float">
            <text:p>60.96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[.H782]-[.F782]" office:value-type="float" office:value="23.04" calcext:value-type="float">
            <text:p>23.04</text:p>
          </table:table-cell>
          <table:table-cell table:formula="of:=ABS([.J782])" office:value-type="float" office:value="23.04" calcext:value-type="float">
            <text:p>23.04</text:p>
          </table:table-cell>
          <table:table-cell table:formula="of:=[.K782]/[.F782]*100" office:value-type="float" office:value="37.7952755905512" calcext:value-type="float">
            <text:p>37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.0259" calcext:value-type="float">
            <text:p>1.0259</text:p>
          </table:table-cell>
          <table:table-cell office:value-type="float" office:value="61.55" calcext:value-type="float">
            <text:p>61.55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H783]-[.F783]" office:value-type="float" office:value="22.45" calcext:value-type="float">
            <text:p>22.45</text:p>
          </table:table-cell>
          <table:table-cell table:formula="of:=ABS([.J783])" office:value-type="float" office:value="22.45" calcext:value-type="float">
            <text:p>22.45</text:p>
          </table:table-cell>
          <table:table-cell table:formula="of:=[.K783]/[.F783]*100" office:value-type="float" office:value="36.4744110479285" calcext:value-type="float">
            <text:p>36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.0415" calcext:value-type="float">
            <text:p>1.0415</text:p>
          </table:table-cell>
          <table:table-cell office:value-type="float" office:value="62.49" calcext:value-type="float">
            <text:p>62.49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784]-[.F784]" office:value-type="float" office:value="-5.49" calcext:value-type="float">
            <text:p>-5.49</text:p>
          </table:table-cell>
          <table:table-cell table:formula="of:=ABS([.J784])" office:value-type="float" office:value="5.49" calcext:value-type="float">
            <text:p>5.49</text:p>
          </table:table-cell>
          <table:table-cell table:formula="of:=[.K784]/[.F784]*100" office:value-type="float" office:value="8.78540566490639" calcext:value-type="float">
            <text:p>8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.0399" calcext:value-type="float">
            <text:p>1.0399</text:p>
          </table:table-cell>
          <table:table-cell office:value-type="float" office:value="62.4" calcext:value-type="float">
            <text:p>62.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785]-[.F785]" office:value-type="float" office:value="-5.4" calcext:value-type="float">
            <text:p>-5.4</text:p>
          </table:table-cell>
          <table:table-cell table:formula="of:=ABS([.J785])" office:value-type="float" office:value="5.4" calcext:value-type="float">
            <text:p>5.4</text:p>
          </table:table-cell>
          <table:table-cell table:formula="of:=[.K785]/[.F785]*100" office:value-type="float" office:value="8.65384615384615" calcext:value-type="float">
            <text:p>8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.0409" calcext:value-type="float">
            <text:p>1.0409</text:p>
          </table:table-cell>
          <table:table-cell office:value-type="float" office:value="62.45" calcext:value-type="float">
            <text:p>62.45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786]-[.F786]" office:value-type="float" office:value="-5.45" calcext:value-type="float">
            <text:p>-5.45</text:p>
          </table:table-cell>
          <table:table-cell table:formula="of:=ABS([.J786])" office:value-type="float" office:value="5.45" calcext:value-type="float">
            <text:p>5.45</text:p>
          </table:table-cell>
          <table:table-cell table:formula="of:=[.K786]/[.F786]*100" office:value-type="float" office:value="8.72698158526822" calcext:value-type="float">
            <text:p>8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1.0397" calcext:value-type="float">
            <text:p>1.0397</text:p>
          </table:table-cell>
          <table:table-cell office:value-type="float" office:value="62.38" calcext:value-type="float">
            <text:p>62.38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formula="of:=[.H787]-[.F787]" office:value-type="float" office:value="0.619999999999997" calcext:value-type="float">
            <text:p>0.619999999999997</text:p>
          </table:table-cell>
          <table:table-cell table:formula="of:=ABS([.J787])" office:value-type="float" office:value="0.619999999999997" calcext:value-type="float">
            <text:p>0.619999999999997</text:p>
          </table:table-cell>
          <table:table-cell table:formula="of:=[.K787]/[.F787]*100" office:value-type="float" office:value="0.993908303943567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1.036" calcext:value-type="float">
            <text:p>1.036</text:p>
          </table:table-cell>
          <table:table-cell office:value-type="float" office:value="62.16" calcext:value-type="float">
            <text:p>62.16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788]-[.F788]" office:value-type="float" office:value="0.840000000000003" calcext:value-type="float">
            <text:p>0.840000000000003</text:p>
          </table:table-cell>
          <table:table-cell table:formula="of:=ABS([.J788])" office:value-type="float" office:value="0.840000000000003" calcext:value-type="float">
            <text:p>0.840000000000003</text:p>
          </table:table-cell>
          <table:table-cell table:formula="of:=[.K788]/[.F788]*100" office:value-type="float" office:value="1.35135135135136" calcext:value-type="float">
            <text:p>1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1.0281" calcext:value-type="float">
            <text:p>1.0281</text:p>
          </table:table-cell>
          <table:table-cell office:value-type="float" office:value="61.69" calcext:value-type="float">
            <text:p>61.69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789]-[.F789]" office:value-type="float" office:value="1.31" calcext:value-type="float">
            <text:p>1.31</text:p>
          </table:table-cell>
          <table:table-cell table:formula="of:=ABS([.J789])" office:value-type="float" office:value="1.31" calcext:value-type="float">
            <text:p>1.31</text:p>
          </table:table-cell>
          <table:table-cell table:formula="of:=[.K789]/[.F789]*100" office:value-type="float" office:value="2.12352082995624" calcext:value-type="float">
            <text:p>2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.0264" calcext:value-type="float">
            <text:p>1.0264</text:p>
          </table:table-cell>
          <table:table-cell office:value-type="float" office:value="61.58" calcext:value-type="float">
            <text:p>61.58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H790]-[.F790]" office:value-type="float" office:value="1.42" calcext:value-type="float">
            <text:p>1.42</text:p>
          </table:table-cell>
          <table:table-cell table:formula="of:=ABS([.J790])" office:value-type="float" office:value="1.42" calcext:value-type="float">
            <text:p>1.42</text:p>
          </table:table-cell>
          <table:table-cell table:formula="of:=[.K790]/[.F790]*100" office:value-type="float" office:value="2.3059434881455" calcext:value-type="float">
            <text:p>2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1.0092" calcext:value-type="float">
            <text:p>1.0092</text:p>
          </table:table-cell>
          <table:table-cell office:value-type="float" office:value="60.55" calcext:value-type="float">
            <text:p>60.55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H791]-[.F791]" office:value-type="float" office:value="2.45" calcext:value-type="float">
            <text:p>2.45</text:p>
          </table:table-cell>
          <table:table-cell table:formula="of:=ABS([.J791])" office:value-type="float" office:value="2.45" calcext:value-type="float">
            <text:p>2.45</text:p>
          </table:table-cell>
          <table:table-cell table:formula="of:=[.K791]/[.F791]*100" office:value-type="float" office:value="4.04624277456648" calcext:value-type="float">
            <text:p>4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.0203" calcext:value-type="float">
            <text:p>1.0203</text:p>
          </table:table-cell>
          <table:table-cell office:value-type="float" office:value="61.22" calcext:value-type="float">
            <text:p>61.22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formula="of:=[.H792]-[.F792]" office:value-type="float" office:value="1.78" calcext:value-type="float">
            <text:p>1.78</text:p>
          </table:table-cell>
          <table:table-cell table:formula="of:=ABS([.J792])" office:value-type="float" office:value="1.78" calcext:value-type="float">
            <text:p>1.78</text:p>
          </table:table-cell>
          <table:table-cell table:formula="of:=[.K792]/[.F792]*100" office:value-type="float" office:value="2.90754655341392" calcext:value-type="float">
            <text:p>2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.0139" calcext:value-type="float">
            <text:p>1.0139</text:p>
          </table:table-cell>
          <table:table-cell office:value-type="float" office:value="60.84" calcext:value-type="float">
            <text:p>60.84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793]-[.F793]" office:value-type="float" office:value="2.16" calcext:value-type="float">
            <text:p>2.16</text:p>
          </table:table-cell>
          <table:table-cell table:formula="of:=ABS([.J793])" office:value-type="float" office:value="2.16" calcext:value-type="float">
            <text:p>2.16</text:p>
          </table:table-cell>
          <table:table-cell table:formula="of:=[.K793]/[.F793]*100" office:value-type="float" office:value="3.55029585798816" calcext:value-type="float">
            <text:p>3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.0205" calcext:value-type="float">
            <text:p>1.0205</text:p>
          </table:table-cell>
          <table:table-cell office:value-type="float" office:value="61.23" calcext:value-type="float">
            <text:p>61.23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794]-[.F794]" office:value-type="float" office:value="1.77" calcext:value-type="float">
            <text:p>1.77</text:p>
          </table:table-cell>
          <table:table-cell table:formula="of:=ABS([.J794])" office:value-type="float" office:value="1.77" calcext:value-type="float">
            <text:p>1.77</text:p>
          </table:table-cell>
          <table:table-cell table:formula="of:=[.K794]/[.F794]*100" office:value-type="float" office:value="2.890739833415" calcext:value-type="float">
            <text:p>2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1.0261" calcext:value-type="float">
            <text:p>1.0261</text:p>
          </table:table-cell>
          <table:table-cell office:value-type="float" office:value="61.57" calcext:value-type="float">
            <text:p>61.57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H795]-[.F795]" office:value-type="float" office:value="1.43" calcext:value-type="float">
            <text:p>1.43</text:p>
          </table:table-cell>
          <table:table-cell table:formula="of:=ABS([.J795])" office:value-type="float" office:value="1.43" calcext:value-type="float">
            <text:p>1.43</text:p>
          </table:table-cell>
          <table:table-cell table:formula="of:=[.K795]/[.F795]*100" office:value-type="float" office:value="2.32255968815982" calcext:value-type="float">
            <text:p>2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1.0131" calcext:value-type="float">
            <text:p>1.0131</text:p>
          </table:table-cell>
          <table:table-cell office:value-type="float" office:value="60.79" calcext:value-type="float">
            <text:p>60.79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796]-[.F796]" office:value-type="float" office:value="32.21" calcext:value-type="float">
            <text:p>32.21</text:p>
          </table:table-cell>
          <table:table-cell table:formula="of:=ABS([.J796])" office:value-type="float" office:value="32.21" calcext:value-type="float">
            <text:p>32.21</text:p>
          </table:table-cell>
          <table:table-cell table:formula="of:=[.K796]/[.F796]*100" office:value-type="float" office:value="52.985688435598" calcext:value-type="float">
            <text:p>53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0.998" calcext:value-type="float">
            <text:p>0.998</text:p>
          </table:table-cell>
          <table:table-cell office:value-type="float" office:value="59.88" calcext:value-type="float">
            <text:p>59.88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H797]-[.F797]" office:value-type="float" office:value="33.12" calcext:value-type="float">
            <text:p>33.12</text:p>
          </table:table-cell>
          <table:table-cell table:formula="of:=ABS([.J797])" office:value-type="float" office:value="33.12" calcext:value-type="float">
            <text:p>33.12</text:p>
          </table:table-cell>
          <table:table-cell table:formula="of:=[.K797]/[.F797]*100" office:value-type="float" office:value="55.310621242485" calcext:value-type="float">
            <text:p>55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office:value-type="float" office:value="0.9853" calcext:value-type="float">
            <text:p>0.9853</text:p>
          </table:table-cell>
          <table:table-cell office:value-type="float" office:value="59.12" calcext:value-type="float">
            <text:p>59.12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formula="of:=[.H798]-[.F798]" office:value-type="float" office:value="33.88" calcext:value-type="float">
            <text:p>33.88</text:p>
          </table:table-cell>
          <table:table-cell table:formula="of:=ABS([.J798])" office:value-type="float" office:value="33.88" calcext:value-type="float">
            <text:p>33.88</text:p>
          </table:table-cell>
          <table:table-cell table:formula="of:=[.K798]/[.F798]*100" office:value-type="float" office:value="57.3071718538566" calcext:value-type="float">
            <text:p>57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1.009" calcext:value-type="float">
            <text:p>1.009</text:p>
          </table:table-cell>
          <table:table-cell office:value-type="float" office:value="60.54" calcext:value-type="float">
            <text:p>60.5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H799]-[.F799]" office:value-type="float" office:value="17.46" calcext:value-type="float">
            <text:p>17.46</text:p>
          </table:table-cell>
          <table:table-cell table:formula="of:=ABS([.J799])" office:value-type="float" office:value="17.46" calcext:value-type="float">
            <text:p>17.46</text:p>
          </table:table-cell>
          <table:table-cell table:formula="of:=[.K799]/[.F799]*100" office:value-type="float" office:value="28.8404360753221" calcext:value-type="float">
            <text:p>28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1.0411" calcext:value-type="float">
            <text:p>1.0411</text:p>
          </table:table-cell>
          <table:table-cell office:value-type="float" office:value="62.46" calcext:value-type="float">
            <text:p>62.4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H800]-[.F800]" office:value-type="float" office:value="9.54" calcext:value-type="float">
            <text:p>9.54</text:p>
          </table:table-cell>
          <table:table-cell table:formula="of:=ABS([.J800])" office:value-type="float" office:value="9.54" calcext:value-type="float">
            <text:p>9.54</text:p>
          </table:table-cell>
          <table:table-cell table:formula="of:=[.K800]/[.F800]*100" office:value-type="float" office:value="15.2737752161383" calcext:value-type="float">
            <text:p>15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1.0691" calcext:value-type="float">
            <text:p>1.0691</text:p>
          </table:table-cell>
          <table:table-cell office:value-type="float" office:value="64.15" calcext:value-type="float">
            <text:p>64.15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formula="of:=[.H801]-[.F801]" office:value-type="float" office:value="4.84999999999999" calcext:value-type="float">
            <text:p>4.84999999999999</text:p>
          </table:table-cell>
          <table:table-cell table:formula="of:=ABS([.J801])" office:value-type="float" office:value="4.84999999999999" calcext:value-type="float">
            <text:p>4.84999999999999</text:p>
          </table:table-cell>
          <table:table-cell table:formula="of:=[.K801]/[.F801]*100" office:value-type="float" office:value="7.56040530007793" calcext:value-type="float">
            <text:p>7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1.0764" calcext:value-type="float">
            <text:p>1.0764</text:p>
          </table:table-cell>
          <table:table-cell office:value-type="float" office:value="64.58" calcext:value-type="float">
            <text:p>64.58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formula="of:=[.H802]-[.F802]" office:value-type="float" office:value="1.42" calcext:value-type="float">
            <text:p>1.42</text:p>
          </table:table-cell>
          <table:table-cell table:formula="of:=ABS([.J802])" office:value-type="float" office:value="1.42" calcext:value-type="float">
            <text:p>1.42</text:p>
          </table:table-cell>
          <table:table-cell table:formula="of:=[.K802]/[.F802]*100" office:value-type="float" office:value="2.19882316506659" calcext:value-type="float">
            <text:p>2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57" calcext:value-type="float">
            <text:p>57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1.0583" calcext:value-type="float">
            <text:p>1.0583</text:p>
          </table:table-cell>
          <table:table-cell office:value-type="float" office:value="63.5" calcext:value-type="float">
            <text:p>6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803]-[.F803]" office:value-type="float" office:value="-3.5" calcext:value-type="float">
            <text:p>-3.5</text:p>
          </table:table-cell>
          <table:table-cell table:formula="of:=ABS([.J803])" office:value-type="float" office:value="3.5" calcext:value-type="float">
            <text:p>3.5</text:p>
          </table:table-cell>
          <table:table-cell table:formula="of:=[.K803]/[.F803]*100" office:value-type="float" office:value="5.51181102362205" calcext:value-type="float">
            <text:p>5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58" calcext:value-type="float">
            <text:p>58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1.0211" calcext:value-type="float">
            <text:p>1.0211</text:p>
          </table:table-cell>
          <table:table-cell office:value-type="float" office:value="61.27" calcext:value-type="float">
            <text:p>61.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804]-[.F804]" office:value-type="float" office:value="-1.27" calcext:value-type="float">
            <text:p>-1.27</text:p>
          </table:table-cell>
          <table:table-cell table:formula="of:=ABS([.J804])" office:value-type="float" office:value="1.27" calcext:value-type="float">
            <text:p>1.27</text:p>
          </table:table-cell>
          <table:table-cell table:formula="of:=[.K804]/[.F804]*100" office:value-type="float" office:value="2.07279255753224" calcext:value-type="float">
            <text:p>2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59" calcext:value-type="float">
            <text:p>59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1.0004" calcext:value-type="float">
            <text:p>1.0004</text:p>
          </table:table-cell>
          <table:table-cell office:value-type="float" office:value="60.02" calcext:value-type="float">
            <text:p>60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805]-[.F805]" office:value-type="float" office:value="-0.0200000000000031" calcext:value-type="float">
            <text:p>-0.0200000000000031</text:p>
          </table:table-cell>
          <table:table-cell table:formula="of:=ABS([.J805])" office:value-type="float" office:value="0.0200000000000031" calcext:value-type="float">
            <text:p>0.0200000000000031</text:p>
          </table:table-cell>
          <table:table-cell table:formula="of:=[.K805]/[.F805]*100" office:value-type="float" office:value="0.033322225924697" calcext:value-type="float">
            <text:p>0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.0007" calcext:value-type="float">
            <text:p>1.0007</text:p>
          </table:table-cell>
          <table:table-cell office:value-type="float" office:value="60.04" calcext:value-type="float">
            <text:p>60.04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806]-[.F806]" office:value-type="float" office:value="26.96" calcext:value-type="float">
            <text:p>26.96</text:p>
          </table:table-cell>
          <table:table-cell table:formula="of:=ABS([.J806])" office:value-type="float" office:value="26.96" calcext:value-type="float">
            <text:p>26.96</text:p>
          </table:table-cell>
          <table:table-cell table:formula="of:=[.K806]/[.F806]*100" office:value-type="float" office:value="44.9033977348434" calcext:value-type="float">
            <text:p>44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1.0055" calcext:value-type="float">
            <text:p>1.0055</text:p>
          </table:table-cell>
          <table:table-cell office:value-type="float" office:value="60.33" calcext:value-type="float">
            <text:p>60.33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807]-[.F807]" office:value-type="float" office:value="26.67" calcext:value-type="float">
            <text:p>26.67</text:p>
          </table:table-cell>
          <table:table-cell table:formula="of:=ABS([.J807])" office:value-type="float" office:value="26.67" calcext:value-type="float">
            <text:p>26.67</text:p>
          </table:table-cell>
          <table:table-cell table:formula="of:=[.K807]/[.F807]*100" office:value-type="float" office:value="44.2068622575833" calcext:value-type="float">
            <text:p>44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62" calcext:value-type="float">
            <text:p>62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1.0181" calcext:value-type="float">
            <text:p>1.0181</text:p>
          </table:table-cell>
          <table:table-cell office:value-type="float" office:value="61.09" calcext:value-type="float">
            <text:p>61.09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H808]-[.F808]" office:value-type="float" office:value="25.91" calcext:value-type="float">
            <text:p>25.91</text:p>
          </table:table-cell>
          <table:table-cell table:formula="of:=ABS([.J808])" office:value-type="float" office:value="25.91" calcext:value-type="float">
            <text:p>25.91</text:p>
          </table:table-cell>
          <table:table-cell table:formula="of:=[.K808]/[.F808]*100" office:value-type="float" office:value="42.4128335243084" calcext:value-type="float">
            <text:p>42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.0328" calcext:value-type="float">
            <text:p>1.0328</text:p>
          </table:table-cell>
          <table:table-cell office:value-type="float" office:value="61.97" calcext:value-type="float">
            <text:p>61.97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809]-[.F809]" office:value-type="float" office:value="1.03" calcext:value-type="float">
            <text:p>1.03</text:p>
          </table:table-cell>
          <table:table-cell table:formula="of:=ABS([.J809])" office:value-type="float" office:value="1.03" calcext:value-type="float">
            <text:p>1.03</text:p>
          </table:table-cell>
          <table:table-cell table:formula="of:=[.K809]/[.F809]*100" office:value-type="float" office:value="1.66209456188478" calcext:value-type="float">
            <text:p>1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.032" calcext:value-type="float">
            <text:p>1.032</text:p>
          </table:table-cell>
          <table:table-cell office:value-type="float" office:value="61.92" calcext:value-type="float">
            <text:p>61.92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H810]-[.F810]" office:value-type="float" office:value="1.08" calcext:value-type="float">
            <text:p>1.08</text:p>
          </table:table-cell>
          <table:table-cell table:formula="of:=ABS([.J810])" office:value-type="float" office:value="1.08" calcext:value-type="float">
            <text:p>1.08</text:p>
          </table:table-cell>
          <table:table-cell table:formula="of:=[.K810]/[.F810]*100" office:value-type="float" office:value="1.74418604651163" calcext:value-type="float">
            <text:p>1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.0055" calcext:value-type="float">
            <text:p>1.0055</text:p>
          </table:table-cell>
          <table:table-cell office:value-type="float" office:value="60.33" calcext:value-type="float">
            <text:p>60.3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[.H811]-[.F811]" office:value-type="float" office:value="-0.329999999999998" calcext:value-type="float">
            <text:p>-0.329999999999998</text:p>
          </table:table-cell>
          <table:table-cell table:formula="of:=ABS([.J811])" office:value-type="float" office:value="0.329999999999998" calcext:value-type="float">
            <text:p>0.329999999999998</text:p>
          </table:table-cell>
          <table:table-cell table:formula="of:=[.K811]/[.F811]*100" office:value-type="float" office:value="0.546991546494279" calcext:value-type="float">
            <text:p>0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66" calcext:value-type="float">
            <text:p>66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0.9887" calcext:value-type="float">
            <text:p>0.9887</text:p>
          </table:table-cell>
          <table:table-cell office:value-type="float" office:value="59.32" calcext:value-type="float">
            <text:p>59.3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H812]-[.F812]" office:value-type="float" office:value="0.68" calcext:value-type="float">
            <text:p>0.68</text:p>
          </table:table-cell>
          <table:table-cell table:formula="of:=ABS([.J812])" office:value-type="float" office:value="0.68" calcext:value-type="float">
            <text:p>0.68</text:p>
          </table:table-cell>
          <table:table-cell table:formula="of:=[.K812]/[.F812]*100" office:value-type="float" office:value="1.14632501685772" calcext:value-type="float">
            <text:p>1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0.9873" calcext:value-type="float">
            <text:p>0.9873</text:p>
          </table:table-cell>
          <table:table-cell office:value-type="float" office:value="59.24" calcext:value-type="float">
            <text:p>59.2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H813]-[.F813]" office:value-type="float" office:value="0.759999999999998" calcext:value-type="float">
            <text:p>0.759999999999998</text:p>
          </table:table-cell>
          <table:table-cell table:formula="of:=ABS([.J813])" office:value-type="float" office:value="0.759999999999998" calcext:value-type="float">
            <text:p>0.759999999999998</text:p>
          </table:table-cell>
          <table:table-cell table:formula="of:=[.K813]/[.F813]*100" office:value-type="float" office:value="1.2829169480081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68" calcext:value-type="float">
            <text:p>68</text:p>
          </table:table-cell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office:value-type="float" office:value="0.9669" calcext:value-type="float">
            <text:p>0.9669</text:p>
          </table:table-cell>
          <table:table-cell office:value-type="float" office:value="58.01" calcext:value-type="float">
            <text:p>58.01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[.H814]-[.F814]" office:value-type="float" office:value="-1.01" calcext:value-type="float">
            <text:p>-1.01</text:p>
          </table:table-cell>
          <table:table-cell table:formula="of:=ABS([.J814])" office:value-type="float" office:value="1.01" calcext:value-type="float">
            <text:p>1.01</text:p>
          </table:table-cell>
          <table:table-cell table:formula="of:=[.K814]/[.F814]*100" office:value-type="float" office:value="1.74107912428891" calcext:value-type="float">
            <text:p>1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0.9899" calcext:value-type="float">
            <text:p>0.9899</text:p>
          </table:table-cell>
          <table:table-cell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815]-[.F815]" office:value-type="float" office:value="0.609999999999999" calcext:value-type="float">
            <text:p>0.609999999999999</text:p>
          </table:table-cell>
          <table:table-cell table:formula="of:=ABS([.J815])" office:value-type="float" office:value="0.609999999999999" calcext:value-type="float">
            <text:p>0.609999999999999</text:p>
          </table:table-cell>
          <table:table-cell table:formula="of:=[.K815]/[.F815]*100" office:value-type="float" office:value="1.02710894089914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1.0044" calcext:value-type="float">
            <text:p>1.0044</text:p>
          </table:table-cell>
          <table:table-cell office:value-type="float" office:value="60.26" calcext:value-type="float">
            <text:p>60.2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H816]-[.F816]" office:value-type="float" office:value="-0.259999999999998" calcext:value-type="float">
            <text:p>-0.259999999999998</text:p>
          </table:table-cell>
          <table:table-cell table:formula="of:=ABS([.J816])" office:value-type="float" office:value="0.259999999999998" calcext:value-type="float">
            <text:p>0.259999999999998</text:p>
          </table:table-cell>
          <table:table-cell table:formula="of:=[.K816]/[.F816]*100" office:value-type="float" office:value="0.431463657484232" calcext:value-type="float">
            <text:p>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1.008" calcext:value-type="float">
            <text:p>1.008</text:p>
          </table:table-cell>
          <table:table-cell office:value-type="float" office:value="60.48" calcext:value-type="float">
            <text:p>60.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817]-[.F817]" office:value-type="float" office:value="-0.479999999999997" calcext:value-type="float">
            <text:p>-0.479999999999997</text:p>
          </table:table-cell>
          <table:table-cell table:formula="of:=ABS([.J817])" office:value-type="float" office:value="0.479999999999997" calcext:value-type="float">
            <text:p>0.479999999999997</text:p>
          </table:table-cell>
          <table:table-cell table:formula="of:=[.K817]/[.F817]*100" office:value-type="float" office:value="0.793650793650789" calcext:value-type="float">
            <text:p>0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1.0408" calcext:value-type="float">
            <text:p>1.0408</text:p>
          </table:table-cell>
          <table:table-cell office:value-type="float" office:value="62.45" calcext:value-type="float">
            <text:p>62.45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formula="of:=[.H818]-[.F818]" office:value-type="float" office:value="0.549999999999997" calcext:value-type="float">
            <text:p>0.549999999999997</text:p>
          </table:table-cell>
          <table:table-cell table:formula="of:=ABS([.J818])" office:value-type="float" office:value="0.549999999999997" calcext:value-type="float">
            <text:p>0.549999999999997</text:p>
          </table:table-cell>
          <table:table-cell table:formula="of:=[.K818]/[.F818]*100" office:value-type="float" office:value="0.880704563650916" calcext:value-type="float">
            <text:p>0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1.0484" calcext:value-type="float">
            <text:p>1.0484</text:p>
          </table:table-cell>
          <table:table-cell office:value-type="float" office:value="62.91" calcext:value-type="float">
            <text:p>62.91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[.H819]-[.F819]" office:value-type="float" office:value="12.09" calcext:value-type="float">
            <text:p>12.09</text:p>
          </table:table-cell>
          <table:table-cell table:formula="of:=ABS([.J819])" office:value-type="float" office:value="12.09" calcext:value-type="float">
            <text:p>12.09</text:p>
          </table:table-cell>
          <table:table-cell table:formula="of:=[.K819]/[.F819]*100" office:value-type="float" office:value="19.2179303767287" calcext:value-type="float">
            <text:p>19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1.0658" calcext:value-type="float">
            <text:p>1.0658</text:p>
          </table:table-cell>
          <table:table-cell office:value-type="float" office:value="63.95" calcext:value-type="float">
            <text:p>63.95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formula="of:=[.H820]-[.F820]" office:value-type="float" office:value="11.05" calcext:value-type="float">
            <text:p>11.05</text:p>
          </table:table-cell>
          <table:table-cell table:formula="of:=ABS([.J820])" office:value-type="float" office:value="11.05" calcext:value-type="float">
            <text:p>11.05</text:p>
          </table:table-cell>
          <table:table-cell table:formula="of:=[.K820]/[.F820]*100" office:value-type="float" office:value="17.2791243158718" calcext:value-type="float">
            <text:p>17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.0877" calcext:value-type="float">
            <text:p>1.0877</text:p>
          </table:table-cell>
          <table:table-cell office:value-type="float" office:value="65.26" calcext:value-type="float">
            <text:p>65.26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821]-[.F821]" office:value-type="float" office:value="9.74" calcext:value-type="float">
            <text:p>9.74</text:p>
          </table:table-cell>
          <table:table-cell table:formula="of:=ABS([.J821])" office:value-type="float" office:value="9.74" calcext:value-type="float">
            <text:p>9.74</text:p>
          </table:table-cell>
          <table:table-cell table:formula="of:=[.K821]/[.F821]*100" office:value-type="float" office:value="14.9249157217285" calcext:value-type="float">
            <text:p>14.9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76" calcext:value-type="float">
            <text:p>76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1.1055" calcext:value-type="float">
            <text:p>1.1055</text:p>
          </table:table-cell>
          <table:table-cell office:value-type="float" office:value="66.33" calcext:value-type="float">
            <text:p>66.3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822]-[.F822]" office:value-type="float" office:value="8.67" calcext:value-type="float">
            <text:p>8.67</text:p>
          </table:table-cell>
          <table:table-cell table:formula="of:=ABS([.J822])" office:value-type="float" office:value="8.67" calcext:value-type="float">
            <text:p>8.67</text:p>
          </table:table-cell>
          <table:table-cell table:formula="of:=[.K822]/[.F822]*100" office:value-type="float" office:value="13.0710085933967" calcext:value-type="float">
            <text:p>13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77" calcext:value-type="float">
            <text:p>7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1.1103" calcext:value-type="float">
            <text:p>1.1103</text:p>
          </table:table-cell>
          <table:table-cell office:value-type="float" office:value="66.62" calcext:value-type="float">
            <text:p>66.6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H823]-[.F823]" office:value-type="float" office:value="8.38" calcext:value-type="float">
            <text:p>8.38</text:p>
          </table:table-cell>
          <table:table-cell table:formula="of:=ABS([.J823])" office:value-type="float" office:value="8.38" calcext:value-type="float">
            <text:p>8.38</text:p>
          </table:table-cell>
          <table:table-cell table:formula="of:=[.K823]/[.F823]*100" office:value-type="float" office:value="12.5788051636145" calcext:value-type="float">
            <text:p>12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1.1034" calcext:value-type="float">
            <text:p>1.1034</text:p>
          </table:table-cell>
          <table:table-cell office:value-type="float" office:value="66.2" calcext:value-type="float">
            <text:p>66.2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formula="of:=[.H824]-[.F824]" office:value-type="float" office:value="8.8" calcext:value-type="float">
            <text:p>8.8</text:p>
          </table:table-cell>
          <table:table-cell table:formula="of:=ABS([.J824])" office:value-type="float" office:value="8.8" calcext:value-type="float">
            <text:p>8.8</text:p>
          </table:table-cell>
          <table:table-cell table:formula="of:=[.K824]/[.F824]*100" office:value-type="float" office:value="13.2930513595166" calcext:value-type="float">
            <text:p>13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79" calcext:value-type="float">
            <text:p>79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1.0585" calcext:value-type="float">
            <text:p>1.0585</text:p>
          </table:table-cell>
          <table:table-cell office:value-type="float" office:value="63.51" calcext:value-type="float">
            <text:p>63.51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table:formula="of:=[.H825]-[.F825]" office:value-type="float" office:value="-6.51" calcext:value-type="float">
            <text:p>-6.51</text:p>
          </table:table-cell>
          <table:table-cell table:formula="of:=ABS([.J825])" office:value-type="float" office:value="6.51" calcext:value-type="float">
            <text:p>6.51</text:p>
          </table:table-cell>
          <table:table-cell table:formula="of:=[.K825]/[.F825]*100" office:value-type="float" office:value="10.2503542749173" calcext:value-type="float">
            <text:p>10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415" calcext:value-type="float">
            <text:p>415</text:p>
          </table:table-cell>
          <table:table-cell office:value-type="float" office:value="1.0239" calcext:value-type="float">
            <text:p>1.0239</text:p>
          </table:table-cell>
          <table:table-cell office:value-type="float" office:value="61.44" calcext:value-type="float">
            <text:p>61.4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H826]-[.F826]" office:value-type="float" office:value="-4.44" calcext:value-type="float">
            <text:p>-4.44</text:p>
          </table:table-cell>
          <table:table-cell table:formula="of:=ABS([.J826])" office:value-type="float" office:value="4.44" calcext:value-type="float">
            <text:p>4.44</text:p>
          </table:table-cell>
          <table:table-cell table:formula="of:=[.K826]/[.F826]*100" office:value-type="float" office:value="7.2265625" calcext:value-type="float">
            <text:p>7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1.0074" calcext:value-type="float">
            <text:p>1.0074</text:p>
          </table:table-cell>
          <table:table-cell office:value-type="float" office:value="60.44" calcext:value-type="float">
            <text:p>60.4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H827]-[.F827]" office:value-type="float" office:value="-0.439999999999998" calcext:value-type="float">
            <text:p>-0.439999999999998</text:p>
          </table:table-cell>
          <table:table-cell table:formula="of:=ABS([.J827])" office:value-type="float" office:value="0.439999999999998" calcext:value-type="float">
            <text:p>0.439999999999998</text:p>
          </table:table-cell>
          <table:table-cell table:formula="of:=[.K827]/[.F827]*100" office:value-type="float" office:value="0.727994705493047" calcext:value-type="float">
            <text:p>0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82" calcext:value-type="float">
            <text:p>82</text:p>
          </table:table-cell>
          <table:table-cell office:value-type="float" office:value="405" calcext:value-type="float">
            <text:p>405</text:p>
          </table:table-cell>
          <table:table-cell office:value-type="float" office:value="425" calcext:value-type="float">
            <text:p>425</text:p>
          </table:table-cell>
          <table:table-cell office:value-type="float" office:value="0.9984" calcext:value-type="float">
            <text:p>0.9984</text:p>
          </table:table-cell>
          <table:table-cell office:value-type="float" office:value="59.9" calcext:value-type="float">
            <text:p>5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828]-[.F828]" office:value-type="float" office:value="0.100000000000001" calcext:value-type="float">
            <text:p>0.100000000000001</text:p>
          </table:table-cell>
          <table:table-cell table:formula="of:=ABS([.J828])" office:value-type="float" office:value="0.100000000000001" calcext:value-type="float">
            <text:p>0.100000000000001</text:p>
          </table:table-cell>
          <table:table-cell table:formula="of:=[.K828]/[.F828]*100" office:value-type="float" office:value="0.166944908180303" calcext:value-type="float">
            <text:p>0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83" calcext:value-type="float">
            <text:p>83</text:p>
          </table:table-cell>
          <table:table-cell office:value-type="float" office:value="410" calcext:value-type="float">
            <text:p>410</text:p>
          </table:table-cell>
          <table:table-cell office:value-type="float" office:value="430" calcext:value-type="float">
            <text:p>430</text:p>
          </table:table-cell>
          <table:table-cell office:value-type="float" office:value="1.0175" calcext:value-type="float">
            <text:p>1.0175</text:p>
          </table:table-cell>
          <table:table-cell office:value-type="float" office:value="61.05" calcext:value-type="float">
            <text:p>61.05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formula="of:=[.H829]-[.F829]" office:value-type="float" office:value="19.95" calcext:value-type="float">
            <text:p>19.95</text:p>
          </table:table-cell>
          <table:table-cell table:formula="of:=ABS([.J829])" office:value-type="float" office:value="19.95" calcext:value-type="float">
            <text:p>19.95</text:p>
          </table:table-cell>
          <table:table-cell table:formula="of:=[.K829]/[.F829]*100" office:value-type="float" office:value="32.6781326781327" calcext:value-type="float">
            <text:p>32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84" calcext:value-type="float">
            <text:p>84</text:p>
          </table:table-cell>
          <table:table-cell office:value-type="float" office:value="415" calcext:value-type="float">
            <text:p>415</text:p>
          </table:table-cell>
          <table:table-cell office:value-type="float" office:value="435" calcext:value-type="float">
            <text:p>435</text:p>
          </table:table-cell>
          <table:table-cell office:value-type="float" office:value="1.0034" calcext:value-type="float">
            <text:p>1.0034</text:p>
          </table:table-cell>
          <table:table-cell office:value-type="float" office:value="60.2" calcext:value-type="float">
            <text:p>60.2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830]-[.F830]" office:value-type="float" office:value="20.8" calcext:value-type="float">
            <text:p>20.8</text:p>
          </table:table-cell>
          <table:table-cell table:formula="of:=ABS([.J830])" office:value-type="float" office:value="20.8" calcext:value-type="float">
            <text:p>20.8</text:p>
          </table:table-cell>
          <table:table-cell table:formula="of:=[.K830]/[.F830]*100" office:value-type="float" office:value="34.5514950166113" calcext:value-type="float">
            <text:p>34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85" calcext:value-type="float">
            <text:p>85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0.9735" calcext:value-type="float">
            <text:p>0.9735</text:p>
          </table:table-cell>
          <table:table-cell office:value-type="float" office:value="58.41" calcext:value-type="float">
            <text:p>58.41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831]-[.F831]" office:value-type="float" office:value="22.59" calcext:value-type="float">
            <text:p>22.59</text:p>
          </table:table-cell>
          <table:table-cell table:formula="of:=ABS([.J831])" office:value-type="float" office:value="22.59" calcext:value-type="float">
            <text:p>22.59</text:p>
          </table:table-cell>
          <table:table-cell table:formula="of:=[.K831]/[.F831]*100" office:value-type="float" office:value="38.6748844375963" calcext:value-type="float">
            <text:p>38.7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86" calcext:value-type="float">
            <text:p>86</text:p>
          </table:table-cell>
          <table:table-cell office:value-type="float" office:value="425" calcext:value-type="float">
            <text:p>425</text:p>
          </table:table-cell>
          <table:table-cell office:value-type="float" office:value="445" calcext:value-type="float">
            <text:p>445</text:p>
          </table:table-cell>
          <table:table-cell office:value-type="float" office:value="0.9273" calcext:value-type="float">
            <text:p>0.9273</text:p>
          </table:table-cell>
          <table:table-cell office:value-type="float" office:value="55.64" calcext:value-type="float">
            <text:p>55.64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H832]-[.F832]" office:value-type="float" office:value="25.36" calcext:value-type="float">
            <text:p>25.36</text:p>
          </table:table-cell>
          <table:table-cell table:formula="of:=ABS([.J832])" office:value-type="float" office:value="25.36" calcext:value-type="float">
            <text:p>25.36</text:p>
          </table:table-cell>
          <table:table-cell table:formula="of:=[.K832]/[.F832]*100" office:value-type="float" office:value="45.5787203450755" calcext:value-type="float">
            <text:p>45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87" calcext:value-type="float">
            <text:p>87</text:p>
          </table:table-cell>
          <table:table-cell office:value-type="float" office:value="430" calcext:value-type="float">
            <text:p>430</text:p>
          </table:table-cell>
          <table:table-cell office:value-type="float" office:value="450" calcext:value-type="float">
            <text:p>450</text:p>
          </table:table-cell>
          <table:table-cell office:value-type="float" office:value="0.8891" calcext:value-type="float">
            <text:p>0.8891</text:p>
          </table:table-cell>
          <table:table-cell office:value-type="float" office:value="53.35" calcext:value-type="float">
            <text:p>53.35</text:p>
          </table:table-cell>
          <table:table-cell office:value-type="float" office:value="1.7" calcext:value-type="float">
            <text:p>1.7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formula="of:=[.H833]-[.F833]" office:value-type="float" office:value="48.65" calcext:value-type="float">
            <text:p>48.65</text:p>
          </table:table-cell>
          <table:table-cell table:formula="of:=ABS([.J833])" office:value-type="float" office:value="48.65" calcext:value-type="float">
            <text:p>48.65</text:p>
          </table:table-cell>
          <table:table-cell table:formula="of:=[.K833]/[.F833]*100" office:value-type="float" office:value="91.1902530459231" calcext:value-type="float">
            <text:p>91.2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88" calcext:value-type="float">
            <text:p>88</text:p>
          </table:table-cell>
          <table:table-cell office:value-type="float" office:value="435" calcext:value-type="float">
            <text:p>435</text:p>
          </table:table-cell>
          <table:table-cell office:value-type="float" office:value="455" calcext:value-type="float">
            <text:p>455</text:p>
          </table:table-cell>
          <table:table-cell office:value-type="float" office:value="0.8732" calcext:value-type="float">
            <text:p>0.8732</text:p>
          </table:table-cell>
          <table:table-cell office:value-type="float" office:value="52.39" calcext:value-type="float">
            <text:p>52.39</text:p>
          </table:table-cell>
          <table:table-cell office:value-type="float" office:value="1.75" calcext:value-type="float">
            <text:p>1.75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formula="of:=[.H834]-[.F834]" office:value-type="float" office:value="52.61" calcext:value-type="float">
            <text:p>52.61</text:p>
          </table:table-cell>
          <table:table-cell table:formula="of:=ABS([.J834])" office:value-type="float" office:value="52.61" calcext:value-type="float">
            <text:p>52.61</text:p>
          </table:table-cell>
          <table:table-cell table:formula="of:=[.K834]/[.F834]*100" office:value-type="float" office:value="100.419927467074" calcext:value-type="float">
            <text:p>100.4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89" calcext:value-type="float">
            <text:p>89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0.8826" calcext:value-type="float">
            <text:p>0.8826</text:p>
          </table:table-cell>
          <table:table-cell office:value-type="float" office:value="52.96" calcext:value-type="float">
            <text:p>52.96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[.H835]-[.F835]" office:value-type="float" office:value="52.04" calcext:value-type="float">
            <text:p>52.04</text:p>
          </table:table-cell>
          <table:table-cell table:formula="of:=ABS([.J835])" office:value-type="float" office:value="52.04" calcext:value-type="float">
            <text:p>52.04</text:p>
          </table:table-cell>
          <table:table-cell table:formula="of:=[.K835]/[.F835]*100" office:value-type="float" office:value="98.2628398791541" calcext:value-type="float">
            <text:p>98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90" calcext:value-type="float">
            <text:p>90</text:p>
          </table:table-cell>
          <table:table-cell office:value-type="float" office:value="445" calcext:value-type="float">
            <text:p>445</text:p>
          </table:table-cell>
          <table:table-cell office:value-type="float" office:value="465" calcext:value-type="float">
            <text:p>465</text:p>
          </table:table-cell>
          <table:table-cell office:value-type="float" office:value="0.916" calcext:value-type="float">
            <text:p>0.916</text:p>
          </table:table-cell>
          <table:table-cell office:value-type="float" office:value="54.96" calcext:value-type="float">
            <text:p>54.96</text:p>
          </table:table-cell>
          <table:table-cell office:value-type="float" office:value="1.7" calcext:value-type="float">
            <text:p>1.7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formula="of:=[.H836]-[.F836]" office:value-type="float" office:value="47.04" calcext:value-type="float">
            <text:p>47.04</text:p>
          </table:table-cell>
          <table:table-cell table:formula="of:=ABS([.J836])" office:value-type="float" office:value="47.04" calcext:value-type="float">
            <text:p>47.04</text:p>
          </table:table-cell>
          <table:table-cell table:formula="of:=[.K836]/[.F836]*100" office:value-type="float" office:value="85.589519650655" calcext:value-type="float">
            <text:p>85.6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91" calcext:value-type="float">
            <text:p>91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0.9552" calcext:value-type="float">
            <text:p>0.9552</text:p>
          </table:table-cell>
          <table:table-cell office:value-type="float" office:value="57.31" calcext:value-type="float">
            <text:p>57.31</text:p>
          </table:table-cell>
          <table:table-cell office:value-type="float" office:value="1.6" calcext:value-type="float">
            <text:p>1.6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formula="of:=[.H837]-[.F837]" office:value-type="float" office:value="38.69" calcext:value-type="float">
            <text:p>38.69</text:p>
          </table:table-cell>
          <table:table-cell table:formula="of:=ABS([.J837])" office:value-type="float" office:value="38.69" calcext:value-type="float">
            <text:p>38.69</text:p>
          </table:table-cell>
          <table:table-cell table:formula="of:=[.K837]/[.F837]*100" office:value-type="float" office:value="67.5100331530274" calcext:value-type="float">
            <text:p>67.5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92" calcext:value-type="float">
            <text:p>92</text:p>
          </table:table-cell>
          <table:table-cell office:value-type="float" office:value="455" calcext:value-type="float">
            <text:p>455</text:p>
          </table:table-cell>
          <table:table-cell office:value-type="float" office:value="475" calcext:value-type="float">
            <text:p>475</text:p>
          </table:table-cell>
          <table:table-cell office:value-type="float" office:value="1.0022" calcext:value-type="float">
            <text:p>1.0022</text:p>
          </table:table-cell>
          <table:table-cell office:value-type="float" office:value="60.13" calcext:value-type="float">
            <text:p>60.13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formula="of:=[.H838]-[.F838]" office:value-type="float" office:value="2.87" calcext:value-type="float">
            <text:p>2.87</text:p>
          </table:table-cell>
          <table:table-cell table:formula="of:=ABS([.J838])" office:value-type="float" office:value="2.87" calcext:value-type="float">
            <text:p>2.87</text:p>
          </table:table-cell>
          <table:table-cell table:formula="of:=[.K838]/[.F838]*100" office:value-type="float" office:value="4.77299185098952" calcext:value-type="float">
            <text:p>4.8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93" calcext:value-type="float">
            <text:p>93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1.0396" calcext:value-type="float">
            <text:p>1.0396</text:p>
          </table:table-cell>
          <table:table-cell office:value-type="float" office:value="62.38" calcext:value-type="float">
            <text:p>62.38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839]-[.F839]" office:value-type="float" office:value="0.619999999999997" calcext:value-type="float">
            <text:p>0.619999999999997</text:p>
          </table:table-cell>
          <table:table-cell table:formula="of:=ABS([.J839])" office:value-type="float" office:value="0.619999999999997" calcext:value-type="float">
            <text:p>0.619999999999997</text:p>
          </table:table-cell>
          <table:table-cell table:formula="of:=[.K839]/[.F839]*100" office:value-type="float" office:value="0.993908303943567" calcext:value-type="float">
            <text:p>1.0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94" calcext:value-type="float">
            <text:p>94</text:p>
          </table:table-cell>
          <table:table-cell office:value-type="float" office:value="465" calcext:value-type="float">
            <text:p>465</text:p>
          </table:table-cell>
          <table:table-cell office:value-type="float" office:value="485" calcext:value-type="float">
            <text:p>485</text:p>
          </table:table-cell>
          <table:table-cell office:value-type="float" office:value="1.0635" calcext:value-type="float">
            <text:p>1.0635</text:p>
          </table:table-cell>
          <table:table-cell office:value-type="float" office:value="63.81" calcext:value-type="float">
            <text:p>63.8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840]-[.F840]" office:value-type="float" office:value="-0.810000000000002" calcext:value-type="float">
            <text:p>-0.810000000000002</text:p>
          </table:table-cell>
          <table:table-cell table:formula="of:=ABS([.J840])" office:value-type="float" office:value="0.810000000000002" calcext:value-type="float">
            <text:p>0.810000000000002</text:p>
          </table:table-cell>
          <table:table-cell table:formula="of:=[.K840]/[.F840]*100" office:value-type="float" office:value="1.26939351198872" calcext:value-type="float">
            <text:p>1.3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95" calcext:value-type="float">
            <text:p>95</text:p>
          </table:table-cell>
          <table:table-cell office:value-type="float" office:value="470" calcext:value-type="float">
            <text:p>470</text:p>
          </table:table-cell>
          <table:table-cell office:value-type="float" office:value="490" calcext:value-type="float">
            <text:p>490</text:p>
          </table:table-cell>
          <table:table-cell office:value-type="float" office:value="1.0731" calcext:value-type="float">
            <text:p>1.0731</text:p>
          </table:table-cell>
          <table:table-cell office:value-type="float" office:value="64.38" calcext:value-type="float">
            <text:p>64.38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H841]-[.F841]" office:value-type="float" office:value="-1.38" calcext:value-type="float">
            <text:p>-1.38</text:p>
          </table:table-cell>
          <table:table-cell table:formula="of:=ABS([.J841])" office:value-type="float" office:value="1.38" calcext:value-type="float">
            <text:p>1.38</text:p>
          </table:table-cell>
          <table:table-cell table:formula="of:=[.K841]/[.F841]*100" office:value-type="float" office:value="2.143522833178" calcext:value-type="float">
            <text:p>2.1</text:p>
          </table:table-cell>
          <table:table-cell table:number-columns-repeated="16372"/>
        </table:table-row>
        <table:table-row table:style-name="ro4" table:visibility="filter">
          <table:table-cell office:value-type="string" calcext:value-type="string">
            <text:p>subject10</text:p>
          </table:table-cell>
          <table:table-cell office:value-type="float" office:value="96" calcext:value-type="float">
            <text:p>96</text:p>
          </table:table-cell>
          <table:table-cell office:value-type="float" office:value="475" calcext:value-type="float">
            <text:p>475</text:p>
          </table:table-cell>
          <table:table-cell office:value-type="float" office:value="495" calcext:value-type="float">
            <text:p>495</text:p>
          </table:table-cell>
          <table:table-cell office:value-type="float" office:value="1.0787" calcext:value-type="float">
            <text:p>1.0787</text:p>
          </table:table-cell>
          <table:table-cell office:value-type="float" office:value="64.72" calcext:value-type="float">
            <text:p>64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H842]-[.F842]" office:value-type="float" office:value="-4.72" calcext:value-type="float">
            <text:p>-4.72</text:p>
          </table:table-cell>
          <table:table-cell table:formula="of:=ABS([.J842])" office:value-type="float" office:value="4.72" calcext:value-type="float">
            <text:p>4.72</text:p>
          </table:table-cell>
          <table:table-cell table:formula="of:=[.K842]/[.F842]*100" office:value-type="float" office:value="7.2929542645241" calcext:value-type="float">
            <text:p>7.3</text:p>
          </table:table-cell>
          <table:table-cell table:number-columns-repeated="16372"/>
        </table:table-row>
        <table:table-row table:style-name="ro4">
          <table:table-cell table:style-name="Default" table:number-columns-repeated="10"/>
          <table:table-cell table:style-name="ce19"/>
          <table:table-cell table:style-name="Default"/>
          <table:table-cell table:number-columns-repeated="16372"/>
        </table:table-row>
        <table:table-row table:style-name="ro4">
          <table:table-cell table:style-name="ce3" office:value-type="string" calcext:value-type="string">
            <text:p>RINGKASAN</text:p>
          </table:table-cell>
          <table:table-cell table:style-name="Default" table:number-columns-repeated="11"/>
          <table:table-cell table:number-columns-repeated="16372"/>
        </table:table-row>
        <table:table-row table:style-name="ro4">
          <table:table-cell table:style-name="ce4" office:value-type="string" calcext:value-type="string">
            <text:p>keterangan</text:p>
          </table:table-cell>
          <table:table-cell table:style-name="ce4" office:value-type="string" calcext:value-type="string">
            <text:p>subjek</text:p>
          </table:table-cell>
          <table:table-cell table:style-name="ce4" office:value-type="string" calcext:value-type="string">
            <text:p>n_window</text:p>
          </table:table-cell>
          <table:table-cell table:style-name="Default" table:number-columns-repeated="6"/>
          <table:table-cell table:style-name="ce4" office:value-type="string" calcext:value-type="string">
            <text:p>MAE_bpm</text:p>
          </table:table-cell>
          <table:table-cell table:style-name="Default"/>
          <table:table-cell table:style-name="ce4" office:value-type="string" calcext:value-type="string">
            <text:p>MAPE_persen</text:p>
          </table:table-cell>
          <table:table-cell table:number-columns-repeated="16372"/>
        </table:table-row>
        <table:table-row table:style-name="ro3">
          <table:table-cell table:style-name="Default" office:value-type="string" calcext:value-type="string">
            <text:p>per subjek</text:p>
          </table:table-cell>
          <table:table-cell table:style-name="Default" office:value-type="string" calcext:value-type="string">
            <text:p>subject01</text:p>
          </table:table-cell>
          <table:table-cell table:style-name="Default" table:formula="of:=COUNTIF([.$A$3:.$A$842];[.$B846])" office:value-type="float" office:value="82" calcext:value-type="float">
            <text:p>82</text:p>
          </table:table-cell>
          <table:table-cell table:style-name="Default" table:number-columns-repeated="6"/>
          <table:table-cell table:style-name="ce7" table:formula="of:=AVERAGEIF([.$A$3:.$A$842];[.$B846];[.$K$3:.$K$842])" office:value-type="float" office:value="2.83109756097561" calcext:value-type="float">
            <text:p>2.8</text:p>
          </table:table-cell>
          <table:table-cell table:style-name="Default"/>
          <table:table-cell table:style-name="ce7" table:formula="of:=AVERAGEIF([.$A$3:.$A$842];[.$B846];[.$L$3:.$L$842])" office:value-type="float" office:value="3.1641832464563" calcext:value-type="float">
            <text:p>3.2</text:p>
          </table:table-cell>
          <table:table-cell/>
          <table:table-cell table:style-name="ce7"/>
          <table:table-cell table:number-columns-repeated="16370"/>
        </table:table-row>
        <table:table-row table:style-name="ro4">
          <table:table-cell table:style-name="Default" office:value-type="string" calcext:value-type="string">
            <text:p>per subjek</text:p>
          </table:table-cell>
          <table:table-cell table:style-name="Default" office:value-type="string" calcext:value-type="string">
            <text:p>subject02</text:p>
          </table:table-cell>
          <table:table-cell table:style-name="Default" table:formula="of:=COUNTIF([.$A$3:.$A$842];[.$B847])" office:value-type="float" office:value="82" calcext:value-type="float">
            <text:p>82</text:p>
          </table:table-cell>
          <table:table-cell table:style-name="Default" table:number-columns-repeated="6"/>
          <table:table-cell table:style-name="ce7" table:formula="of:=AVERAGEIF([.$A$3:.$A$842];[.$B847];[.$K$3:.$K$842])" office:value-type="float" office:value="6.58317073170732" calcext:value-type="float">
            <text:p>6.6</text:p>
          </table:table-cell>
          <table:table-cell table:style-name="Default"/>
          <table:table-cell table:style-name="ce7" table:formula="of:=AVERAGEIF([.$A$3:.$A$842];[.$B847];[.$L$3:.$L$842])" office:value-type="float" office:value="8.38996358244284" calcext:value-type="float">
            <text:p>8.4</text:p>
          </table:table-cell>
          <table:table-cell table:number-columns-repeated="16372"/>
        </table:table-row>
        <table:table-row table:style-name="ro4">
          <table:table-cell table:style-name="ce5" office:value-type="string" calcext:value-type="string">
            <text:p>per subjek</text:p>
          </table:table-cell>
          <table:table-cell table:style-name="ce5" office:value-type="string" calcext:value-type="string">
            <text:p>subject03</text:p>
          </table:table-cell>
          <table:table-cell table:style-name="ce5" table:formula="of:=COUNTIF([.$A$3:.$A$842];[.$B848])" office:value-type="float" office:value="81" calcext:value-type="float">
            <text:p>81</text:p>
          </table:table-cell>
          <table:table-cell table:style-name="ce5" table:number-columns-repeated="6"/>
          <table:table-cell table:style-name="ce8" table:formula="of:=AVERAGEIF([.$A$3:.$A$842];[.$B848];[.$K$3:.$K$842])" office:value-type="float" office:value="10.1112345679012" calcext:value-type="float">
            <text:p>10.1</text:p>
          </table:table-cell>
          <table:table-cell table:style-name="ce5"/>
          <table:table-cell table:style-name="ce8" table:formula="of:=AVERAGEIF([.$A$3:.$A$842];[.$B848];[.$L$3:.$L$842])" office:value-type="float" office:value="12.8772679653433" calcext:value-type="float">
            <text:p>12.9</text:p>
          </table:table-cell>
          <table:table-cell table:number-columns-repeated="16372"/>
        </table:table-row>
        <table:table-row table:style-name="ro4">
          <table:table-cell table:style-name="ce5" office:value-type="string" calcext:value-type="string">
            <text:p>per subjek</text:p>
          </table:table-cell>
          <table:table-cell table:style-name="ce5" office:value-type="string" calcext:value-type="string">
            <text:p>subject04</text:p>
          </table:table-cell>
          <table:table-cell table:style-name="ce5" table:formula="of:=COUNTIF([.$A$3:.$A$842];[.$B849])" office:value-type="float" office:value="81" calcext:value-type="float">
            <text:p>81</text:p>
          </table:table-cell>
          <table:table-cell table:style-name="ce5" table:number-columns-repeated="6"/>
          <table:table-cell table:style-name="ce8" table:formula="of:=AVERAGEIF([.$A$3:.$A$842];[.$B849];[.$K$3:.$K$842])" office:value-type="float" office:value="14.6386419753086" calcext:value-type="float">
            <text:p>14.6</text:p>
          </table:table-cell>
          <table:table-cell table:style-name="ce5"/>
          <table:table-cell table:style-name="ce8" table:formula="of:=AVERAGEIF([.$A$3:.$A$842];[.$B849];[.$L$3:.$L$842])" office:value-type="float" office:value="19.3047084871319" calcext:value-type="float">
            <text:p>19.3</text:p>
          </table:table-cell>
          <table:table-cell table:number-columns-repeated="16372"/>
        </table:table-row>
        <table:table-row table:style-name="ro4">
          <table:table-cell table:style-name="Default" office:value-type="string" calcext:value-type="string">
            <text:p>per subjek</text:p>
          </table:table-cell>
          <table:table-cell table:style-name="Default" office:value-type="string" calcext:value-type="string">
            <text:p>subject05</text:p>
          </table:table-cell>
          <table:table-cell table:style-name="Default" table:formula="of:=COUNTIF([.$A$3:.$A$842];[.$B850])" office:value-type="float" office:value="82" calcext:value-type="float">
            <text:p>82</text:p>
          </table:table-cell>
          <table:table-cell table:style-name="Default" table:number-columns-repeated="6"/>
          <table:table-cell table:style-name="ce7" table:formula="of:=AVERAGEIF([.$A$3:.$A$842];[.$B850];[.$K$3:.$K$842])" office:value-type="float" office:value="5.44329268292683" calcext:value-type="float">
            <text:p>5.4</text:p>
          </table:table-cell>
          <table:table-cell table:style-name="Default"/>
          <table:table-cell table:style-name="ce7" table:formula="of:=AVERAGEIF([.$A$3:.$A$842];[.$B850];[.$L$3:.$L$842])" office:value-type="float" office:value="8.00414003105051" calcext:value-type="float">
            <text:p>8.0</text:p>
          </table:table-cell>
          <table:table-cell table:number-columns-repeated="16372"/>
        </table:table-row>
        <table:table-row table:style-name="ro4">
          <table:table-cell table:style-name="ce5" office:value-type="string" calcext:value-type="string">
            <text:p>per subjek</text:p>
          </table:table-cell>
          <table:table-cell table:style-name="ce5" office:value-type="string" calcext:value-type="string">
            <text:p>subject06</text:p>
          </table:table-cell>
          <table:table-cell table:style-name="ce5" table:formula="of:=COUNTIF([.$A$3:.$A$842];[.$B851])" office:value-type="float" office:value="87" calcext:value-type="float">
            <text:p>87</text:p>
          </table:table-cell>
          <table:table-cell table:style-name="ce5" table:number-columns-repeated="6"/>
          <table:table-cell table:style-name="ce8" table:formula="of:=AVERAGEIF([.$A$3:.$A$842];[.$B851];[.$K$3:.$K$842])" office:value-type="float" office:value="11.7497701149425" calcext:value-type="float">
            <text:p>11.7</text:p>
          </table:table-cell>
          <table:table-cell table:style-name="ce5"/>
          <table:table-cell table:style-name="ce8" table:formula="of:=AVERAGEIF([.$A$3:.$A$842];[.$B851];[.$L$3:.$L$842])" office:value-type="float" office:value="15.4775879785577" calcext:value-type="float">
            <text:p>15.5</text:p>
          </table:table-cell>
          <table:table-cell table:number-columns-repeated="16372"/>
        </table:table-row>
        <table:table-row table:style-name="ro4">
          <table:table-cell table:style-name="Default" office:value-type="string" calcext:value-type="string">
            <text:p>per subjek</text:p>
          </table:table-cell>
          <table:table-cell table:style-name="Default" office:value-type="string" calcext:value-type="string">
            <text:p>subject07</text:p>
          </table:table-cell>
          <table:table-cell table:style-name="Default" table:formula="of:=COUNTIF([.$A$3:.$A$842];[.$B852])" office:value-type="float" office:value="84" calcext:value-type="float">
            <text:p>84</text:p>
          </table:table-cell>
          <table:table-cell table:style-name="Default" table:number-columns-repeated="6"/>
          <table:table-cell table:style-name="ce7" table:formula="of:=AVERAGEIF([.$A$3:.$A$842];[.$B852];[.$K$3:.$K$842])" office:value-type="float" office:value="3.03928571428571" calcext:value-type="float">
            <text:p>3.0</text:p>
          </table:table-cell>
          <table:table-cell table:style-name="Default"/>
          <table:table-cell table:style-name="ce7" table:formula="of:=AVERAGEIF([.$A$3:.$A$842];[.$B852];[.$L$3:.$L$842])" office:value-type="float" office:value="4.54622966980969" calcext:value-type="float">
            <text:p>4.5</text:p>
          </table:table-cell>
          <table:table-cell table:number-columns-repeated="16372"/>
        </table:table-row>
        <table:table-row table:style-name="ro4">
          <table:table-cell table:style-name="Default" office:value-type="string" calcext:value-type="string">
            <text:p>per subjek</text:p>
          </table:table-cell>
          <table:table-cell table:style-name="Default" office:value-type="string" calcext:value-type="string">
            <text:p>subject08</text:p>
          </table:table-cell>
          <table:table-cell table:style-name="Default" table:formula="of:=COUNTIF([.$A$3:.$A$842];[.$B853])" office:value-type="float" office:value="81" calcext:value-type="float">
            <text:p>81</text:p>
          </table:table-cell>
          <table:table-cell table:style-name="Default" table:number-columns-repeated="6"/>
          <table:table-cell table:style-name="ce7" table:formula="of:=AVERAGEIF([.$A$3:.$A$842];[.$B853];[.$K$3:.$K$842])" office:value-type="float" office:value="3.5979012345679" calcext:value-type="float">
            <text:p>3.6</text:p>
          </table:table-cell>
          <table:table-cell table:style-name="Default"/>
          <table:table-cell table:style-name="ce7" table:formula="of:=AVERAGEIF([.$A$3:.$A$842];[.$B853];[.$L$3:.$L$842])" office:value-type="float" office:value="4.73892445256476" calcext:value-type="float">
            <text:p>4.7</text:p>
          </table:table-cell>
          <table:table-cell table:number-columns-repeated="16372"/>
        </table:table-row>
        <table:table-row table:style-name="ro4">
          <table:table-cell table:style-name="Default" office:value-type="string" calcext:value-type="string">
            <text:p>per subjek</text:p>
          </table:table-cell>
          <table:table-cell table:style-name="Default" office:value-type="string" calcext:value-type="string">
            <text:p>subject09</text:p>
          </table:table-cell>
          <table:table-cell table:style-name="Default" table:formula="of:=COUNTIF([.$A$3:.$A$842];[.$B854])" office:value-type="float" office:value="84" calcext:value-type="float">
            <text:p>84</text:p>
          </table:table-cell>
          <table:table-cell table:style-name="Default" table:number-columns-repeated="6"/>
          <table:table-cell table:style-name="ce7" table:formula="of:=AVERAGEIF([.$A$3:.$A$842];[.$B854];[.$K$3:.$K$842])" office:value-type="float" office:value="2.46964285714286" calcext:value-type="float">
            <text:p>2.5</text:p>
          </table:table-cell>
          <table:table-cell table:style-name="Default"/>
          <table:table-cell table:style-name="ce7" table:formula="of:=AVERAGEIF([.$A$3:.$A$842];[.$B854];[.$L$3:.$L$842])" office:value-type="float" office:value="2.92010969425423" calcext:value-type="float">
            <text:p>2.9</text:p>
          </table:table-cell>
          <table:table-cell table:number-columns-repeated="16372"/>
        </table:table-row>
        <table:table-row table:style-name="ro4">
          <table:table-cell table:style-name="ce5" office:value-type="string" calcext:value-type="string">
            <text:p>per subjek</text:p>
          </table:table-cell>
          <table:table-cell table:style-name="ce5" office:value-type="string" calcext:value-type="string">
            <text:p>subject10</text:p>
          </table:table-cell>
          <table:table-cell table:style-name="ce5" table:formula="of:=COUNTIF([.$A$3:.$A$842];[.$B855])" office:value-type="float" office:value="96" calcext:value-type="float">
            <text:p>96</text:p>
          </table:table-cell>
          <table:table-cell table:style-name="ce5" table:number-columns-repeated="6"/>
          <table:table-cell table:style-name="ce8" table:formula="of:=AVERAGEIF([.$A$3:.$A$842];[.$B855];[.$K$3:.$K$842])" office:value-type="float" office:value="11.1660416666667" calcext:value-type="float">
            <text:p>11.2</text:p>
          </table:table-cell>
          <table:table-cell table:style-name="ce5"/>
          <table:table-cell table:style-name="ce8" table:formula="of:=AVERAGEIF([.$A$3:.$A$842];[.$B855];[.$L$3:.$L$842])" office:value-type="float" office:value="18.9696140483441" calcext:value-type="float">
            <text:p>19.0</text:p>
          </table:table-cell>
          <table:table-cell table:number-columns-repeated="16372"/>
        </table:table-row>
        <table:table-row table:style-name="ro4">
          <table:table-cell table:style-name="Default" table:number-columns-repeated="12"/>
          <table:table-cell table:number-columns-repeated="16372"/>
        </table:table-row>
        <table:table-row table:style-name="ro4">
          <table:table-cell table:style-name="ce6" office:value-type="string" calcext:value-type="string">
            <text:p>rata-rata antar-subjek</text:p>
          </table:table-cell>
          <table:table-cell table:style-name="Default" table:number-columns-repeated="8"/>
          <table:table-cell table:style-name="ce9" table:formula="of:=AVERAGE([.J846:.J855])" office:value-type="float" office:value="7.16300791064253" calcext:value-type="float">
            <text:p>7.2</text:p>
          </table:table-cell>
          <table:table-cell table:style-name="Default"/>
          <table:table-cell table:style-name="ce9" table:formula="of:=AVERAGE([.L846:.L855])" office:value-type="float" office:value="9.83927291559554" calcext:value-type="float">
            <text:p>9.8</text:p>
          </table:table-cell>
          <table:table-cell table:number-columns-repeated="16372"/>
        </table:table-row>
        <table:table-row table:style-name="ro4">
          <table:table-cell table:style-name="Default" office:value-type="string" calcext:value-type="string">
            <text:p>gabungan semua window</text:p>
          </table:table-cell>
          <table:table-cell table:style-name="Default"/>
          <table:table-cell table:style-name="Default" table:formula="of:=COUNT([.$K$3:.$K$842])" office:value-type="float" office:value="840" calcext:value-type="float">
            <text:p>840</text:p>
          </table:table-cell>
          <table:table-cell table:style-name="Default" table:number-columns-repeated="6"/>
          <table:table-cell table:style-name="ce7" table:formula="of:=AVERAGE([.$K$3:.$K$842])" office:value-type="float" office:value="7.22786904761905" calcext:value-type="float">
            <text:p>7.2</text:p>
          </table:table-cell>
          <table:table-cell table:style-name="Default"/>
          <table:table-cell table:style-name="ce7" table:formula="of:=AVERAGE([.$L$3:.$L$842])" office:value-type="float" office:value="9.98711679188219" calcext:value-type="float">
            <text:p>10.0</text:p>
          </table:table-cell>
          <table:table-cell table:number-columns-repeated="16372"/>
        </table:table-row>
        <table:table-row table:style-name="ro4">
          <table:table-cell table:style-name="Default" table:number-columns-repeated="12"/>
          <table:table-cell table:number-columns-repeated="16372"/>
        </table:table-row>
        <table:table-row table:style-name="ro4">
          <table:table-cell table:style-name="ce6" office:value-type="string" calcext:value-type="string">
            <text:p>lolos standar ANSI/CTA-2065 (MAPE &lt; 10%)</text:p>
          </table:table-cell>
          <table:table-cell table:style-name="Default" table:number-columns-repeated="8"/>
          <table:table-cell table:style-name="ce6" table:formula="of:=COUNTIF([.L846:.L855];&quot;&lt;10&quot;)&amp;&quot; dari 10 subjek&quot;" office:value-type="string" office:string-value="6 dari 10 subjek" calcext:value-type="string">
            <text:p>6 dari 10 subjek</text:p>
          </table:table-cell>
          <table:table-cell table:style-name="Default" table:number-columns-repeated="2"/>
          <table:table-cell table:number-columns-repeated="16372"/>
        </table:table-row>
      </table:table>
      <table:table table:name="Sheet2" table:style-name="ta2">
        <office:forms form:automatic-focus="false" form:apply-design-mode="false"/>
        <table:table-column table:style-name="co11" table:number-columns-repeated="11" table:default-cell-style-name="Default"/>
        <table:table-row table:style-name="ro3">
          <table:table-cell office:value-type="string" calcext:value-type="string">
            <text:p>subjek</text:p>
          </table:table-cell>
          <table:table-cell office:value-type="string" calcext:value-type="string">
            <text:p>Window ke</text:p>
          </table:table-cell>
          <table:table-cell office:value-type="string" calcext:value-type="string">
            <text:p>t_start</text:p>
          </table:table-cell>
          <table:table-cell office:value-type="string" calcext:value-type="string">
            <text:p>t_end</text:p>
          </table:table-cell>
          <table:table-cell office:value-type="string" calcext:value-type="string">
            <text:p>ECG</text:p>
          </table:table-cell>
          <table:table-cell/>
          <table:table-cell office:value-type="string" calcext:value-type="string">
            <text:p>Radar</text:p>
          </table:table-cell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error mutlak</text:p>
          </table:table-cell>
          <table:table-cell office:value-type="string" calcext:value-type="string">
            <text:p>error persen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4805" calcext:value-type="float">
            <text:p>1.4805</text:p>
          </table:table-cell>
          <table:table-cell office:value-type="float" office:value="88.83" calcext:value-type="float">
            <text:p>88.83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-1.83" calcext:value-type="float">
            <text:p>-1.83</text:p>
          </table:table-cell>
          <table:table-cell office:value-type="float" office:value="1.83" calcext:value-type="float">
            <text:p>1.83</text:p>
          </table:table-cell>
          <table:table-cell office:value-type="float" office:value="2.06011482607227" calcext:value-type="float">
            <text:p>2.06011482607227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4625" calcext:value-type="float">
            <text:p>1.4625</text:p>
          </table:table-cell>
          <table:table-cell office:value-type="float" office:value="87.75" calcext:value-type="float">
            <text:p>87.75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0.854700854700855" calcext:value-type="float">
            <text:p>0.854700854700855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4219" calcext:value-type="float">
            <text:p>1.4219</text:p>
          </table:table-cell>
          <table:table-cell office:value-type="float" office:value="85.32" calcext:value-type="float">
            <text:p>85.32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.68000000000001" calcext:value-type="float">
            <text:p>1.68000000000001</text:p>
          </table:table-cell>
          <table:table-cell office:value-type="float" office:value="1.96905766526021" calcext:value-type="float">
            <text:p>1.96905766526021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4122" calcext:value-type="float">
            <text:p>1.4122</text:p>
          </table:table-cell>
          <table:table-cell office:value-type="float" office:value="84.73" calcext:value-type="float">
            <text:p>84.73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-0.730000000000004" calcext:value-type="float">
            <text:p>-0.730000000000004</text:p>
          </table:table-cell>
          <table:table-cell office:value-type="float" office:value="0.730000000000004" calcext:value-type="float">
            <text:p>0.730000000000004</text:p>
          </table:table-cell>
          <table:table-cell office:value-type="float" office:value="0.861560250206543" calcext:value-type="float">
            <text:p>0.861560250206543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.3967" calcext:value-type="float">
            <text:p>1.3967</text:p>
          </table:table-cell>
          <table:table-cell office:value-type="float" office:value="83.8" calcext:value-type="float">
            <text:p>83.8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.200000000000003" calcext:value-type="float">
            <text:p>0.200000000000003</text:p>
          </table:table-cell>
          <table:table-cell office:value-type="float" office:value="0.238663484486877" calcext:value-type="float">
            <text:p>0.238663484486877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4121" calcext:value-type="float">
            <text:p>1.4121</text:p>
          </table:table-cell>
          <table:table-cell office:value-type="float" office:value="84.72" calcext:value-type="float">
            <text:p>84.72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-0.719999999999999" calcext:value-type="float">
            <text:p>-0.719999999999999</text:p>
          </table:table-cell>
          <table:table-cell office:value-type="float" office:value="0.719999999999999" calcext:value-type="float">
            <text:p>0.719999999999999</text:p>
          </table:table-cell>
          <table:table-cell office:value-type="float" office:value="0.849858356940509" calcext:value-type="float">
            <text:p>0.849858356940509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4582" calcext:value-type="float">
            <text:p>1.4582</text:p>
          </table:table-cell>
          <table:table-cell office:value-type="float" office:value="87.49" calcext:value-type="float">
            <text:p>87.49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-0.489999999999995" calcext:value-type="float">
            <text:p>-0.489999999999995</text:p>
          </table:table-cell>
          <table:table-cell office:value-type="float" office:value="0.489999999999995" calcext:value-type="float">
            <text:p>0.489999999999995</text:p>
          </table:table-cell>
          <table:table-cell office:value-type="float" office:value="0.560064007315116" calcext:value-type="float">
            <text:p>0.560064007315116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.4672" calcext:value-type="float">
            <text:p>1.4672</text:p>
          </table:table-cell>
          <table:table-cell office:value-type="float" office:value="88.03" calcext:value-type="float">
            <text:p>88.03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2.23787345223219" calcext:value-type="float">
            <text:p>2.23787345223219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.4907" calcext:value-type="float">
            <text:p>1.4907</text:p>
          </table:table-cell>
          <table:table-cell office:value-type="float" office:value="89.44" calcext:value-type="float">
            <text:p>89.44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560000000000002" calcext:value-type="float">
            <text:p>0.560000000000002</text:p>
          </table:table-cell>
          <table:table-cell office:value-type="float" office:value="0.626118067978536" calcext:value-type="float">
            <text:p>0.626118067978536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.4947" calcext:value-type="float">
            <text:p>1.4947</text:p>
          </table:table-cell>
          <table:table-cell office:value-type="float" office:value="89.68" calcext:value-type="float">
            <text:p>89.6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319999999999993" calcext:value-type="float">
            <text:p>0.319999999999993</text:p>
          </table:table-cell>
          <table:table-cell office:value-type="float" office:value="0.356824264049948" calcext:value-type="float">
            <text:p>0.356824264049948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494" calcext:value-type="float">
            <text:p>1.494</text:p>
          </table:table-cell>
          <table:table-cell office:value-type="float" office:value="89.64" calcext:value-type="float">
            <text:p>89.64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359999999999999" calcext:value-type="float">
            <text:p>0.359999999999999</text:p>
          </table:table-cell>
          <table:table-cell office:value-type="float" office:value="0.401606425702811" calcext:value-type="float">
            <text:p>0.401606425702811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.5097" calcext:value-type="float">
            <text:p>1.5097</text:p>
          </table:table-cell>
          <table:table-cell office:value-type="float" office:value="90.58" calcext:value-type="float">
            <text:p>90.5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0.579999999999998" calcext:value-type="float">
            <text:p>-0.579999999999998</text:p>
          </table:table-cell>
          <table:table-cell office:value-type="float" office:value="0.579999999999998" calcext:value-type="float">
            <text:p>0.579999999999998</text:p>
          </table:table-cell>
          <table:table-cell office:value-type="float" office:value="0.640317950982555" calcext:value-type="float">
            <text:p>0.640317950982555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5134" calcext:value-type="float">
            <text:p>1.5134</text:p>
          </table:table-cell>
          <table:table-cell office:value-type="float" office:value="90.8" calcext:value-type="float">
            <text:p>90.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0.799999999999997" calcext:value-type="float">
            <text:p>-0.799999999999997</text:p>
          </table:table-cell>
          <table:table-cell office:value-type="float" office:value="0.799999999999997" calcext:value-type="float">
            <text:p>0.799999999999997</text:p>
          </table:table-cell>
          <table:table-cell office:value-type="float" office:value="0.881057268722464" calcext:value-type="float">
            <text:p>0.881057268722464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.5227" calcext:value-type="float">
            <text:p>1.5227</text:p>
          </table:table-cell>
          <table:table-cell office:value-type="float" office:value="91.36" calcext:value-type="float">
            <text:p>91.36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1.36" calcext:value-type="float">
            <text:p>-1.36</text:p>
          </table:table-cell>
          <table:table-cell office:value-type="float" office:value="1.36" calcext:value-type="float">
            <text:p>1.36</text:p>
          </table:table-cell>
          <table:table-cell office:value-type="float" office:value="1.48861646234676" calcext:value-type="float">
            <text:p>1.48861646234676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.5167" calcext:value-type="float">
            <text:p>1.5167</text:p>
          </table:table-cell>
          <table:table-cell office:value-type="float" office:value="91" calcext:value-type="float">
            <text:p>91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.0989010989011" calcext:value-type="float">
            <text:p>1.0989010989011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.5022" calcext:value-type="float">
            <text:p>1.5022</text:p>
          </table:table-cell>
          <table:table-cell office:value-type="float" office:value="90.13" calcext:value-type="float">
            <text:p>90.13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0.129999999999995" calcext:value-type="float">
            <text:p>-0.129999999999995</text:p>
          </table:table-cell>
          <table:table-cell office:value-type="float" office:value="0.129999999999995" calcext:value-type="float">
            <text:p>0.129999999999995</text:p>
          </table:table-cell>
          <table:table-cell office:value-type="float" office:value="0.144236103406186" calcext:value-type="float">
            <text:p>0.144236103406186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481" calcext:value-type="float">
            <text:p>1.481</text:p>
          </table:table-cell>
          <table:table-cell office:value-type="float" office:value="88.86" calcext:value-type="float">
            <text:p>88.86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1.2829169480081" calcext:value-type="float">
            <text:p>1.2829169480081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.4793" calcext:value-type="float">
            <text:p>1.4793</text:p>
          </table:table-cell>
          <table:table-cell office:value-type="float" office:value="88.76" calcext:value-type="float">
            <text:p>88.76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.23999999999999" calcext:value-type="float">
            <text:p>1.23999999999999</text:p>
          </table:table-cell>
          <table:table-cell office:value-type="float" office:value="1.3970256872465" calcext:value-type="float">
            <text:p>1.3970256872465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.4841" calcext:value-type="float">
            <text:p>1.4841</text:p>
          </table:table-cell>
          <table:table-cell office:value-type="float" office:value="89.04" calcext:value-type="float">
            <text:p>89.04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959999999999994" calcext:value-type="float">
            <text:p>0.959999999999994</text:p>
          </table:table-cell>
          <table:table-cell office:value-type="float" office:value="1.07816711590296" calcext:value-type="float">
            <text:p>1.07816711590296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.5015" calcext:value-type="float">
            <text:p>1.5015</text:p>
          </table:table-cell>
          <table:table-cell office:value-type="float" office:value="90.09" calcext:value-type="float">
            <text:p>90.09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0.0900000000000034" calcext:value-type="float">
            <text:p>-0.0900000000000034</text:p>
          </table:table-cell>
          <table:table-cell office:value-type="float" office:value="0.0900000000000034" calcext:value-type="float">
            <text:p>0.0900000000000034</text:p>
          </table:table-cell>
          <table:table-cell office:value-type="float" office:value="0.0999000999001037" calcext:value-type="float">
            <text:p>0.0999000999001037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.5163" calcext:value-type="float">
            <text:p>1.5163</text:p>
          </table:table-cell>
          <table:table-cell office:value-type="float" office:value="90.98" calcext:value-type="float">
            <text:p>90.9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0.980000000000004" calcext:value-type="float">
            <text:p>-0.980000000000004</text:p>
          </table:table-cell>
          <table:table-cell office:value-type="float" office:value="0.980000000000004" calcext:value-type="float">
            <text:p>0.980000000000004</text:p>
          </table:table-cell>
          <table:table-cell office:value-type="float" office:value="1.07715981534404" calcext:value-type="float">
            <text:p>1.07715981534404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.5052" calcext:value-type="float">
            <text:p>1.5052</text:p>
          </table:table-cell>
          <table:table-cell office:value-type="float" office:value="90.31" calcext:value-type="float">
            <text:p>90.31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0.310000000000002" calcext:value-type="float">
            <text:p>-0.310000000000002</text:p>
          </table:table-cell>
          <table:table-cell office:value-type="float" office:value="0.310000000000002" calcext:value-type="float">
            <text:p>0.310000000000002</text:p>
          </table:table-cell>
          <table:table-cell office:value-type="float" office:value="0.343262097220687" calcext:value-type="float">
            <text:p>0.343262097220687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.5042" calcext:value-type="float">
            <text:p>1.5042</text:p>
          </table:table-cell>
          <table:table-cell office:value-type="float" office:value="90.25" calcext:value-type="float">
            <text:p>90.25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0.277008310249308" calcext:value-type="float">
            <text:p>0.277008310249308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.5032" calcext:value-type="float">
            <text:p>1.5032</text:p>
          </table:table-cell>
          <table:table-cell office:value-type="float" office:value="90.19" calcext:value-type="float">
            <text:p>90.19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0.189999999999998" calcext:value-type="float">
            <text:p>-0.189999999999998</text:p>
          </table:table-cell>
          <table:table-cell office:value-type="float" office:value="0.189999999999998" calcext:value-type="float">
            <text:p>0.189999999999998</text:p>
          </table:table-cell>
          <table:table-cell office:value-type="float" office:value="0.210666370994565" calcext:value-type="float">
            <text:p>0.210666370994565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.5182" calcext:value-type="float">
            <text:p>1.5182</text:p>
          </table:table-cell>
          <table:table-cell office:value-type="float" office:value="91.09" calcext:value-type="float">
            <text:p>91.09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1.09" calcext:value-type="float">
            <text:p>-1.09</text:p>
          </table:table-cell>
          <table:table-cell office:value-type="float" office:value="1.09" calcext:value-type="float">
            <text:p>1.09</text:p>
          </table:table-cell>
          <table:table-cell office:value-type="float" office:value="1.19661872872983" calcext:value-type="float">
            <text:p>1.19661872872983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.5308" calcext:value-type="float">
            <text:p>1.5308</text:p>
          </table:table-cell>
          <table:table-cell office:value-type="float" office:value="91.85" calcext:value-type="float">
            <text:p>91.85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.15000000000001" calcext:value-type="float">
            <text:p>1.15000000000001</text:p>
          </table:table-cell>
          <table:table-cell office:value-type="float" office:value="1.25204137180186" calcext:value-type="float">
            <text:p>1.25204137180186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.5406" calcext:value-type="float">
            <text:p>1.5406</text:p>
          </table:table-cell>
          <table:table-cell office:value-type="float" office:value="92.44" calcext:value-type="float">
            <text:p>92.44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.560000000000002" calcext:value-type="float">
            <text:p>0.560000000000002</text:p>
          </table:table-cell>
          <table:table-cell office:value-type="float" office:value="0.60579835569018" calcext:value-type="float">
            <text:p>0.60579835569018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.5336" calcext:value-type="float">
            <text:p>1.5336</text:p>
          </table:table-cell>
          <table:table-cell office:value-type="float" office:value="92.02" calcext:value-type="float">
            <text:p>92.02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.980000000000004" calcext:value-type="float">
            <text:p>0.980000000000004</text:p>
          </table:table-cell>
          <table:table-cell office:value-type="float" office:value="1.06498587263639" calcext:value-type="float">
            <text:p>1.06498587263639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.5372" calcext:value-type="float">
            <text:p>1.5372</text:p>
          </table:table-cell>
          <table:table-cell office:value-type="float" office:value="92.23" calcext:value-type="float">
            <text:p>92.23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2.23" calcext:value-type="float">
            <text:p>-2.23</text:p>
          </table:table-cell>
          <table:table-cell office:value-type="float" office:value="2.23" calcext:value-type="float">
            <text:p>2.23</text:p>
          </table:table-cell>
          <table:table-cell office:value-type="float" office:value="2.4178683725469" calcext:value-type="float">
            <text:p>2.4178683725469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.5252" calcext:value-type="float">
            <text:p>1.5252</text:p>
          </table:table-cell>
          <table:table-cell office:value-type="float" office:value="91.51" calcext:value-type="float">
            <text:p>91.51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-19.51" calcext:value-type="float">
            <text:p>-19.51</text:p>
          </table:table-cell>
          <table:table-cell office:value-type="float" office:value="19.51" calcext:value-type="float">
            <text:p>19.51</text:p>
          </table:table-cell>
          <table:table-cell office:value-type="float" office:value="21.3200743088187" calcext:value-type="float">
            <text:p>21.3200743088187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.5253" calcext:value-type="float">
            <text:p>1.5253</text:p>
          </table:table-cell>
          <table:table-cell office:value-type="float" office:value="91.52" calcext:value-type="float">
            <text:p>91.52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-19.52" calcext:value-type="float">
            <text:p>-19.52</text:p>
          </table:table-cell>
          <table:table-cell office:value-type="float" office:value="19.52" calcext:value-type="float">
            <text:p>19.52</text:p>
          </table:table-cell>
          <table:table-cell office:value-type="float" office:value="21.3286713286713" calcext:value-type="float">
            <text:p>21.3286713286713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.5461" calcext:value-type="float">
            <text:p>1.5461</text:p>
          </table:table-cell>
          <table:table-cell office:value-type="float" office:value="92.76" calcext:value-type="float">
            <text:p>92.76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-20.76" calcext:value-type="float">
            <text:p>-20.76</text:p>
          </table:table-cell>
          <table:table-cell office:value-type="float" office:value="20.76" calcext:value-type="float">
            <text:p>20.76</text:p>
          </table:table-cell>
          <table:table-cell office:value-type="float" office:value="22.3803363518758" calcext:value-type="float">
            <text:p>22.3803363518758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.523" calcext:value-type="float">
            <text:p>1.523</text:p>
          </table:table-cell>
          <table:table-cell office:value-type="float" office:value="91.38" calcext:value-type="float">
            <text:p>91.3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1.38" calcext:value-type="float">
            <text:p>-1.38</text:p>
          </table:table-cell>
          <table:table-cell office:value-type="float" office:value="1.38" calcext:value-type="float">
            <text:p>1.38</text:p>
          </table:table-cell>
          <table:table-cell office:value-type="float" office:value="1.51017728168089" calcext:value-type="float">
            <text:p>1.51017728168089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.5244" calcext:value-type="float">
            <text:p>1.5244</text:p>
          </table:table-cell>
          <table:table-cell office:value-type="float" office:value="91.47" calcext:value-type="float">
            <text:p>91.47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1.47" calcext:value-type="float">
            <text:p>-1.47</text:p>
          </table:table-cell>
          <table:table-cell office:value-type="float" office:value="1.47" calcext:value-type="float">
            <text:p>1.47</text:p>
          </table:table-cell>
          <table:table-cell office:value-type="float" office:value="1.60708428993112" calcext:value-type="float">
            <text:p>1.60708428993112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.4934" calcext:value-type="float">
            <text:p>1.4934</text:p>
          </table:table-cell>
          <table:table-cell office:value-type="float" office:value="89.6" calcext:value-type="float">
            <text:p>89.6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400000000000006" calcext:value-type="float">
            <text:p>0.400000000000006</text:p>
          </table:table-cell>
          <table:table-cell office:value-type="float" office:value="0.446428571428578" calcext:value-type="float">
            <text:p>0.446428571428578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.4586" calcext:value-type="float">
            <text:p>1.4586</text:p>
          </table:table-cell>
          <table:table-cell office:value-type="float" office:value="87.51" calcext:value-type="float">
            <text:p>87.51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-0.510000000000005" calcext:value-type="float">
            <text:p>-0.510000000000005</text:p>
          </table:table-cell>
          <table:table-cell office:value-type="float" office:value="0.510000000000005" calcext:value-type="float">
            <text:p>0.510000000000005</text:p>
          </table:table-cell>
          <table:table-cell office:value-type="float" office:value="0.582790538224209" calcext:value-type="float">
            <text:p>0.582790538224209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.4567" calcext:value-type="float">
            <text:p>1.4567</text:p>
          </table:table-cell>
          <table:table-cell office:value-type="float" office:value="87.4" calcext:value-type="float">
            <text:p>87.4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-0.400000000000006" calcext:value-type="float">
            <text:p>-0.400000000000006</text:p>
          </table:table-cell>
          <table:table-cell office:value-type="float" office:value="0.400000000000006" calcext:value-type="float">
            <text:p>0.400000000000006</text:p>
          </table:table-cell>
          <table:table-cell office:value-type="float" office:value="0.457665903890167" calcext:value-type="float">
            <text:p>0.457665903890167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.4613" calcext:value-type="float">
            <text:p>1.4613</text:p>
          </table:table-cell>
          <table:table-cell office:value-type="float" office:value="87.68" calcext:value-type="float">
            <text:p>87.68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-0.680000000000007" calcext:value-type="float">
            <text:p>-0.680000000000007</text:p>
          </table:table-cell>
          <table:table-cell office:value-type="float" office:value="0.680000000000007" calcext:value-type="float">
            <text:p>0.680000000000007</text:p>
          </table:table-cell>
          <table:table-cell office:value-type="float" office:value="0.775547445255482" calcext:value-type="float">
            <text:p>0.775547445255482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.4713" calcext:value-type="float">
            <text:p>1.4713</text:p>
          </table:table-cell>
          <table:table-cell office:value-type="float" office:value="88.28" calcext:value-type="float">
            <text:p>88.28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-1.28" calcext:value-type="float">
            <text:p>-1.28</text:p>
          </table:table-cell>
          <table:table-cell office:value-type="float" office:value="1.28" calcext:value-type="float">
            <text:p>1.28</text:p>
          </table:table-cell>
          <table:table-cell office:value-type="float" office:value="1.44993203443589" calcext:value-type="float">
            <text:p>1.44993203443589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.4768" calcext:value-type="float">
            <text:p>1.4768</text:p>
          </table:table-cell>
          <table:table-cell office:value-type="float" office:value="88.61" calcext:value-type="float">
            <text:p>88.61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.39" calcext:value-type="float">
            <text:p>1.39</text:p>
          </table:table-cell>
          <table:table-cell office:value-type="float" office:value="1.56867170748223" calcext:value-type="float">
            <text:p>1.56867170748223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1.4887" calcext:value-type="float">
            <text:p>1.4887</text:p>
          </table:table-cell>
          <table:table-cell office:value-type="float" office:value="89.32" calcext:value-type="float">
            <text:p>89.32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680000000000007" calcext:value-type="float">
            <text:p>0.680000000000007</text:p>
          </table:table-cell>
          <table:table-cell office:value-type="float" office:value="0.76130765785939" calcext:value-type="float">
            <text:p>0.76130765785939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1.483" calcext:value-type="float">
            <text:p>1.483</text:p>
          </table:table-cell>
          <table:table-cell office:value-type="float" office:value="88.98" calcext:value-type="float">
            <text:p>88.9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.14632501685772" calcext:value-type="float">
            <text:p>1.14632501685772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1.4977" calcext:value-type="float">
            <text:p>1.4977</text:p>
          </table:table-cell>
          <table:table-cell office:value-type="float" office:value="89.86" calcext:value-type="float">
            <text:p>89.86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140000000000001" calcext:value-type="float">
            <text:p>0.140000000000001</text:p>
          </table:table-cell>
          <table:table-cell office:value-type="float" office:value="0.155797907856667" calcext:value-type="float">
            <text:p>0.155797907856667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.5016" calcext:value-type="float">
            <text:p>1.5016</text:p>
          </table:table-cell>
          <table:table-cell office:value-type="float" office:value="90.1" calcext:value-type="float">
            <text:p>90.1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0.0999999999999943" calcext:value-type="float">
            <text:p>-0.0999999999999943</text:p>
          </table:table-cell>
          <table:table-cell office:value-type="float" office:value="0.0999999999999943" calcext:value-type="float">
            <text:p>0.0999999999999943</text:p>
          </table:table-cell>
          <table:table-cell office:value-type="float" office:value="0.110987791342946" calcext:value-type="float">
            <text:p>0.110987791342946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1.4987" calcext:value-type="float">
            <text:p>1.4987</text:p>
          </table:table-cell>
          <table:table-cell office:value-type="float" office:value="89.92" calcext:value-type="float">
            <text:p>89.92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0799999999999983" calcext:value-type="float">
            <text:p>0.0799999999999983</text:p>
          </table:table-cell>
          <table:table-cell office:value-type="float" office:value="0.0889679715302472" calcext:value-type="float">
            <text:p>0.0889679715302472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.5077" calcext:value-type="float">
            <text:p>1.5077</text:p>
          </table:table-cell>
          <table:table-cell office:value-type="float" office:value="90.46" calcext:value-type="float">
            <text:p>90.46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0.459999999999994" calcext:value-type="float">
            <text:p>-0.459999999999994</text:p>
          </table:table-cell>
          <table:table-cell office:value-type="float" office:value="0.459999999999994" calcext:value-type="float">
            <text:p>0.459999999999994</text:p>
          </table:table-cell>
          <table:table-cell office:value-type="float" office:value="0.508512049524645" calcext:value-type="float">
            <text:p>0.508512049524645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.5124" calcext:value-type="float">
            <text:p>1.5124</text:p>
          </table:table-cell>
          <table:table-cell office:value-type="float" office:value="90.74" calcext:value-type="float">
            <text:p>90.74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0.739999999999995" calcext:value-type="float">
            <text:p>-0.739999999999995</text:p>
          </table:table-cell>
          <table:table-cell office:value-type="float" office:value="0.739999999999995" calcext:value-type="float">
            <text:p>0.739999999999995</text:p>
          </table:table-cell>
          <table:table-cell office:value-type="float" office:value="0.815516861362128" calcext:value-type="float">
            <text:p>0.815516861362128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.5263" calcext:value-type="float">
            <text:p>1.5263</text:p>
          </table:table-cell>
          <table:table-cell office:value-type="float" office:value="91.58" calcext:value-type="float">
            <text:p>91.5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-1.58" calcext:value-type="float">
            <text:p>-1.58</text:p>
          </table:table-cell>
          <table:table-cell office:value-type="float" office:value="1.58" calcext:value-type="float">
            <text:p>1.58</text:p>
          </table:table-cell>
          <table:table-cell office:value-type="float" office:value="1.72526752566062" calcext:value-type="float">
            <text:p>1.72526752566062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1.5451" calcext:value-type="float">
            <text:p>1.5451</text:p>
          </table:table-cell>
          <table:table-cell office:value-type="float" office:value="92.7" calcext:value-type="float">
            <text:p>92.7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.299999999999997" calcext:value-type="float">
            <text:p>0.299999999999997</text:p>
          </table:table-cell>
          <table:table-cell office:value-type="float" office:value="0.323624595469253" calcext:value-type="float">
            <text:p>0.323624595469253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1.5612" calcext:value-type="float">
            <text:p>1.5612</text:p>
          </table:table-cell>
          <table:table-cell office:value-type="float" office:value="93.67" calcext:value-type="float">
            <text:p>93.67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-0.670000000000002" calcext:value-type="float">
            <text:p>-0.670000000000002</text:p>
          </table:table-cell>
          <table:table-cell office:value-type="float" office:value="0.670000000000002" calcext:value-type="float">
            <text:p>0.670000000000002</text:p>
          </table:table-cell>
          <table:table-cell office:value-type="float" office:value="0.7152770364044" calcext:value-type="float">
            <text:p>0.7152770364044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1.5602" calcext:value-type="float">
            <text:p>1.5602</text:p>
          </table:table-cell>
          <table:table-cell office:value-type="float" office:value="93.61" calcext:value-type="float">
            <text:p>93.61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-0.609999999999999" calcext:value-type="float">
            <text:p>-0.609999999999999</text:p>
          </table:table-cell>
          <table:table-cell office:value-type="float" office:value="0.609999999999999" calcext:value-type="float">
            <text:p>0.609999999999999</text:p>
          </table:table-cell>
          <table:table-cell office:value-type="float" office:value="0.651639782074564" calcext:value-type="float">
            <text:p>0.651639782074564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office:value-type="float" office:value="1.5694" calcext:value-type="float">
            <text:p>1.5694</text:p>
          </table:table-cell>
          <table:table-cell office:value-type="float" office:value="94.16" calcext:value-type="float">
            <text:p>94.16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-1.16" calcext:value-type="float">
            <text:p>-1.16</text:p>
          </table:table-cell>
          <table:table-cell office:value-type="float" office:value="1.16" calcext:value-type="float">
            <text:p>1.16</text:p>
          </table:table-cell>
          <table:table-cell office:value-type="float" office:value="1.23194562446899" calcext:value-type="float">
            <text:p>1.23194562446899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1.5739" calcext:value-type="float">
            <text:p>1.5739</text:p>
          </table:table-cell>
          <table:table-cell office:value-type="float" office:value="94.43" calcext:value-type="float">
            <text:p>94.43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-1.43000000000001" calcext:value-type="float">
            <text:p>-1.43000000000001</text:p>
          </table:table-cell>
          <table:table-cell office:value-type="float" office:value="1.43000000000001" calcext:value-type="float">
            <text:p>1.43000000000001</text:p>
          </table:table-cell>
          <table:table-cell office:value-type="float" office:value="1.51434925341524" calcext:value-type="float">
            <text:p>1.51434925341524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1.5592" calcext:value-type="float">
            <text:p>1.5592</text:p>
          </table:table-cell>
          <table:table-cell office:value-type="float" office:value="93.55" calcext:value-type="float">
            <text:p>93.55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-0.549999999999997" calcext:value-type="float">
            <text:p>-0.549999999999997</text:p>
          </table:table-cell>
          <table:table-cell office:value-type="float" office:value="0.549999999999997" calcext:value-type="float">
            <text:p>0.549999999999997</text:p>
          </table:table-cell>
          <table:table-cell office:value-type="float" office:value="0.58792089791555" calcext:value-type="float">
            <text:p>0.58792089791555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1.5823" calcext:value-type="float">
            <text:p>1.5823</text:p>
          </table:table-cell>
          <table:table-cell office:value-type="float" office:value="94.94" calcext:value-type="float">
            <text:p>94.94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-1.94" calcext:value-type="float">
            <text:p>-1.94</text:p>
          </table:table-cell>
          <table:table-cell office:value-type="float" office:value="1.94" calcext:value-type="float">
            <text:p>1.94</text:p>
          </table:table-cell>
          <table:table-cell office:value-type="float" office:value="2.04339582894459" calcext:value-type="float">
            <text:p>2.04339582894459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1.5791" calcext:value-type="float">
            <text:p>1.5791</text:p>
          </table:table-cell>
          <table:table-cell office:value-type="float" office:value="94.74" calcext:value-type="float">
            <text:p>94.74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-1.73999999999999" calcext:value-type="float">
            <text:p>-1.73999999999999</text:p>
          </table:table-cell>
          <table:table-cell office:value-type="float" office:value="1.73999999999999" calcext:value-type="float">
            <text:p>1.73999999999999</text:p>
          </table:table-cell>
          <table:table-cell office:value-type="float" office:value="1.83660544648511" calcext:value-type="float">
            <text:p>1.83660544648511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57" calcext:value-type="float">
            <text:p>57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1.562" calcext:value-type="float">
            <text:p>1.562</text:p>
          </table:table-cell>
          <table:table-cell office:value-type="float" office:value="93.72" calcext:value-type="float">
            <text:p>93.72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-0.719999999999999" calcext:value-type="float">
            <text:p>-0.719999999999999</text:p>
          </table:table-cell>
          <table:table-cell office:value-type="float" office:value="0.719999999999999" calcext:value-type="float">
            <text:p>0.719999999999999</text:p>
          </table:table-cell>
          <table:table-cell office:value-type="float" office:value="0.768245838668373" calcext:value-type="float">
            <text:p>0.768245838668373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58" calcext:value-type="float">
            <text:p>58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1.557" calcext:value-type="float">
            <text:p>1.557</text:p>
          </table:table-cell>
          <table:table-cell office:value-type="float" office:value="93.42" calcext:value-type="float">
            <text:p>93.42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office:value-type="float" office:value="-0.420000000000002" calcext:value-type="float">
            <text:p>-0.420000000000002</text:p>
          </table:table-cell>
          <table:table-cell office:value-type="float" office:value="0.420000000000002" calcext:value-type="float">
            <text:p>0.420000000000002</text:p>
          </table:table-cell>
          <table:table-cell office:value-type="float" office:value="0.449582530507388" calcext:value-type="float">
            <text:p>0.449582530507388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59" calcext:value-type="float">
            <text:p>59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1.5348" calcext:value-type="float">
            <text:p>1.5348</text:p>
          </table:table-cell>
          <table:table-cell office:value-type="float" office:value="92.09" calcext:value-type="float">
            <text:p>92.09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.909999999999997" calcext:value-type="float">
            <text:p>0.909999999999997</text:p>
          </table:table-cell>
          <table:table-cell office:value-type="float" office:value="0.988163752850469" calcext:value-type="float">
            <text:p>0.988163752850469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.5133" calcext:value-type="float">
            <text:p>1.5133</text:p>
          </table:table-cell>
          <table:table-cell office:value-type="float" office:value="90.8" calcext:value-type="float">
            <text:p>90.8</text:p>
          </table:table-cell>
          <table:table-cell office:value-type="float" office:value="1.55" calcext:value-type="float">
            <text:p>1.5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42290748898679" calcext:value-type="float">
            <text:p>2.42290748898679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1.4875" calcext:value-type="float">
            <text:p>1.4875</text:p>
          </table:table-cell>
          <table:table-cell office:value-type="float" office:value="89.25" calcext:value-type="float">
            <text:p>89.25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40336134453782" calcext:value-type="float">
            <text:p>0.840336134453782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62" calcext:value-type="float">
            <text:p>62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1.4788" calcext:value-type="float">
            <text:p>1.4788</text:p>
          </table:table-cell>
          <table:table-cell office:value-type="float" office:value="88.73" calcext:value-type="float">
            <text:p>88.73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-1.73" calcext:value-type="float">
            <text:p>-1.73</text:p>
          </table:table-cell>
          <table:table-cell office:value-type="float" office:value="1.73" calcext:value-type="float">
            <text:p>1.73</text:p>
          </table:table-cell>
          <table:table-cell office:value-type="float" office:value="1.94973515158346" calcext:value-type="float">
            <text:p>1.94973515158346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.4723" calcext:value-type="float">
            <text:p>1.4723</text:p>
          </table:table-cell>
          <table:table-cell office:value-type="float" office:value="88.34" calcext:value-type="float">
            <text:p>88.34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-1.34" calcext:value-type="float">
            <text:p>-1.34</text:p>
          </table:table-cell>
          <table:table-cell office:value-type="float" office:value="1.34" calcext:value-type="float">
            <text:p>1.34</text:p>
          </table:table-cell>
          <table:table-cell office:value-type="float" office:value="1.51686665157347" calcext:value-type="float">
            <text:p>1.51686665157347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.4644" calcext:value-type="float">
            <text:p>1.4644</text:p>
          </table:table-cell>
          <table:table-cell office:value-type="float" office:value="87.86" calcext:value-type="float">
            <text:p>87.86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-0.859999999999999" calcext:value-type="float">
            <text:p>-0.859999999999999</text:p>
          </table:table-cell>
          <table:table-cell office:value-type="float" office:value="0.859999999999999" calcext:value-type="float">
            <text:p>0.859999999999999</text:p>
          </table:table-cell>
          <table:table-cell office:value-type="float" office:value="0.978829956749373" calcext:value-type="float">
            <text:p>0.978829956749373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.4804" calcext:value-type="float">
            <text:p>1.4804</text:p>
          </table:table-cell>
          <table:table-cell office:value-type="float" office:value="88.82" calcext:value-type="float">
            <text:p>88.82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-1.81999999999999" calcext:value-type="float">
            <text:p>-1.81999999999999</text:p>
          </table:table-cell>
          <table:table-cell office:value-type="float" office:value="1.81999999999999" calcext:value-type="float">
            <text:p>1.81999999999999</text:p>
          </table:table-cell>
          <table:table-cell office:value-type="float" office:value="2.0490880432335" calcext:value-type="float">
            <text:p>2.0490880432335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66" calcext:value-type="float">
            <text:p>66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1.462" calcext:value-type="float">
            <text:p>1.462</text:p>
          </table:table-cell>
          <table:table-cell office:value-type="float" office:value="87.72" calcext:value-type="float">
            <text:p>87.72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-0.719999999999999" calcext:value-type="float">
            <text:p>-0.719999999999999</text:p>
          </table:table-cell>
          <table:table-cell office:value-type="float" office:value="0.719999999999999" calcext:value-type="float">
            <text:p>0.719999999999999</text:p>
          </table:table-cell>
          <table:table-cell office:value-type="float" office:value="0.82079343365253" calcext:value-type="float">
            <text:p>0.82079343365253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1.4521" calcext:value-type="float">
            <text:p>1.4521</text:p>
          </table:table-cell>
          <table:table-cell office:value-type="float" office:value="87.12" calcext:value-type="float">
            <text:p>87.12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office:value-type="float" office:value="-0.120000000000005" calcext:value-type="float">
            <text:p>-0.120000000000005</text:p>
          </table:table-cell>
          <table:table-cell office:value-type="float" office:value="0.120000000000005" calcext:value-type="float">
            <text:p>0.120000000000005</text:p>
          </table:table-cell>
          <table:table-cell office:value-type="float" office:value="0.137741046831961" calcext:value-type="float">
            <text:p>0.137741046831961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68" calcext:value-type="float">
            <text:p>68</text:p>
          </table:table-cell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office:value-type="float" office:value="1.4378" calcext:value-type="float">
            <text:p>1.4378</text:p>
          </table:table-cell>
          <table:table-cell office:value-type="float" office:value="86.27" calcext:value-type="float">
            <text:p>86.27</text:p>
          </table:table-cell>
          <table:table-cell office:value-type="float" office:value="1.45" calcext:value-type="float">
            <text:p>1.4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.730000000000004" calcext:value-type="float">
            <text:p>0.730000000000004</text:p>
          </table:table-cell>
          <table:table-cell office:value-type="float" office:value="0.846180595803876" calcext:value-type="float">
            <text:p>0.846180595803876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1.4247" calcext:value-type="float">
            <text:p>1.4247</text:p>
          </table:table-cell>
          <table:table-cell office:value-type="float" office:value="85.48" calcext:value-type="float">
            <text:p>85.48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-1.48" calcext:value-type="float">
            <text:p>-1.48</text:p>
          </table:table-cell>
          <table:table-cell office:value-type="float" office:value="1.48" calcext:value-type="float">
            <text:p>1.48</text:p>
          </table:table-cell>
          <table:table-cell office:value-type="float" office:value="1.73139915769771" calcext:value-type="float">
            <text:p>1.73139915769771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1.4104" calcext:value-type="float">
            <text:p>1.4104</text:p>
          </table:table-cell>
          <table:table-cell office:value-type="float" office:value="84.63" calcext:value-type="float">
            <text:p>84.63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-18.63" calcext:value-type="float">
            <text:p>-18.63</text:p>
          </table:table-cell>
          <table:table-cell office:value-type="float" office:value="18.63" calcext:value-type="float">
            <text:p>18.63</text:p>
          </table:table-cell>
          <table:table-cell office:value-type="float" office:value="22.0134704005672" calcext:value-type="float">
            <text:p>22.0134704005672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1.3906" calcext:value-type="float">
            <text:p>1.3906</text:p>
          </table:table-cell>
          <table:table-cell office:value-type="float" office:value="83.44" calcext:value-type="float">
            <text:p>83.44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.560000000000002" calcext:value-type="float">
            <text:p>0.560000000000002</text:p>
          </table:table-cell>
          <table:table-cell office:value-type="float" office:value="0.671140939597318" calcext:value-type="float">
            <text:p>0.671140939597318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1.3999" calcext:value-type="float">
            <text:p>1.3999</text:p>
          </table:table-cell>
          <table:table-cell office:value-type="float" office:value="83.99" calcext:value-type="float">
            <text:p>83.99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.0100000000000051" calcext:value-type="float">
            <text:p>0.0100000000000051</text:p>
          </table:table-cell>
          <table:table-cell office:value-type="float" office:value="0.0119061793070665" calcext:value-type="float">
            <text:p>0.0119061793070665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1.3906" calcext:value-type="float">
            <text:p>1.3906</text:p>
          </table:table-cell>
          <table:table-cell office:value-type="float" office:value="83.43" calcext:value-type="float">
            <text:p>83.43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.569999999999993" calcext:value-type="float">
            <text:p>0.569999999999993</text:p>
          </table:table-cell>
          <table:table-cell office:value-type="float" office:value="0.683207479323976" calcext:value-type="float">
            <text:p>0.683207479323976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1.3943" calcext:value-type="float">
            <text:p>1.3943</text:p>
          </table:table-cell>
          <table:table-cell office:value-type="float" office:value="83.66" calcext:value-type="float">
            <text:p>83.66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.340000000000003" calcext:value-type="float">
            <text:p>0.340000000000003</text:p>
          </table:table-cell>
          <table:table-cell office:value-type="float" office:value="0.406406885010762" calcext:value-type="float">
            <text:p>0.406406885010762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.4011" calcext:value-type="float">
            <text:p>1.4011</text:p>
          </table:table-cell>
          <table:table-cell office:value-type="float" office:value="84.07" calcext:value-type="float">
            <text:p>84.07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-0.0699999999999932" calcext:value-type="float">
            <text:p>-0.0699999999999932</text:p>
          </table:table-cell>
          <table:table-cell office:value-type="float" office:value="0.0699999999999932" calcext:value-type="float">
            <text:p>0.0699999999999932</text:p>
          </table:table-cell>
          <table:table-cell office:value-type="float" office:value="0.083263946711066" calcext:value-type="float">
            <text:p>0.083263946711066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76" calcext:value-type="float">
            <text:p>76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1.3917" calcext:value-type="float">
            <text:p>1.3917</text:p>
          </table:table-cell>
          <table:table-cell office:value-type="float" office:value="83.5" calcext:value-type="float">
            <text:p>83.5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98802395209581" calcext:value-type="float">
            <text:p>0.598802395209581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77" calcext:value-type="float">
            <text:p>7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1.4213" calcext:value-type="float">
            <text:p>1.4213</text:p>
          </table:table-cell>
          <table:table-cell office:value-type="float" office:value="85.28" calcext:value-type="float">
            <text:p>85.28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-1.28" calcext:value-type="float">
            <text:p>-1.28</text:p>
          </table:table-cell>
          <table:table-cell office:value-type="float" office:value="1.28" calcext:value-type="float">
            <text:p>1.28</text:p>
          </table:table-cell>
          <table:table-cell office:value-type="float" office:value="1.50093808630394" calcext:value-type="float">
            <text:p>1.50093808630394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1.454" calcext:value-type="float">
            <text:p>1.454</text:p>
          </table:table-cell>
          <table:table-cell office:value-type="float" office:value="87.24" calcext:value-type="float">
            <text:p>87.24</text:p>
          </table:table-cell>
          <table:table-cell office:value-type="float" office:value="1.4" calcext:value-type="float">
            <text:p>1.4</text:p>
          </table:table-cell>
          <table:table-cell office:value-type="float" office:value="84" calcext:value-type="float">
            <text:p>84</text:p>
          </table:table-cell>
          <table:table-cell office:value-type="float" office:value="-3.24" calcext:value-type="float">
            <text:p>-3.24</text:p>
          </table:table-cell>
          <table:table-cell office:value-type="float" office:value="3.24" calcext:value-type="float">
            <text:p>3.24</text:p>
          </table:table-cell>
          <table:table-cell office:value-type="float" office:value="3.71389270976616" calcext:value-type="float">
            <text:p>3.71389270976616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79" calcext:value-type="float">
            <text:p>79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1.4675" calcext:value-type="float">
            <text:p>1.4675</text:p>
          </table:table-cell>
          <table:table-cell office:value-type="float" office:value="88.05" calcext:value-type="float">
            <text:p>88.05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-13.05" calcext:value-type="float">
            <text:p>-13.05</text:p>
          </table:table-cell>
          <table:table-cell office:value-type="float" office:value="13.05" calcext:value-type="float">
            <text:p>13.05</text:p>
          </table:table-cell>
          <table:table-cell office:value-type="float" office:value="14.8211243611584" calcext:value-type="float">
            <text:p>14.8211243611584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415" calcext:value-type="float">
            <text:p>415</text:p>
          </table:table-cell>
          <table:table-cell office:value-type="float" office:value="1.4896" calcext:value-type="float">
            <text:p>1.4896</text:p>
          </table:table-cell>
          <table:table-cell office:value-type="float" office:value="89.37" calcext:value-type="float">
            <text:p>89.37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-23.37" calcext:value-type="float">
            <text:p>-23.37</text:p>
          </table:table-cell>
          <table:table-cell office:value-type="float" office:value="23.37" calcext:value-type="float">
            <text:p>23.37</text:p>
          </table:table-cell>
          <table:table-cell office:value-type="float" office:value="26.1497146693521" calcext:value-type="float">
            <text:p>26.1497146693521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1.483" calcext:value-type="float">
            <text:p>1.483</text:p>
          </table:table-cell>
          <table:table-cell office:value-type="float" office:value="88.98" calcext:value-type="float">
            <text:p>88.98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-25.98" calcext:value-type="float">
            <text:p>-25.98</text:p>
          </table:table-cell>
          <table:table-cell office:value-type="float" office:value="25.98" calcext:value-type="float">
            <text:p>25.98</text:p>
          </table:table-cell>
          <table:table-cell office:value-type="float" office:value="29.1975724881996" calcext:value-type="float">
            <text:p>29.1975724881996</text:p>
          </table:table-cell>
        </table:table-row>
        <table:table-row table:style-name="ro3">
          <table:table-cell office:value-type="string" calcext:value-type="string">
            <text:p>subject01</text:p>
          </table:table-cell>
          <table:table-cell office:value-type="float" office:value="82" calcext:value-type="float">
            <text:p>82</text:p>
          </table:table-cell>
          <table:table-cell office:value-type="float" office:value="405" calcext:value-type="float">
            <text:p>405</text:p>
          </table:table-cell>
          <table:table-cell office:value-type="float" office:value="425" calcext:value-type="float">
            <text:p>425</text:p>
          </table:table-cell>
          <table:table-cell office:value-type="float" office:value="1.4767" calcext:value-type="float">
            <text:p>1.4767</text:p>
          </table:table-cell>
          <table:table-cell office:value-type="float" office:value="88.6" calcext:value-type="float">
            <text:p>88.6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-25.6" calcext:value-type="float">
            <text:p>-25.6</text:p>
          </table:table-cell>
          <table:table-cell office:value-type="float" office:value="25.6" calcext:value-type="float">
            <text:p>25.6</text:p>
          </table:table-cell>
          <table:table-cell office:value-type="float" office:value="28.8939051918736" calcext:value-type="float">
            <text:p>28.8939051918736</text:p>
          </table:table-cell>
        </table:table-row>
        <table:table-row table:style-name="ro3">
          <table:table-cell table:number-columns-repeated="5"/>
          <table:table-cell table:style-name="ce19" table:formula="of:=STDEV([.F2:.F83])" office:value-type="float" office:value="2.930139030752" calcext:value-type="float">
            <text:p>2.9</text:p>
          </table:table-cell>
          <table:table-cell table:style-name="ce19" table:formula="of:=STDEV([.G2:.G83])" office:value-type="float" office:value="0.113988818608849" calcext:value-type="float">
            <text:p>0.1</text:p>
          </table:table-cell>
          <table:table-cell table:style-name="ce19" table:formula="of:=STDEV([.H2:.H83])" office:value-type="float" office:value="6.83932911653092" calcext:value-type="float">
            <text:p>6.8</text:p>
          </table:table-cell>
          <table:table-cell table:style-name="ce19" table:formula="of:=STDEV([.I2:.I83])" office:value-type="float" office:value="6.32366086503087" calcext:value-type="float">
            <text:p>6.3</text:p>
          </table:table-cell>
          <table:table-cell table:number-columns-repeated="2"/>
        </table:table-row>
        <table:table-row table:style-name="ro3" table:number-rows-repeated="104849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3" table:style-name="ta2">
        <office:forms form:automatic-focus="false" form:apply-design-mode="false"/>
        <table:table-column table:style-name="co11" table:number-columns-repeated="11" table:default-cell-style-name="Default"/>
        <table:table-row table:style-name="ro3">
          <table:table-cell office:value-type="string" calcext:value-type="string">
            <text:p>subject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1682" calcext:value-type="float">
            <text:p>1.1682</text:p>
          </table:table-cell>
          <table:table-cell office:value-type="float" office:value="70.09" calcext:value-type="float">
            <text:p>70.0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0.09" calcext:value-type="float">
            <text:p>-10.09</text:p>
          </table:table-cell>
          <table:table-cell office:value-type="float" office:value="10.09" calcext:value-type="float">
            <text:p>10.09</text:p>
          </table:table-cell>
          <table:table-cell office:value-type="float" office:value="14.395776858325" calcext:value-type="float">
            <text:p>14.395776858325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1763" calcext:value-type="float">
            <text:p>1.1763</text:p>
          </table:table-cell>
          <table:table-cell office:value-type="float" office:value="70.58" calcext:value-type="float">
            <text:p>70.5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9.42" calcext:value-type="float">
            <text:p>19.42</text:p>
          </table:table-cell>
          <table:table-cell office:value-type="float" office:value="27.5148767356192" calcext:value-type="float">
            <text:p>27.5148767356192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2145" calcext:value-type="float">
            <text:p>1.2145</text:p>
          </table:table-cell>
          <table:table-cell office:value-type="float" office:value="72.87" calcext:value-type="float">
            <text:p>72.87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7.13" calcext:value-type="float">
            <text:p>17.13</text:p>
          </table:table-cell>
          <table:table-cell office:value-type="float" office:value="23.5076163030053" calcext:value-type="float">
            <text:p>23.5076163030053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2463" calcext:value-type="float">
            <text:p>1.2463</text:p>
          </table:table-cell>
          <table:table-cell office:value-type="float" office:value="74.78" calcext:value-type="float">
            <text:p>74.7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5.22" calcext:value-type="float">
            <text:p>15.22</text:p>
          </table:table-cell>
          <table:table-cell office:value-type="float" office:value="20.3530355710083" calcext:value-type="float">
            <text:p>20.3530355710083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.2646" calcext:value-type="float">
            <text:p>1.2646</text:p>
          </table:table-cell>
          <table:table-cell office:value-type="float" office:value="75.88" calcext:value-type="float">
            <text:p>75.88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4.12" calcext:value-type="float">
            <text:p>14.12</text:p>
          </table:table-cell>
          <table:table-cell office:value-type="float" office:value="18.6083289404323" calcext:value-type="float">
            <text:p>18.6083289404323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2741" calcext:value-type="float">
            <text:p>1.2741</text:p>
          </table:table-cell>
          <table:table-cell office:value-type="float" office:value="76.45" calcext:value-type="float">
            <text:p>76.45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3.55" calcext:value-type="float">
            <text:p>13.55</text:p>
          </table:table-cell>
          <table:table-cell office:value-type="float" office:value="17.7240026160889" calcext:value-type="float">
            <text:p>17.7240026160889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2794" calcext:value-type="float">
            <text:p>1.2794</text:p>
          </table:table-cell>
          <table:table-cell office:value-type="float" office:value="76.76" calcext:value-type="float">
            <text:p>76.76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3.24" calcext:value-type="float">
            <text:p>13.24</text:p>
          </table:table-cell>
          <table:table-cell office:value-type="float" office:value="17.2485669619593" calcext:value-type="float">
            <text:p>17.2485669619593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.2702" calcext:value-type="float">
            <text:p>1.2702</text:p>
          </table:table-cell>
          <table:table-cell office:value-type="float" office:value="76.21" calcext:value-type="float">
            <text:p>76.2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6.21" calcext:value-type="float">
            <text:p>-16.21</text:p>
          </table:table-cell>
          <table:table-cell office:value-type="float" office:value="16.21" calcext:value-type="float">
            <text:p>16.21</text:p>
          </table:table-cell>
          <table:table-cell office:value-type="float" office:value="21.2701745177798" calcext:value-type="float">
            <text:p>21.2701745177798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.2637" calcext:value-type="float">
            <text:p>1.2637</text:p>
          </table:table-cell>
          <table:table-cell office:value-type="float" office:value="75.82" calcext:value-type="float">
            <text:p>75.8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5.82" calcext:value-type="float">
            <text:p>-15.82</text:p>
          </table:table-cell>
          <table:table-cell office:value-type="float" office:value="15.82" calcext:value-type="float">
            <text:p>15.82</text:p>
          </table:table-cell>
          <table:table-cell office:value-type="float" office:value="20.8652070693748" calcext:value-type="float">
            <text:p>20.8652070693748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.2485" calcext:value-type="float">
            <text:p>1.2485</text:p>
          </table:table-cell>
          <table:table-cell office:value-type="float" office:value="74.91" calcext:value-type="float">
            <text:p>74.9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4.91" calcext:value-type="float">
            <text:p>-14.91</text:p>
          </table:table-cell>
          <table:table-cell office:value-type="float" office:value="14.91" calcext:value-type="float">
            <text:p>14.91</text:p>
          </table:table-cell>
          <table:table-cell office:value-type="float" office:value="19.9038846615939" calcext:value-type="float">
            <text:p>19.9038846615939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2255" calcext:value-type="float">
            <text:p>1.2255</text:p>
          </table:table-cell>
          <table:table-cell office:value-type="float" office:value="73.53" calcext:value-type="float">
            <text:p>73.53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-10.53" calcext:value-type="float">
            <text:p>-10.53</text:p>
          </table:table-cell>
          <table:table-cell office:value-type="float" office:value="10.53" calcext:value-type="float">
            <text:p>10.53</text:p>
          </table:table-cell>
          <table:table-cell office:value-type="float" office:value="14.3206854345165" calcext:value-type="float">
            <text:p>14.3206854345165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.2268" calcext:value-type="float">
            <text:p>1.2268</text:p>
          </table:table-cell>
          <table:table-cell office:value-type="float" office:value="73.61" calcext:value-type="float">
            <text:p>73.61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-10.61" calcext:value-type="float">
            <text:p>-10.61</text:p>
          </table:table-cell>
          <table:table-cell office:value-type="float" office:value="10.61" calcext:value-type="float">
            <text:p>10.61</text:p>
          </table:table-cell>
          <table:table-cell office:value-type="float" office:value="14.4138024724902" calcext:value-type="float">
            <text:p>14.4138024724902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2314" calcext:value-type="float">
            <text:p>1.2314</text:p>
          </table:table-cell>
          <table:table-cell office:value-type="float" office:value="73.88" calcext:value-type="float">
            <text:p>73.88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-1.88" calcext:value-type="float">
            <text:p>-1.88</text:p>
          </table:table-cell>
          <table:table-cell office:value-type="float" office:value="1.88" calcext:value-type="float">
            <text:p>1.88</text:p>
          </table:table-cell>
          <table:table-cell office:value-type="float" office:value="2.54466702761234" calcext:value-type="float">
            <text:p>2.54466702761234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.2298" calcext:value-type="float">
            <text:p>1.2298</text:p>
          </table:table-cell>
          <table:table-cell office:value-type="float" office:value="73.79" calcext:value-type="float">
            <text:p>73.79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.20999999999999" calcext:value-type="float">
            <text:p>1.20999999999999</text:p>
          </table:table-cell>
          <table:table-cell office:value-type="float" office:value="1.63978858923973" calcext:value-type="float">
            <text:p>1.63978858923973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.2273" calcext:value-type="float">
            <text:p>1.2273</text:p>
          </table:table-cell>
          <table:table-cell office:value-type="float" office:value="73.64" calcext:value-type="float">
            <text:p>73.64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.36" calcext:value-type="float">
            <text:p>1.36</text:p>
          </table:table-cell>
          <table:table-cell office:value-type="float" office:value="1.84682237914177" calcext:value-type="float">
            <text:p>1.84682237914177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.2073" calcext:value-type="float">
            <text:p>1.2073</text:p>
          </table:table-cell>
          <table:table-cell office:value-type="float" office:value="72.44" calcext:value-type="float">
            <text:p>72.44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.56" calcext:value-type="float">
            <text:p>2.56</text:p>
          </table:table-cell>
          <table:table-cell office:value-type="float" office:value="3.53395913859746" calcext:value-type="float">
            <text:p>3.53395913859746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1889" calcext:value-type="float">
            <text:p>1.1889</text:p>
          </table:table-cell>
          <table:table-cell office:value-type="float" office:value="71.34" calcext:value-type="float">
            <text:p>71.34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.66" calcext:value-type="float">
            <text:p>3.66</text:p>
          </table:table-cell>
          <table:table-cell office:value-type="float" office:value="5.13036164844407" calcext:value-type="float">
            <text:p>5.13036164844407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.1916" calcext:value-type="float">
            <text:p>1.1916</text:p>
          </table:table-cell>
          <table:table-cell office:value-type="float" office:value="71.5" calcext:value-type="float">
            <text:p>71.5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.8951048951049" calcext:value-type="float">
            <text:p>4.8951048951049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.2144" calcext:value-type="float">
            <text:p>1.2144</text:p>
          </table:table-cell>
          <table:table-cell office:value-type="float" office:value="72.86" calcext:value-type="float">
            <text:p>72.86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.93713972001098" calcext:value-type="float">
            <text:p>2.93713972001098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.2356" calcext:value-type="float">
            <text:p>1.2356</text:p>
          </table:table-cell>
          <table:table-cell office:value-type="float" office:value="74.14" calcext:value-type="float">
            <text:p>74.14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-20.14" calcext:value-type="float">
            <text:p>-20.14</text:p>
          </table:table-cell>
          <table:table-cell office:value-type="float" office:value="20.14" calcext:value-type="float">
            <text:p>20.14</text:p>
          </table:table-cell>
          <table:table-cell office:value-type="float" office:value="27.1648233072565" calcext:value-type="float">
            <text:p>27.1648233072565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.2493" calcext:value-type="float">
            <text:p>1.2493</text:p>
          </table:table-cell>
          <table:table-cell office:value-type="float" office:value="74.96" calcext:value-type="float">
            <text:p>74.96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-20.96" calcext:value-type="float">
            <text:p>-20.96</text:p>
          </table:table-cell>
          <table:table-cell office:value-type="float" office:value="20.96" calcext:value-type="float">
            <text:p>20.96</text:p>
          </table:table-cell>
          <table:table-cell office:value-type="float" office:value="27.9615795090715" calcext:value-type="float">
            <text:p>27.9615795090715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.2657" calcext:value-type="float">
            <text:p>1.2657</text:p>
          </table:table-cell>
          <table:table-cell office:value-type="float" office:value="75.94" calcext:value-type="float">
            <text:p>75.94</text:p>
          </table:table-cell>
          <table:table-cell office:value-type="float" office:value="0.85" calcext:value-type="float">
            <text:p>0.85</text:p>
          </table:table-cell>
          <table:table-cell office:value-type="float" office:value="51" calcext:value-type="float">
            <text:p>51</text:p>
          </table:table-cell>
          <table:table-cell office:value-type="float" office:value="-24.94" calcext:value-type="float">
            <text:p>-24.94</text:p>
          </table:table-cell>
          <table:table-cell office:value-type="float" office:value="24.94" calcext:value-type="float">
            <text:p>24.94</text:p>
          </table:table-cell>
          <table:table-cell office:value-type="float" office:value="32.8417171451146" calcext:value-type="float">
            <text:p>32.8417171451146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.2556" calcext:value-type="float">
            <text:p>1.2556</text:p>
          </table:table-cell>
          <table:table-cell office:value-type="float" office:value="75.34" calcext:value-type="float">
            <text:p>75.34</text:p>
          </table:table-cell>
          <table:table-cell office:value-type="float" office:value="0.85" calcext:value-type="float">
            <text:p>0.85</text:p>
          </table:table-cell>
          <table:table-cell office:value-type="float" office:value="51" calcext:value-type="float">
            <text:p>51</text:p>
          </table:table-cell>
          <table:table-cell office:value-type="float" office:value="-24.34" calcext:value-type="float">
            <text:p>-24.34</text:p>
          </table:table-cell>
          <table:table-cell office:value-type="float" office:value="24.34" calcext:value-type="float">
            <text:p>24.34</text:p>
          </table:table-cell>
          <table:table-cell office:value-type="float" office:value="32.3068754977436" calcext:value-type="float">
            <text:p>32.3068754977436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.2638" calcext:value-type="float">
            <text:p>1.2638</text:p>
          </table:table-cell>
          <table:table-cell office:value-type="float" office:value="75.83" calcext:value-type="float">
            <text:p>75.83</text:p>
          </table:table-cell>
          <table:table-cell office:value-type="float" office:value="0.85" calcext:value-type="float">
            <text:p>0.85</text:p>
          </table:table-cell>
          <table:table-cell office:value-type="float" office:value="51" calcext:value-type="float">
            <text:p>51</text:p>
          </table:table-cell>
          <table:table-cell office:value-type="float" office:value="-24.83" calcext:value-type="float">
            <text:p>-24.83</text:p>
          </table:table-cell>
          <table:table-cell office:value-type="float" office:value="24.83" calcext:value-type="float">
            <text:p>24.83</text:p>
          </table:table-cell>
          <table:table-cell office:value-type="float" office:value="32.7442964525913" calcext:value-type="float">
            <text:p>32.7442964525913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.2625" calcext:value-type="float">
            <text:p>1.2625</text:p>
          </table:table-cell>
          <table:table-cell office:value-type="float" office:value="75.75" calcext:value-type="float">
            <text:p>75.75</text:p>
          </table:table-cell>
          <table:table-cell office:value-type="float" office:value="0.85" calcext:value-type="float">
            <text:p>0.85</text:p>
          </table:table-cell>
          <table:table-cell office:value-type="float" office:value="51" calcext:value-type="float">
            <text:p>51</text:p>
          </table:table-cell>
          <table:table-cell office:value-type="float" office:value="-24.75" calcext:value-type="float">
            <text:p>-24.75</text:p>
          </table:table-cell>
          <table:table-cell office:value-type="float" office:value="24.75" calcext:value-type="float">
            <text:p>24.75</text:p>
          </table:table-cell>
          <table:table-cell office:value-type="float" office:value="32.6732673267327" calcext:value-type="float">
            <text:p>32.6732673267327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.2777" calcext:value-type="float">
            <text:p>1.2777</text:p>
          </table:table-cell>
          <table:table-cell office:value-type="float" office:value="76.66" calcext:value-type="float">
            <text:p>76.66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-22.66" calcext:value-type="float">
            <text:p>-22.66</text:p>
          </table:table-cell>
          <table:table-cell office:value-type="float" office:value="22.66" calcext:value-type="float">
            <text:p>22.66</text:p>
          </table:table-cell>
          <table:table-cell office:value-type="float" office:value="29.5590920949648" calcext:value-type="float">
            <text:p>29.5590920949648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.2878" calcext:value-type="float">
            <text:p>1.2878</text:p>
          </table:table-cell>
          <table:table-cell office:value-type="float" office:value="77.27" calcext:value-type="float">
            <text:p>77.27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-23.27" calcext:value-type="float">
            <text:p>-23.27</text:p>
          </table:table-cell>
          <table:table-cell office:value-type="float" office:value="23.27" calcext:value-type="float">
            <text:p>23.27</text:p>
          </table:table-cell>
          <table:table-cell office:value-type="float" office:value="30.1151805357836" calcext:value-type="float">
            <text:p>30.1151805357836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.2918" calcext:value-type="float">
            <text:p>1.2918</text:p>
          </table:table-cell>
          <table:table-cell office:value-type="float" office:value="77.51" calcext:value-type="float">
            <text:p>77.51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-23.51" calcext:value-type="float">
            <text:p>-23.51</text:p>
          </table:table-cell>
          <table:table-cell office:value-type="float" office:value="23.51" calcext:value-type="float">
            <text:p>23.51</text:p>
          </table:table-cell>
          <table:table-cell office:value-type="float" office:value="30.3315701199845" calcext:value-type="float">
            <text:p>30.3315701199845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.289" calcext:value-type="float">
            <text:p>1.289</text:p>
          </table:table-cell>
          <table:table-cell office:value-type="float" office:value="77.34" calcext:value-type="float">
            <text:p>77.34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-23.34" calcext:value-type="float">
            <text:p>-23.34</text:p>
          </table:table-cell>
          <table:table-cell office:value-type="float" office:value="23.34" calcext:value-type="float">
            <text:p>23.34</text:p>
          </table:table-cell>
          <table:table-cell office:value-type="float" office:value="30.1784328937161" calcext:value-type="float">
            <text:p>30.1784328937161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.2802" calcext:value-type="float">
            <text:p>1.2802</text:p>
          </table:table-cell>
          <table:table-cell office:value-type="float" office:value="76.81" calcext:value-type="float">
            <text:p>76.81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-22.81" calcext:value-type="float">
            <text:p>-22.81</text:p>
          </table:table-cell>
          <table:table-cell office:value-type="float" office:value="22.81" calcext:value-type="float">
            <text:p>22.81</text:p>
          </table:table-cell>
          <table:table-cell office:value-type="float" office:value="29.6966540814998" calcext:value-type="float">
            <text:p>29.6966540814998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.2662" calcext:value-type="float">
            <text:p>1.2662</text:p>
          </table:table-cell>
          <table:table-cell office:value-type="float" office:value="75.97" calcext:value-type="float">
            <text:p>75.97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-21.97" calcext:value-type="float">
            <text:p>-21.97</text:p>
          </table:table-cell>
          <table:table-cell office:value-type="float" office:value="21.97" calcext:value-type="float">
            <text:p>21.97</text:p>
          </table:table-cell>
          <table:table-cell office:value-type="float" office:value="28.9193102540476" calcext:value-type="float">
            <text:p>28.9193102540476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.2419" calcext:value-type="float">
            <text:p>1.2419</text:p>
          </table:table-cell>
          <table:table-cell office:value-type="float" office:value="74.51" calcext:value-type="float">
            <text:p>74.51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-20.51" calcext:value-type="float">
            <text:p>-20.51</text:p>
          </table:table-cell>
          <table:table-cell office:value-type="float" office:value="20.51" calcext:value-type="float">
            <text:p>20.51</text:p>
          </table:table-cell>
          <table:table-cell office:value-type="float" office:value="27.5265065091934" calcext:value-type="float">
            <text:p>27.5265065091934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.2413" calcext:value-type="float">
            <text:p>1.2413</text:p>
          </table:table-cell>
          <table:table-cell office:value-type="float" office:value="74.48" calcext:value-type="float">
            <text:p>74.48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-17.48" calcext:value-type="float">
            <text:p>-17.48</text:p>
          </table:table-cell>
          <table:table-cell office:value-type="float" office:value="17.48" calcext:value-type="float">
            <text:p>17.48</text:p>
          </table:table-cell>
          <table:table-cell office:value-type="float" office:value="23.469387755102" calcext:value-type="float">
            <text:p>23.469387755102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.2264" calcext:value-type="float">
            <text:p>1.2264</text:p>
          </table:table-cell>
          <table:table-cell office:value-type="float" office:value="73.58" calcext:value-type="float">
            <text:p>73.58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-7.58" calcext:value-type="float">
            <text:p>-7.58</text:p>
          </table:table-cell>
          <table:table-cell office:value-type="float" office:value="7.58" calcext:value-type="float">
            <text:p>7.58</text:p>
          </table:table-cell>
          <table:table-cell office:value-type="float" office:value="10.3017124218538" calcext:value-type="float">
            <text:p>10.3017124218538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.2327" calcext:value-type="float">
            <text:p>1.2327</text:p>
          </table:table-cell>
          <table:table-cell office:value-type="float" office:value="73.96" calcext:value-type="float">
            <text:p>73.96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-7.95999999999999" calcext:value-type="float">
            <text:p>-7.95999999999999</text:p>
          </table:table-cell>
          <table:table-cell office:value-type="float" office:value="7.95999999999999" calcext:value-type="float">
            <text:p>7.95999999999999</text:p>
          </table:table-cell>
          <table:table-cell office:value-type="float" office:value="10.7625743645214" calcext:value-type="float">
            <text:p>10.7625743645214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.2536" calcext:value-type="float">
            <text:p>1.2536</text:p>
          </table:table-cell>
          <table:table-cell office:value-type="float" office:value="75.22" calcext:value-type="float">
            <text:p>75.22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-9.22" calcext:value-type="float">
            <text:p>-9.22</text:p>
          </table:table-cell>
          <table:table-cell office:value-type="float" office:value="9.22" calcext:value-type="float">
            <text:p>9.22</text:p>
          </table:table-cell>
          <table:table-cell office:value-type="float" office:value="12.25737835682" calcext:value-type="float">
            <text:p>12.25737835682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.2556" calcext:value-type="float">
            <text:p>1.2556</text:p>
          </table:table-cell>
          <table:table-cell office:value-type="float" office:value="75.34" calcext:value-type="float">
            <text:p>75.34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-9.34" calcext:value-type="float">
            <text:p>-9.34</text:p>
          </table:table-cell>
          <table:table-cell office:value-type="float" office:value="9.34" calcext:value-type="float">
            <text:p>9.34</text:p>
          </table:table-cell>
          <table:table-cell office:value-type="float" office:value="12.3971329970799" calcext:value-type="float">
            <text:p>12.3971329970799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.2603" calcext:value-type="float">
            <text:p>1.2603</text:p>
          </table:table-cell>
          <table:table-cell office:value-type="float" office:value="75.62" calcext:value-type="float">
            <text:p>75.62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-0.620000000000005" calcext:value-type="float">
            <text:p>-0.620000000000005</text:p>
          </table:table-cell>
          <table:table-cell office:value-type="float" office:value="0.620000000000005" calcext:value-type="float">
            <text:p>0.620000000000005</text:p>
          </table:table-cell>
          <table:table-cell office:value-type="float" office:value="0.819888918275595" calcext:value-type="float">
            <text:p>0.819888918275595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.2471" calcext:value-type="float">
            <text:p>1.2471</text:p>
          </table:table-cell>
          <table:table-cell office:value-type="float" office:value="74.83" calcext:value-type="float">
            <text:p>74.83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.17" calcext:value-type="float">
            <text:p>3.17</text:p>
          </table:table-cell>
          <table:table-cell office:value-type="float" office:value="4.23626887611921" calcext:value-type="float">
            <text:p>4.23626887611921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.2511" calcext:value-type="float">
            <text:p>1.2511</text:p>
          </table:table-cell>
          <table:table-cell office:value-type="float" office:value="75.06" calcext:value-type="float">
            <text:p>75.06</text:p>
          </table:table-cell>
          <table:table-cell office:value-type="float" office:value="1.6" calcext:value-type="float">
            <text:p>1.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0.94" calcext:value-type="float">
            <text:p>20.94</text:p>
          </table:table-cell>
          <table:table-cell office:value-type="float" office:value="27.8976818545164" calcext:value-type="float">
            <text:p>27.8976818545164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1.2577" calcext:value-type="float">
            <text:p>1.2577</text:p>
          </table:table-cell>
          <table:table-cell office:value-type="float" office:value="75.46" calcext:value-type="float">
            <text:p>75.46</text:p>
          </table:table-cell>
          <table:table-cell office:value-type="float" office:value="1.3" calcext:value-type="float">
            <text:p>1.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.54000000000001" calcext:value-type="float">
            <text:p>2.54000000000001</text:p>
          </table:table-cell>
          <table:table-cell office:value-type="float" office:value="3.36602173336868" calcext:value-type="float">
            <text:p>3.36602173336868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1.2636" calcext:value-type="float">
            <text:p>1.2636</text:p>
          </table:table-cell>
          <table:table-cell office:value-type="float" office:value="75.81" calcext:value-type="float">
            <text:p>75.81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-0.810000000000002" calcext:value-type="float">
            <text:p>-0.810000000000002</text:p>
          </table:table-cell>
          <table:table-cell office:value-type="float" office:value="0.810000000000002" calcext:value-type="float">
            <text:p>0.810000000000002</text:p>
          </table:table-cell>
          <table:table-cell office:value-type="float" office:value="1.06846062524733" calcext:value-type="float">
            <text:p>1.06846062524733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1.275" calcext:value-type="float">
            <text:p>1.275</text:p>
          </table:table-cell>
          <table:table-cell office:value-type="float" office:value="76.5" calcext:value-type="float">
            <text:p>76.5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office:value-type="float" office:value="-4.5" calcext:value-type="float">
            <text:p>-4.5</text:p>
          </table:table-cell>
          <table:table-cell office:value-type="float" office:value="4.5" calcext:value-type="float">
            <text:p>4.5</text:p>
          </table:table-cell>
          <table:table-cell office:value-type="float" office:value="5.88235294117647" calcext:value-type="float">
            <text:p>5.88235294117647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.2733" calcext:value-type="float">
            <text:p>1.2733</text:p>
          </table:table-cell>
          <table:table-cell office:value-type="float" office:value="76.4" calcext:value-type="float">
            <text:p>76.4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-13.4" calcext:value-type="float">
            <text:p>-13.4</text:p>
          </table:table-cell>
          <table:table-cell office:value-type="float" office:value="13.4" calcext:value-type="float">
            <text:p>13.4</text:p>
          </table:table-cell>
          <table:table-cell office:value-type="float" office:value="17.5392670157068" calcext:value-type="float">
            <text:p>17.5392670157068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1.2512" calcext:value-type="float">
            <text:p>1.2512</text:p>
          </table:table-cell>
          <table:table-cell office:value-type="float" office:value="75.07" calcext:value-type="float">
            <text:p>75.0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5.07" calcext:value-type="float">
            <text:p>-15.07</text:p>
          </table:table-cell>
          <table:table-cell office:value-type="float" office:value="15.07" calcext:value-type="float">
            <text:p>15.07</text:p>
          </table:table-cell>
          <table:table-cell office:value-type="float" office:value="20.0745970427601" calcext:value-type="float">
            <text:p>20.0745970427601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.2528" calcext:value-type="float">
            <text:p>1.2528</text:p>
          </table:table-cell>
          <table:table-cell office:value-type="float" office:value="75.17" calcext:value-type="float">
            <text:p>75.17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-18.17" calcext:value-type="float">
            <text:p>-18.17</text:p>
          </table:table-cell>
          <table:table-cell office:value-type="float" office:value="18.17" calcext:value-type="float">
            <text:p>18.17</text:p>
          </table:table-cell>
          <table:table-cell office:value-type="float" office:value="24.1718770786218" calcext:value-type="float">
            <text:p>24.1718770786218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.2461" calcext:value-type="float">
            <text:p>1.2461</text:p>
          </table:table-cell>
          <table:table-cell office:value-type="float" office:value="74.77" calcext:value-type="float">
            <text:p>74.77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-17.77" calcext:value-type="float">
            <text:p>-17.77</text:p>
          </table:table-cell>
          <table:table-cell office:value-type="float" office:value="17.77" calcext:value-type="float">
            <text:p>17.77</text:p>
          </table:table-cell>
          <table:table-cell office:value-type="float" office:value="23.7662163969506" calcext:value-type="float">
            <text:p>23.7662163969506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.2398" calcext:value-type="float">
            <text:p>1.2398</text:p>
          </table:table-cell>
          <table:table-cell office:value-type="float" office:value="74.39" calcext:value-type="float">
            <text:p>74.3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4.39" calcext:value-type="float">
            <text:p>-14.39</text:p>
          </table:table-cell>
          <table:table-cell office:value-type="float" office:value="14.39" calcext:value-type="float">
            <text:p>14.39</text:p>
          </table:table-cell>
          <table:table-cell office:value-type="float" office:value="19.3439978491733" calcext:value-type="float">
            <text:p>19.3439978491733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1.2722" calcext:value-type="float">
            <text:p>1.2722</text:p>
          </table:table-cell>
          <table:table-cell office:value-type="float" office:value="76.33" calcext:value-type="float">
            <text:p>76.33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6.11817109917464" calcext:value-type="float">
            <text:p>6.11817109917464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1.2872" calcext:value-type="float">
            <text:p>1.2872</text:p>
          </table:table-cell>
          <table:table-cell office:value-type="float" office:value="77.23" calcext:value-type="float">
            <text:p>77.23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.77" calcext:value-type="float">
            <text:p>3.77</text:p>
          </table:table-cell>
          <table:table-cell office:value-type="float" office:value="4.88152272432992" calcext:value-type="float">
            <text:p>4.88152272432992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1.2931" calcext:value-type="float">
            <text:p>1.2931</text:p>
          </table:table-cell>
          <table:table-cell office:value-type="float" office:value="77.58" calcext:value-type="float">
            <text:p>77.58</text:p>
          </table:table-cell>
          <table:table-cell office:value-type="float" office:value="1.35" calcext:value-type="float">
            <text:p>1.3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.42" calcext:value-type="float">
            <text:p>3.42</text:p>
          </table:table-cell>
          <table:table-cell office:value-type="float" office:value="4.40835266821346" calcext:value-type="float">
            <text:p>4.40835266821346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office:value-type="float" office:value="1.3089" calcext:value-type="float">
            <text:p>1.3089</text:p>
          </table:table-cell>
          <table:table-cell office:value-type="float" office:value="78.53" calcext:value-type="float">
            <text:p>78.53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-24.53" calcext:value-type="float">
            <text:p>-24.53</text:p>
          </table:table-cell>
          <table:table-cell office:value-type="float" office:value="24.53" calcext:value-type="float">
            <text:p>24.53</text:p>
          </table:table-cell>
          <table:table-cell office:value-type="float" office:value="31.2364701388005" calcext:value-type="float">
            <text:p>31.2364701388005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1.2938" calcext:value-type="float">
            <text:p>1.2938</text:p>
          </table:table-cell>
          <table:table-cell office:value-type="float" office:value="77.63" calcext:value-type="float">
            <text:p>77.63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-23.63" calcext:value-type="float">
            <text:p>-23.63</text:p>
          </table:table-cell>
          <table:table-cell office:value-type="float" office:value="23.63" calcext:value-type="float">
            <text:p>23.63</text:p>
          </table:table-cell>
          <table:table-cell office:value-type="float" office:value="30.4392631714543" calcext:value-type="float">
            <text:p>30.4392631714543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1.2831" calcext:value-type="float">
            <text:p>1.2831</text:p>
          </table:table-cell>
          <table:table-cell office:value-type="float" office:value="76.98" calcext:value-type="float">
            <text:p>76.98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-22.98" calcext:value-type="float">
            <text:p>-22.98</text:p>
          </table:table-cell>
          <table:table-cell office:value-type="float" office:value="22.98" calcext:value-type="float">
            <text:p>22.98</text:p>
          </table:table-cell>
          <table:table-cell office:value-type="float" office:value="29.8519095869057" calcext:value-type="float">
            <text:p>29.8519095869057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1.2864" calcext:value-type="float">
            <text:p>1.2864</text:p>
          </table:table-cell>
          <table:table-cell office:value-type="float" office:value="77.18" calcext:value-type="float">
            <text:p>77.18</text:p>
          </table:table-cell>
          <table:table-cell office:value-type="float" office:value="0.85" calcext:value-type="float">
            <text:p>0.85</text:p>
          </table:table-cell>
          <table:table-cell office:value-type="float" office:value="51" calcext:value-type="float">
            <text:p>51</text:p>
          </table:table-cell>
          <table:table-cell office:value-type="float" office:value="-26.18" calcext:value-type="float">
            <text:p>-26.18</text:p>
          </table:table-cell>
          <table:table-cell office:value-type="float" office:value="26.18" calcext:value-type="float">
            <text:p>26.18</text:p>
          </table:table-cell>
          <table:table-cell office:value-type="float" office:value="33.920704845815" calcext:value-type="float">
            <text:p>33.920704845815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1.2719" calcext:value-type="float">
            <text:p>1.2719</text:p>
          </table:table-cell>
          <table:table-cell office:value-type="float" office:value="76.31" calcext:value-type="float">
            <text:p>76.31</text:p>
          </table:table-cell>
          <table:table-cell office:value-type="float" office:value="0.85" calcext:value-type="float">
            <text:p>0.85</text:p>
          </table:table-cell>
          <table:table-cell office:value-type="float" office:value="51" calcext:value-type="float">
            <text:p>51</text:p>
          </table:table-cell>
          <table:table-cell office:value-type="float" office:value="-25.31" calcext:value-type="float">
            <text:p>-25.31</text:p>
          </table:table-cell>
          <table:table-cell office:value-type="float" office:value="25.31" calcext:value-type="float">
            <text:p>25.31</text:p>
          </table:table-cell>
          <table:table-cell office:value-type="float" office:value="33.1673437295243" calcext:value-type="float">
            <text:p>33.1673437295243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57" calcext:value-type="float">
            <text:p>57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1.2735" calcext:value-type="float">
            <text:p>1.2735</text:p>
          </table:table-cell>
          <table:table-cell office:value-type="float" office:value="76.41" calcext:value-type="float">
            <text:p>76.41</text:p>
          </table:table-cell>
          <table:table-cell office:value-type="float" office:value="0.85" calcext:value-type="float">
            <text:p>0.85</text:p>
          </table:table-cell>
          <table:table-cell office:value-type="float" office:value="51" calcext:value-type="float">
            <text:p>51</text:p>
          </table:table-cell>
          <table:table-cell office:value-type="float" office:value="-25.41" calcext:value-type="float">
            <text:p>-25.41</text:p>
          </table:table-cell>
          <table:table-cell office:value-type="float" office:value="25.41" calcext:value-type="float">
            <text:p>25.41</text:p>
          </table:table-cell>
          <table:table-cell office:value-type="float" office:value="33.2548095798979" calcext:value-type="float">
            <text:p>33.2548095798979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58" calcext:value-type="float">
            <text:p>58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1.273" calcext:value-type="float">
            <text:p>1.273</text:p>
          </table:table-cell>
          <table:table-cell office:value-type="float" office:value="76.38" calcext:value-type="float">
            <text:p>76.38</text:p>
          </table:table-cell>
          <table:table-cell office:value-type="float" office:value="0.85" calcext:value-type="float">
            <text:p>0.85</text:p>
          </table:table-cell>
          <table:table-cell office:value-type="float" office:value="51" calcext:value-type="float">
            <text:p>51</text:p>
          </table:table-cell>
          <table:table-cell office:value-type="float" office:value="-25.38" calcext:value-type="float">
            <text:p>-25.38</text:p>
          </table:table-cell>
          <table:table-cell office:value-type="float" office:value="25.38" calcext:value-type="float">
            <text:p>25.38</text:p>
          </table:table-cell>
          <table:table-cell office:value-type="float" office:value="33.2285938727416" calcext:value-type="float">
            <text:p>33.2285938727416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59" calcext:value-type="float">
            <text:p>59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1.2812" calcext:value-type="float">
            <text:p>1.2812</text:p>
          </table:table-cell>
          <table:table-cell office:value-type="float" office:value="76.87" calcext:value-type="float">
            <text:p>76.87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-19.87" calcext:value-type="float">
            <text:p>-19.87</text:p>
          </table:table-cell>
          <table:table-cell office:value-type="float" office:value="19.87" calcext:value-type="float">
            <text:p>19.87</text:p>
          </table:table-cell>
          <table:table-cell office:value-type="float" office:value="25.8488356966307" calcext:value-type="float">
            <text:p>25.8488356966307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.283" calcext:value-type="float">
            <text:p>1.283</text:p>
          </table:table-cell>
          <table:table-cell office:value-type="float" office:value="76.98" calcext:value-type="float">
            <text:p>76.98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-19.98" calcext:value-type="float">
            <text:p>-19.98</text:p>
          </table:table-cell>
          <table:table-cell office:value-type="float" office:value="19.98" calcext:value-type="float">
            <text:p>19.98</text:p>
          </table:table-cell>
          <table:table-cell office:value-type="float" office:value="25.9547934528449" calcext:value-type="float">
            <text:p>25.9547934528449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1.285" calcext:value-type="float">
            <text:p>1.285</text:p>
          </table:table-cell>
          <table:table-cell office:value-type="float" office:value="77.1" calcext:value-type="float">
            <text:p>77.1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-20.1" calcext:value-type="float">
            <text:p>-20.1</text:p>
          </table:table-cell>
          <table:table-cell office:value-type="float" office:value="20.1" calcext:value-type="float">
            <text:p>20.1</text:p>
          </table:table-cell>
          <table:table-cell office:value-type="float" office:value="26.0700389105058" calcext:value-type="float">
            <text:p>26.0700389105058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62" calcext:value-type="float">
            <text:p>62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1.2853" calcext:value-type="float">
            <text:p>1.2853</text:p>
          </table:table-cell>
          <table:table-cell office:value-type="float" office:value="77.12" calcext:value-type="float">
            <text:p>77.12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-20.12" calcext:value-type="float">
            <text:p>-20.12</text:p>
          </table:table-cell>
          <table:table-cell office:value-type="float" office:value="20.12" calcext:value-type="float">
            <text:p>20.12</text:p>
          </table:table-cell>
          <table:table-cell office:value-type="float" office:value="26.0892116182573" calcext:value-type="float">
            <text:p>26.0892116182573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.2828" calcext:value-type="float">
            <text:p>1.2828</text:p>
          </table:table-cell>
          <table:table-cell office:value-type="float" office:value="76.97" calcext:value-type="float">
            <text:p>76.97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-19.97" calcext:value-type="float">
            <text:p>-19.97</text:p>
          </table:table-cell>
          <table:table-cell office:value-type="float" office:value="19.97" calcext:value-type="float">
            <text:p>19.97</text:p>
          </table:table-cell>
          <table:table-cell office:value-type="float" office:value="25.945173444199" calcext:value-type="float">
            <text:p>25.945173444199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.2896" calcext:value-type="float">
            <text:p>1.2896</text:p>
          </table:table-cell>
          <table:table-cell office:value-type="float" office:value="77.37" calcext:value-type="float">
            <text:p>77.37</text:p>
          </table:table-cell>
          <table:table-cell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office:value-type="float" office:value="-20.37" calcext:value-type="float">
            <text:p>-20.37</text:p>
          </table:table-cell>
          <table:table-cell office:value-type="float" office:value="20.37" calcext:value-type="float">
            <text:p>20.37</text:p>
          </table:table-cell>
          <table:table-cell office:value-type="float" office:value="26.3280341217526" calcext:value-type="float">
            <text:p>26.3280341217526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.2841" calcext:value-type="float">
            <text:p>1.2841</text:p>
          </table:table-cell>
          <table:table-cell office:value-type="float" office:value="77.05" calcext:value-type="float">
            <text:p>77.05</text:p>
          </table:table-cell>
          <table:table-cell office:value-type="float" office:value="1.1" calcext:value-type="float">
            <text:p>1.1</text:p>
          </table:table-cell>
          <table:table-cell office:value-type="float" office:value="66" calcext:value-type="float">
            <text:p>66</text:p>
          </table:table-cell>
          <table:table-cell office:value-type="float" office:value="-11.05" calcext:value-type="float">
            <text:p>-11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4.3413367942894" calcext:value-type="float">
            <text:p>14.3413367942894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66" calcext:value-type="float">
            <text:p>66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1.2877" calcext:value-type="float">
            <text:p>1.2877</text:p>
          </table:table-cell>
          <table:table-cell office:value-type="float" office:value="77.26" calcext:value-type="float">
            <text:p>77.26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-8.26000000000001" calcext:value-type="float">
            <text:p>-8.26000000000001</text:p>
          </table:table-cell>
          <table:table-cell office:value-type="float" office:value="8.26000000000001" calcext:value-type="float">
            <text:p>8.26000000000001</text:p>
          </table:table-cell>
          <table:table-cell office:value-type="float" office:value="10.6911726637329" calcext:value-type="float">
            <text:p>10.6911726637329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1.2955" calcext:value-type="float">
            <text:p>1.2955</text:p>
          </table:table-cell>
          <table:table-cell office:value-type="float" office:value="77.73" calcext:value-type="float">
            <text:p>77.73</text:p>
          </table:table-cell>
          <table:table-cell office:value-type="float" office:value="1.15" calcext:value-type="float">
            <text:p>1.15</text:p>
          </table:table-cell>
          <table:table-cell office:value-type="float" office:value="69" calcext:value-type="float">
            <text:p>69</text:p>
          </table:table-cell>
          <table:table-cell office:value-type="float" office:value="-8.73" calcext:value-type="float">
            <text:p>-8.73</text:p>
          </table:table-cell>
          <table:table-cell office:value-type="float" office:value="8.73" calcext:value-type="float">
            <text:p>8.73</text:p>
          </table:table-cell>
          <table:table-cell office:value-type="float" office:value="11.2311848707063" calcext:value-type="float">
            <text:p>11.2311848707063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68" calcext:value-type="float">
            <text:p>68</text:p>
          </table:table-cell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office:value-type="float" office:value="1.2988" calcext:value-type="float">
            <text:p>1.2988</text:p>
          </table:table-cell>
          <table:table-cell office:value-type="float" office:value="77.93" calcext:value-type="float">
            <text:p>77.9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7.93" calcext:value-type="float">
            <text:p>-17.93</text:p>
          </table:table-cell>
          <table:table-cell office:value-type="float" office:value="17.93" calcext:value-type="float">
            <text:p>17.93</text:p>
          </table:table-cell>
          <table:table-cell office:value-type="float" office:value="23.0078275375337" calcext:value-type="float">
            <text:p>23.0078275375337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1.3112" calcext:value-type="float">
            <text:p>1.3112</text:p>
          </table:table-cell>
          <table:table-cell office:value-type="float" office:value="78.67" calcext:value-type="float">
            <text:p>78.67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-3.67" calcext:value-type="float">
            <text:p>-3.67</text:p>
          </table:table-cell>
          <table:table-cell office:value-type="float" office:value="3.67" calcext:value-type="float">
            <text:p>3.67</text:p>
          </table:table-cell>
          <table:table-cell office:value-type="float" office:value="4.66505656539977" calcext:value-type="float">
            <text:p>4.66505656539977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1.3048" calcext:value-type="float">
            <text:p>1.3048</text:p>
          </table:table-cell>
          <table:table-cell office:value-type="float" office:value="78.29" calcext:value-type="float">
            <text:p>78.2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8.29" calcext:value-type="float">
            <text:p>-18.29</text:p>
          </table:table-cell>
          <table:table-cell office:value-type="float" office:value="18.29" calcext:value-type="float">
            <text:p>18.29</text:p>
          </table:table-cell>
          <table:table-cell office:value-type="float" office:value="23.3618597522034" calcext:value-type="float">
            <text:p>23.3618597522034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1.3032" calcext:value-type="float">
            <text:p>1.3032</text:p>
          </table:table-cell>
          <table:table-cell office:value-type="float" office:value="78.19" calcext:value-type="float">
            <text:p>78.1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8.19" calcext:value-type="float">
            <text:p>-18.19</text:p>
          </table:table-cell>
          <table:table-cell office:value-type="float" office:value="18.19" calcext:value-type="float">
            <text:p>18.19</text:p>
          </table:table-cell>
          <table:table-cell office:value-type="float" office:value="23.2638444813915" calcext:value-type="float">
            <text:p>23.2638444813915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1.2928" calcext:value-type="float">
            <text:p>1.2928</text:p>
          </table:table-cell>
          <table:table-cell office:value-type="float" office:value="77.57" calcext:value-type="float">
            <text:p>77.5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7.57" calcext:value-type="float">
            <text:p>-17.57</text:p>
          </table:table-cell>
          <table:table-cell office:value-type="float" office:value="17.57" calcext:value-type="float">
            <text:p>17.57</text:p>
          </table:table-cell>
          <table:table-cell office:value-type="float" office:value="22.650509217481" calcext:value-type="float">
            <text:p>22.650509217481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1.2821" calcext:value-type="float">
            <text:p>1.2821</text:p>
          </table:table-cell>
          <table:table-cell office:value-type="float" office:value="76.92" calcext:value-type="float">
            <text:p>76.9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6.92" calcext:value-type="float">
            <text:p>-16.92</text:p>
          </table:table-cell>
          <table:table-cell office:value-type="float" office:value="16.92" calcext:value-type="float">
            <text:p>16.92</text:p>
          </table:table-cell>
          <table:table-cell office:value-type="float" office:value="21.996879875195" calcext:value-type="float">
            <text:p>21.996879875195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1.2566" calcext:value-type="float">
            <text:p>1.2566</text:p>
          </table:table-cell>
          <table:table-cell office:value-type="float" office:value="75.4" calcext:value-type="float">
            <text:p>75.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5.4" calcext:value-type="float">
            <text:p>-15.4</text:p>
          </table:table-cell>
          <table:table-cell office:value-type="float" office:value="15.4" calcext:value-type="float">
            <text:p>15.4</text:p>
          </table:table-cell>
          <table:table-cell office:value-type="float" office:value="20.4244031830239" calcext:value-type="float">
            <text:p>20.4244031830239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.2482" calcext:value-type="float">
            <text:p>1.2482</text:p>
          </table:table-cell>
          <table:table-cell office:value-type="float" office:value="74.89" calcext:value-type="float">
            <text:p>74.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4.89" calcext:value-type="float">
            <text:p>-14.89</text:p>
          </table:table-cell>
          <table:table-cell office:value-type="float" office:value="14.89" calcext:value-type="float">
            <text:p>14.89</text:p>
          </table:table-cell>
          <table:table-cell office:value-type="float" office:value="19.88249432501" calcext:value-type="float">
            <text:p>19.88249432501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76" calcext:value-type="float">
            <text:p>76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1.2202" calcext:value-type="float">
            <text:p>1.2202</text:p>
          </table:table-cell>
          <table:table-cell office:value-type="float" office:value="73.21" calcext:value-type="float">
            <text:p>73.2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3.21" calcext:value-type="float">
            <text:p>-13.21</text:p>
          </table:table-cell>
          <table:table-cell office:value-type="float" office:value="13.21" calcext:value-type="float">
            <text:p>13.21</text:p>
          </table:table-cell>
          <table:table-cell office:value-type="float" office:value="18.0439830624232" calcext:value-type="float">
            <text:p>18.0439830624232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77" calcext:value-type="float">
            <text:p>7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1.2239" calcext:value-type="float">
            <text:p>1.2239</text:p>
          </table:table-cell>
          <table:table-cell office:value-type="float" office:value="73.43" calcext:value-type="float">
            <text:p>73.4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3.43" calcext:value-type="float">
            <text:p>-13.43</text:p>
          </table:table-cell>
          <table:table-cell office:value-type="float" office:value="13.43" calcext:value-type="float">
            <text:p>13.43</text:p>
          </table:table-cell>
          <table:table-cell office:value-type="float" office:value="18.2895274411004" calcext:value-type="float">
            <text:p>18.2895274411004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1.2296" calcext:value-type="float">
            <text:p>1.2296</text:p>
          </table:table-cell>
          <table:table-cell office:value-type="float" office:value="73.78" calcext:value-type="float">
            <text:p>73.78</text:p>
          </table:table-cell>
          <table:table-cell office:value-type="float" office:value="1.05" calcext:value-type="float">
            <text:p>1.05</text:p>
          </table:table-cell>
          <table:table-cell office:value-type="float" office:value="63" calcext:value-type="float">
            <text:p>63</text:p>
          </table:table-cell>
          <table:table-cell office:value-type="float" office:value="-10.78" calcext:value-type="float">
            <text:p>-10.78</text:p>
          </table:table-cell>
          <table:table-cell office:value-type="float" office:value="10.78" calcext:value-type="float">
            <text:p>10.78</text:p>
          </table:table-cell>
          <table:table-cell office:value-type="float" office:value="14.6110056925996" calcext:value-type="float">
            <text:p>14.6110056925996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79" calcext:value-type="float">
            <text:p>79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1.228" calcext:value-type="float">
            <text:p>1.228</text:p>
          </table:table-cell>
          <table:table-cell office:value-type="float" office:value="73.68" calcext:value-type="float">
            <text:p>73.6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3.68" calcext:value-type="float">
            <text:p>-13.68</text:p>
          </table:table-cell>
          <table:table-cell office:value-type="float" office:value="13.68" calcext:value-type="float">
            <text:p>13.68</text:p>
          </table:table-cell>
          <table:table-cell office:value-type="float" office:value="18.5667752442997" calcext:value-type="float">
            <text:p>18.5667752442997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415" calcext:value-type="float">
            <text:p>415</text:p>
          </table:table-cell>
          <table:table-cell office:value-type="float" office:value="1.2477" calcext:value-type="float">
            <text:p>1.2477</text:p>
          </table:table-cell>
          <table:table-cell office:value-type="float" office:value="74.86" calcext:value-type="float">
            <text:p>74.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4.86" calcext:value-type="float">
            <text:p>-14.86</text:p>
          </table:table-cell>
          <table:table-cell office:value-type="float" office:value="14.86" calcext:value-type="float">
            <text:p>14.86</text:p>
          </table:table-cell>
          <table:table-cell office:value-type="float" office:value="19.8503873897943" calcext:value-type="float">
            <text:p>19.8503873897943</text:p>
          </table:table-cell>
        </table:table-row>
        <table:table-row table:style-name="ro3">
          <table:table-cell office:value-type="string" calcext:value-type="string">
            <text:p>subject04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1.2505" calcext:value-type="float">
            <text:p>1.2505</text:p>
          </table:table-cell>
          <table:table-cell office:value-type="float" office:value="75.03" calcext:value-type="float">
            <text:p>75.0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5.03" calcext:value-type="float">
            <text:p>-15.03</text:p>
          </table:table-cell>
          <table:table-cell office:value-type="float" office:value="15.03" calcext:value-type="float">
            <text:p>15.03</text:p>
          </table:table-cell>
          <table:table-cell office:value-type="float" office:value="20.031987205118" calcext:value-type="float">
            <text:p>20.031987205118</text:p>
          </table:table-cell>
        </table:table-row>
        <table:table-row table:style-name="ro3">
          <table:table-cell table:number-columns-repeated="5"/>
          <table:table-cell table:style-name="ce21" table:formula="of:=STDEV([.F1:.F81])" office:value-type="float" office:value="1.83097108755349" calcext:value-type="float">
            <text:p>1.83</text:p>
          </table:table-cell>
          <table:table-cell table:style-name="ce21" table:formula="of:=STDEV([.G1:.G81])" office:value-type="float" office:value="0.194474204071858" calcext:value-type="float">
            <text:p>0.19</text:p>
          </table:table-cell>
          <table:table-cell table:style-name="ce21" table:formula="of:=STDEV([.H1:.H81])" office:value-type="float" office:value="11.6684522443115" calcext:value-type="float">
            <text:p>11.67</text:p>
          </table:table-cell>
          <table:table-cell table:style-name="ce21" table:formula="of:=STDEV([.I1:.I81])" office:value-type="float" office:value="12.288142113637" calcext:value-type="float">
            <text:p>12.29</text:p>
          </table:table-cell>
          <table:table-cell table:number-columns-repeated="2"/>
        </table:table-row>
        <table:table-row table:style-name="ro3" table:number-rows-repeated="1048493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'jendela 20 detik'.A1:'jendela 20 detik'.A842" table:display-filter-buttons="true">
          <table:filter>
            <table:filter-and>
              <table:filter-condition table:value="subject04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decimal-places="15" number:min-decimal-places="15" number:min-integer-digits="1"/>
    </number:number-style>
    <number:number-style style:name="N170">
      <number:number number:decimal-places="14" number:min-decimal-places="14" number:min-integer-digits="1"/>
    </number:number-style>
    <number:number-style style:name="N171">
      <number:number number:decimal-places="13" number:min-decimal-places="13" number:min-integer-digits="1"/>
    </number:number-style>
    <number:number-style style:name="N172">
      <number:number number:decimal-places="12" number:min-decimal-places="12" number:min-integer-digits="1"/>
    </number:number-style>
    <number:number-style style:name="N173">
      <number:number number:decimal-places="11" number:min-decimal-places="11" number:min-integer-digits="1"/>
    </number:number-style>
    <number:number-style style:name="N174">
      <number:number number:decimal-places="10" number:min-decimal-places="10" number:min-integer-digits="1"/>
    </number:number-style>
    <number:number-style style:name="N175">
      <number:number number:decimal-places="9" number:min-decimal-places="9" number:min-integer-digits="1"/>
    </number:number-style>
    <number:number-style style:name="N176">
      <number:number number:decimal-places="8" number:min-decimal-places="8" number:min-integer-digits="1"/>
    </number:number-style>
    <number:number-style style:name="N177">
      <number:number number:decimal-places="7" number:min-decimal-places="7" number:min-integer-digits="1"/>
    </number:number-style>
    <number:number-style style:name="N178">
      <number:number number:decimal-places="6" number:min-decimal-places="6" number:min-integer-digits="1"/>
    </number:number-style>
    <number:number-style style:name="N179">
      <number:number number:decimal-places="5" number:min-decimal-places="5" number:min-integer-digits="1"/>
    </number:number-style>
    <number:number-style style:name="N180">
      <number:number number:decimal-places="4" number:min-decimal-places="4" number:min-integer-digits="1"/>
    </number:number-style>
    <number:number-style style:name="N181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/00/0000</text:date>, <text:time style:data-style-name="N2" text:time-value="08:03:16.9528236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endela_20_20_20_detik" style:display-name="PageStyle_jendela 20 deti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7-14T00:30:37</meta:creation-date>
    <dc:date>2026-07-14T11:39:47.992007647</dc:date>
    <meta:generator>LibreOffice/24.2.7.2$Linux_X86_64 LibreOffice_project/420$Build-2</meta:generator>
    <meta:editing-duration>PT1H9M6S</meta:editing-duration>
    <meta:editing-cycles>2</meta:editing-cycles>
    <meta:document-statistic meta:table-count="3" meta:cell-count="11970" meta:object-count="0"/>
    <meta:user-defined meta:name="AppVersion">3.1</meta:user-defined>
  </office:meta>
</office:document-meta>
</file>